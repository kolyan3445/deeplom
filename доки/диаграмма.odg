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GOST type A" svg:font-family="'GOST type A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="solid" draw:fill-color="#ffffff" draw:textarea-horizontal-align="justify" draw:textarea-vertical-align="middle" draw:auto-grow-height="false" fo:min-height="0.782cm" fo:min-width="3.532cm" fo:padding-top="0.134cm" fo:padding-bottom="0.134cm" fo:padding-left="0.259cm" fo:padding-right="0.259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18cm" svg:stroke-color="#000000" draw:marker-start-width="0.227cm" draw:marker-end-width="0.227cm" draw:fill="solid" draw:fill-color="#ffffff" draw:textarea-horizontal-align="justify" draw:textarea-vertical-align="middle" draw:auto-grow-height="false" fo:min-height="2.75cm" fo:min-width="4cm" fo:padding-top="0.134cm" fo:padding-bottom="0.134cm" fo:padding-left="0.259cm" fo:padding-right="0.259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18cm" svg:stroke-color="#000000" draw:marker-start-width="0.227cm" draw:marker-end-width="0.227cm" draw:fill="solid" draw:fill-color="#ffffff" draw:textarea-horizontal-align="justify" draw:textarea-vertical-align="middle" draw:auto-grow-height="false" draw:auto-grow-width="false" draw:fit-to-size="false" style:shrink-to-fit="false" fo:min-height="1.25cm" fo:min-width="1.75cm" fo:padding-top="0.134cm" fo:padding-bottom="0.134cm" fo:padding-left="0.259cm" fo:padding-right="0.259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width="0.018cm" svg:stroke-color="#000000" draw:marker-start-width="0.227cm" draw:marker-end="Стили_20_стрелок_20_1" draw:marker-end-width="0.327cm" draw:fill="none" draw:textarea-vertical-align="middle" fo:padding-top="0.134cm" fo:padding-bottom="0.134cm" fo:padding-left="0.259cm" fo:padding-right="0.259cm" loext:decorative="false"/>
    </style:style>
    <style:style style:name="gr5" style:family="graphic" style:parent-style-name="objectwithoutfill">
      <style:graphic-properties svg:stroke-width="0.018cm" svg:stroke-color="#000000" draw:marker-start-width="0.227cm" draw:marker-end="Стили_20_стрелок_20_3" draw:marker-end-width="0.327cm" draw:fill="none" draw:textarea-vertical-align="top" fo:padding-top="0.134cm" fo:padding-bottom="0.134cm" fo:padding-left="0.259cm" fo:padding-right="0.259cm" loext:decorative="false"/>
    </style:style>
    <style:style style:name="gr6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vertical-align="bottom" draw:auto-grow-height="true" draw:auto-grow-width="false" fo:min-height="1.655cm" loext:decorative="false"/>
      <style:paragraph-properties style:writing-mode="lr-tb"/>
    </style:style>
    <style:style style:name="gr7" style:family="graphic" style:parent-style-name="objectwithoutfill">
      <style:graphic-properties svg:stroke-width="0.018cm" svg:stroke-color="#000000" draw:marker-start="" draw:marker-start-width="0.227cm" draw:marker-end="" draw:marker-end-width="0.327cm" draw:fill="none" draw:textarea-vertical-align="middle" fo:padding-top="0.134cm" fo:padding-bottom="0.134cm" fo:padding-left="0.259cm" fo:padding-right="0.259cm" loext:decorative="false"/>
    </style:style>
    <style:style style:name="P1" style:family="paragraph">
      <style:paragraph-properties fo:text-align="center"/>
      <style:text-properties style:font-name="GOST type A" fo:font-size="16pt" style:font-size-asian="16pt" style:font-size-complex="16pt"/>
    </style:style>
    <style:style style:name="P2" style:family="paragraph">
      <loext:graphic-properties draw:fill="solid" draw:fill-color="#ffffff"/>
      <style:paragraph-properties fo:text-align="center" style:writing-mode="lr-tb"/>
      <style:text-properties style:font-name="GOST type A" fo:font-size="16pt" style:font-size-asian="16pt" style:font-size-complex="16pt"/>
    </style:style>
    <style:style style:name="P3" style:family="paragraph">
      <style:paragraph-properties fo:text-align="center"/>
      <style:text-properties style:font-name="GOST type A" fo:font-size="14pt" style:font-size-asian="14pt" style:font-size-complex="14pt"/>
    </style:style>
    <style:style style:name="P4" style:family="paragraph">
      <loext:graphic-properties draw:fill="solid" draw:fill-color="#ffffff"/>
      <style:paragraph-properties fo:text-align="center" style:writing-mode="lr-tb"/>
      <style:text-properties style:font-name="GOST type A" fo:font-size="14pt" style:font-size-asian="14pt" style:font-size-complex="14pt"/>
    </style:style>
    <style:style style:name="P5" style:family="paragraph">
      <style:paragraph-properties fo:text-align="center"/>
      <style:text-properties style:font-name="GOST type A" fo:font-size="13pt" style:font-size-asian="13pt" style:font-size-complex="13pt"/>
    </style:style>
    <style:style style:name="P6" style:family="paragraph">
      <loext:graphic-properties draw:fill="solid" draw:fill-color="#ffffff"/>
      <style:paragraph-properties fo:text-align="center" style:writing-mode="lr-tb"/>
      <style:text-properties style:font-name="GOST type A" fo:font-size="13pt" style:font-size-asian="13pt" style:font-size-complex="1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style:font-name="GOST type A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style:font-name="GOST type A" fo:font-size="16pt" style:font-size-asian="16pt" style:font-size-complex="16pt"/>
    </style:style>
    <style:style style:name="T2" style:family="text">
      <style:text-properties style:font-name="GOST type A" fo:font-size="14pt" style:font-size-asian="14pt" style:font-size-complex="14pt"/>
    </style:style>
    <style:style style:name="T3" style:family="text">
      <style:text-properties style:font-name="GOST type A" fo:font-size="13pt" style:font-size-asian="13pt" style:font-size-complex="13pt"/>
    </style:style>
    <style:style style:name="T4" style:family="text">
      <style:text-properties style:font-name="GOST type A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4.5cm" svg:height="1.5cm" svg:x="28.317cm" svg:y="5.727cm">
          <text:p text:style-name="P1"><text:span text:style-name="T1">Начало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4" draw:layer="layout" svg:width="4.5cm" svg:height="3cm" svg:x="28.317cm" svg:y="8.22cm">
          <text:p text:style-name="P3"><text:span text:style-name="T2">Получить изображение от ESP32-CA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6" xml:id="id1" draw:id="id1" draw:layer="layout" svg:width="4.5cm" svg:height="3cm" svg:x="28.35cm" svg:y="16.208cm">
          <text:p text:style-name="P5"><text:span text:style-name="T3">Точки получены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4" xml:id="id2" draw:id="id2" draw:layer="layout" svg:width="4.5cm" svg:height="3cm" svg:x="22.417cm" svg:y="19.545cm">
          <text:p text:style-name="P3"><text:span text:style-name="T2">Извлечь массивы X, Y, 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7" draw:layer="layout" svg:x1="30.58cm" svg:y1="7.222cm" svg:x2="30.58cm" svg:y2="8.222cm">
          <text:p/>
        </draw:line>
        <draw:line draw:style-name="gr4" draw:text-style-name="P7" draw:layer="layout" svg:x1="30.58cm" svg:y1="11.22cm" svg:x2="30.58cm" svg:y2="12.22cm">
          <text:p/>
        </draw:line>
        <draw:line draw:style-name="gr4" draw:text-style-name="P7" draw:layer="layout" svg:x1="30.6cm" svg:y1="15.22cm" svg:x2="30.6cm" svg:y2="16.22cm">
          <text:p/>
        </draw:line>
        <draw:custom-shape draw:style-name="gr2" draw:text-style-name="P4" draw:layer="layout" svg:width="4.5cm" svg:height="3cm" svg:x="28.317cm" svg:y="12.22cm">
          <text:p text:style-name="P3"><text:span text:style-name="T2">Получить список точек X, Y, Т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8" draw:layer="measurelines" svg:x1="28.35cm" svg:y1="17.708cm" svg:x2="24.667cm" svg:y2="19.545cm" draw:start-shape="id1" draw:start-glue-point="5" draw:end-shape="id2" draw:end-glue-point="4" svg:d="M28350 17708h-3683v1837" svg:viewBox="0 0 3684 1838">
          <text:p/>
        </draw:connector>
        <draw:custom-shape draw:style-name="gr2" draw:text-style-name="P4" draw:layer="measurelines" svg:width="4.5cm" svg:height="3cm" svg:x="22.42cm" svg:y="23.53cm">
          <text:p text:style-name="P3"><text:span text:style-name="T2">Вычислить Tmin, Tmax, Tav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7" draw:layer="measurelines" svg:x1="24.6cm" svg:y1="22.54cm" svg:x2="24.6cm" svg:y2="23.54cm">
          <text:p/>
        </draw:line>
        <draw:line draw:style-name="gr4" draw:text-style-name="P7" draw:layer="measurelines" svg:x1="24.6cm" svg:y1="26.54cm" svg:x2="24.6cm" svg:y2="27.54cm">
          <text:p/>
        </draw:line>
        <draw:custom-shape draw:style-name="gr3" draw:text-style-name="P6" xml:id="id3" draw:id="id3" draw:layer="measurelines" svg:width="4.5cm" svg:height="3cm" svg:x="22.35cm" svg:y="35.508cm">
          <text:p text:style-name="P5"><text:span text:style-name="T3">Все значения Na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4" draw:layer="measurelines" svg:width="4.5cm" svg:height="3cm" svg:x="22.42cm" svg:y="27.53cm">
          <text:p text:style-name="P3"><text:span text:style-name="T2">Создать сетку интерполяци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measurelines" svg:width="4.5cm" svg:height="3cm" svg:x="22.42cm" svg:y="31.53cm">
          <text:p text:style-name="P3"><text:span text:style-name="T2">Выполнить интерполяцию температурного пол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7" draw:layer="measurelines" svg:x1="24.6cm" svg:y1="30.54cm" svg:x2="24.6cm" svg:y2="31.54cm">
          <text:p/>
        </draw:line>
        <draw:line draw:style-name="gr4" draw:text-style-name="P7" draw:layer="measurelines" svg:x1="24.6cm" svg:y1="34.54cm" svg:x2="24.6cm" svg:y2="35.54cm">
          <text:p/>
        </draw:line>
        <draw:connector draw:style-name="gr5" draw:text-style-name="P8" draw:layer="measurelines" svg:x1="22.35cm" svg:y1="37.008cm" svg:x2="19.17cm" svg:y2="38.83cm" draw:start-shape="id3" draw:start-glue-point="5" draw:end-shape="id4" draw:end-glue-point="4" svg:d="M22350 37008h-3180v1822" svg:viewBox="0 0 3181 1823">
          <text:p/>
        </draw:connector>
        <draw:frame draw:style-name="gr6" draw:text-style-name="P10" draw:layer="measurelines" svg:width="3.81cm" svg:height="1.905cm" svg:x="24.495cm" svg:y="15.735cm">
          <draw:text-box>
            <text:p text:style-name="P9"><text:span text:style-name="T4">Да</text:span></text:p>
          </draw:text-box>
        </draw:frame>
        <draw:frame draw:style-name="gr6" draw:text-style-name="P10" draw:layer="measurelines" svg:width="3.81cm" svg:height="1.905cm" svg:x="32.395cm" svg:y="15.436cm">
          <draw:text-box>
            <text:p text:style-name="P9"><text:span text:style-name="T4">Нет</text:span></text:p>
          </draw:text-box>
        </draw:frame>
        <draw:frame draw:style-name="gr6" draw:text-style-name="P10" draw:layer="measurelines" svg:width="3.81cm" svg:height="1.905cm" svg:x="18.595cm" svg:y="34.936cm">
          <draw:text-box>
            <text:p text:style-name="P9"><text:span text:style-name="T4">Да</text:span></text:p>
          </draw:text-box>
        </draw:frame>
        <draw:connector draw:style-name="gr5" draw:text-style-name="P8" draw:layer="measurelines" svg:x1="26.85cm" svg:y1="37.008cm" svg:x2="29.5cm" svg:y2="38.83cm" draw:start-shape="id3" draw:start-glue-point="7" draw:end-shape="id5" draw:end-glue-point="4" svg:d="M26850 37008h2650v1822" svg:viewBox="0 0 2651 1823">
          <text:p/>
        </draw:connector>
        <draw:frame draw:style-name="gr6" draw:text-style-name="P10" draw:layer="measurelines" svg:width="3.81cm" svg:height="1.905cm" svg:x="26.095cm" svg:y="35.236cm">
          <draw:text-box>
            <text:p text:style-name="P9"><text:span text:style-name="T4">Нет</text:span></text:p>
          </draw:text-box>
        </draw:frame>
        <draw:custom-shape draw:style-name="gr2" draw:text-style-name="P4" xml:id="id5" draw:id="id5" draw:layer="measurelines" svg:width="4.5cm" svg:height="3cm" svg:x="27.25cm" svg:y="38.83cm">
          <text:p text:style-name="P3"><text:span text:style-name="T2">Применить Gaussian Fi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4" draw:id="id4" draw:layer="measurelines" svg:width="4.5cm" svg:height="3cm" svg:x="16.92cm" svg:y="38.83cm">
          <text:p text:style-name="P3"><text:span text:style-name="T2">Вернуть исходное изображение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7" draw:layer="measurelines" svg:x1="29.5cm" svg:y1="41.84cm" svg:x2="29.5cm" svg:y2="42.84cm">
          <text:p/>
        </draw:line>
        <draw:custom-shape draw:style-name="gr2" draw:text-style-name="P4" draw:layer="measurelines" svg:width="4.5cm" svg:height="3cm" svg:x="27.25cm" svg:y="42.83cm">
          <text:p text:style-name="P3"><text:span text:style-name="T2">Построить градиент от темно-синего к темно-красному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7" draw:layer="measurelines" svg:x1="29.5cm" svg:y1="45.84cm" svg:x2="29.5cm" svg:y2="46.84cm">
          <text:p/>
        </draw:line>
        <draw:custom-shape draw:style-name="gr2" draw:text-style-name="P4" draw:layer="measurelines" svg:width="4.5cm" svg:height="3cm" svg:x="27.25cm" svg:y="46.83cm">
          <text:p text:style-name="P3"><text:span text:style-name="T2">Сформировать RGB тепловую карту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7" draw:layer="measurelines" svg:x1="29.5cm" svg:y1="49.84cm" svg:x2="29.5cm" svg:y2="50.84cm">
          <text:p/>
        </draw:line>
        <draw:custom-shape draw:style-name="gr2" draw:text-style-name="P4" draw:layer="measurelines" svg:width="4.5cm" svg:height="3cm" svg:x="27.25cm" svg:y="50.83cm">
          <text:p text:style-name="P3"><text:span text:style-name="T2">Наложить тепловую карту на изображение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7" draw:layer="measurelines" svg:x1="29.5cm" svg:y1="53.84cm" svg:x2="29.5cm" svg:y2="54.84cm">
          <text:p/>
        </draw:line>
        <draw:custom-shape draw:style-name="gr2" draw:text-style-name="P4" draw:layer="measurelines" svg:width="4.5cm" svg:height="3cm" svg:x="27.25cm" svg:y="54.83cm">
          <text:p text:style-name="P3"><text:span text:style-name="T2">Сохранить полученное изображение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7" draw:layer="measurelines" svg:x1="29.5cm" svg:y1="57.84cm" svg:x2="29.5cm" svg:y2="58.84cm">
          <text:p/>
        </draw:line>
        <draw:custom-shape draw:style-name="gr2" draw:text-style-name="P4" draw:layer="measurelines" svg:width="4.5cm" svg:height="3cm" svg:x="27.25cm" svg:y="58.83cm">
          <text:p text:style-name="P3"><text:span text:style-name="T2">Сохранить значения в БД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7" draw:layer="measurelines" svg:x1="29.5cm" svg:y1="61.84cm" svg:x2="29.5cm" svg:y2="62.84cm">
          <text:p/>
        </draw:line>
        <draw:custom-shape draw:style-name="gr2" draw:text-style-name="P4" draw:layer="measurelines" svg:width="4.5cm" svg:height="3cm" svg:x="27.25cm" svg:y="62.83cm">
          <text:p text:style-name="P3"><text:span text:style-name="T2">Передать изображение в интерфейс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7" draw:layer="measurelines" svg:x1="29.5cm" svg:y1="65.84cm" svg:x2="29.5cm" svg:y2="67.84cm">
          <text:p/>
        </draw:line>
        <draw:line draw:style-name="gr7" draw:text-style-name="P7" draw:layer="measurelines" svg:x1="19.2cm" svg:y1="41.84cm" svg:x2="19.2cm" svg:y2="66.54cm">
          <text:p/>
        </draw:line>
        <draw:line draw:style-name="gr4" draw:text-style-name="P7" draw:layer="measurelines" svg:x1="19.197cm" svg:y1="66.535cm" svg:x2="29.497cm" svg:y2="66.535cm">
          <text:p/>
        </draw:line>
        <draw:custom-shape draw:style-name="gr1" draw:text-style-name="P2" draw:layer="measurelines" svg:width="4.5cm" svg:height="1.5cm" svg:x="27.25cm" svg:y="67.86cm">
          <text:p text:style-name="P1"><text:span text:style-name="T1">Конец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8" draw:layer="measurelines" svg:x1="32.85cm" svg:y1="17.708cm" svg:x2="36.7cm" svg:y2="19.55cm" draw:start-shape="id1" draw:start-glue-point="7" draw:end-shape="id6" draw:end-glue-point="4" svg:d="M32850 17708h3850v1842" svg:viewBox="0 0 3851 1843">
          <text:p/>
        </draw:connector>
        <draw:custom-shape draw:style-name="gr2" draw:text-style-name="P4" xml:id="id6" draw:id="id6" draw:layer="measurelines" svg:width="4.5cm" svg:height="3cm" svg:x="34.45cm" svg:y="19.55cm">
          <text:p text:style-name="P3"><text:span text:style-name="T2">Вернуть исходное изображение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7" draw:layer="measurelines" svg:x1="36.7cm" svg:y1="22.55cm" svg:x2="36.7cm" svg:y2="66.54cm">
          <text:p/>
        </draw:line>
        <draw:line draw:style-name="gr4" draw:text-style-name="P7" draw:layer="measurelines" svg:x1="36.7cm" svg:y1="66.535cm" svg:x2="29.5cm" svg:y2="66.5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GOST type A" svg:font-family="'GOST type A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3" draw:display-name="Стили стрелок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08T11:35:29.392535400</meta:creation-date>
    <dc:date>2026-06-08T21:49:47.220420900</dc:date>
    <meta:editing-duration>PT20M14S</meta:editing-duration>
    <meta:editing-cycles>5</meta:editing-cycles>
    <meta:generator>LibreOffice/26.2.3.2$Windows_X86_64 LibreOffice_project/70e089b17412e4cb7773e41413306b17a2328c34</meta:generator>
    <meta:document-statistic meta:object-count="45"/>
  </office:meta>
</office:document-meta>
</file>