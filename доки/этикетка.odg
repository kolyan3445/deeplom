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fill="none" loext:fill-use-slide-background="false" draw:textarea-horizontal-align="justify" draw:textarea-vertical-align="middle" draw:auto-grow-height="false" fo:min-height="7.75cm" fo:min-width="13.5cm" loext:decorative="false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7.52cm" fo:min-width="13.27cm" fo:padding-top="0.151cm" fo:padding-bottom="0.151cm" fo:padding-left="0.276cm" fo:padding-right="0.276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0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84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false" fo:min-height="0.949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middle" draw:auto-grow-height="true" draw:auto-grow-width="false" fo:min-height="0.475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false" fo:min-height="0.34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Arial"/>
    </style:style>
    <style:style style:name="P3" style:family="paragraph">
      <loext:graphic-properties draw:fill="none" draw:fill-color="#ffffff"/>
      <style:text-properties style:font-name="Arial"/>
    </style:style>
    <style:style style:name="P4" style:family="paragraph">
      <style:paragraph-properties fo:margin-top="0.42cm" fo:margin-bottom="0.35cm"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 draw:fill-color="#ffffff"/>
      <style:text-properties style:font-name="Arial" fo:font-weight="bold" style:font-weight-asian="bold" style:font-weight-complex="bold"/>
    </style:style>
    <style:style style:name="P6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margin-top="0.42cm" fo:margin-bottom="0.35cm"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margin-left="0cm" fo:margin-right="0cm" fo:margin-top="0.12cm" fo:margin-bottom="0.1cm" fo:line-height="100%" fo:text-align="righ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.12cm" fo:margin-bottom="0.1cm" fo:line-height="100%" fo:text-align="righ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12cm" fo:margin-bottom="0.1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.12cm" fo:margin-bottom="0.1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42cm" fo:margin-bottom="0.35cm" fo:line-height="100%" fo:text-align="right" fo:text-indent="0cm"/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.42cm" fo:margin-bottom="0.35cm" fo:line-height="100%" fo:text-align="righ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4cm" svg:height="8cm" svg:x="3.54cm" svg:y="7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85cm" svg:height="7.85cm" svg:x="3.62cm" svg:y="7.1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.065cm" svg:height="0.953cm" svg:x="4.492cm" svg:y="7.35cm">
          <draw:text-box>
            <text:p text:style-name="P2"><text:span text:style-name="T1">Ульяновский государственный технический университет</text:span></text:p>
          </draw:text-box>
        </draw:frame>
        <draw:frame draw:style-name="gr3" draw:text-style-name="P5" draw:layer="layout" svg:width="10.477cm" svg:height="0.953cm" svg:x="5.445cm" svg:y="8.937cm">
          <draw:text-box>
            <text:p text:style-name="P4"><text:span text:style-name="T2">ВЫПУСКНАЯ КВАЛИФИКАЦИОННАЯ РАБОТА </text:span></text:p>
          </draw:text-box>
        </draw:frame>
        <draw:frame draw:style-name="gr4" draw:text-style-name="P7" draw:layer="layout" svg:width="11.747cm" svg:height="1.673cm" svg:x="4.81cm" svg:y="10.207cm">
          <draw:text-box>
            <text:p text:style-name="P6"><text:span text:style-name="T2">Программное обеспечение для управления камерой и обработки данных в системе инфракрасного мониторинга температуры объекта </text:span></text:p>
          </draw:text-box>
        </draw:frame>
        <draw:frame draw:style-name="gr5" draw:text-style-name="P9" draw:layer="layout" svg:width="6.033cm" svg:height="1.199cm" svg:x="11.477cm" svg:y="12.193cm">
          <draw:text-box>
            <text:p text:style-name="P8"><text:span text:style-name="T2">Студент: </text:span><text:span text:style-name="T3">Лашманов Н. Н. </text:span></text:p>
          </draw:text-box>
        </draw:frame>
        <draw:frame draw:style-name="gr6" draw:text-style-name="P11" draw:layer="layout" svg:width="4.511cm" svg:height="0.725cm" svg:x="11.75cm" svg:y="12.975cm">
          <draw:text-box>
            <text:p text:style-name="P10"><text:span text:style-name="T2">Группа: <text:s text:c="2"/></text:span><text:span text:style-name="T3">ИСТбд-41 </text:span></text:p>
          </draw:text-box>
        </draw:frame>
        <draw:frame draw:style-name="gr7" draw:text-style-name="P13" draw:layer="layout" svg:width="7.528cm" svg:height="0.725cm" svg:x="6.807cm" svg:y="14.017cm">
          <draw:text-box>
            <text:p text:style-name="P12"><text:span text:style-name="T3">ВКР-УлГТУ-09.03.02-22/2410-2026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9T02:57:11.249209100</meta:creation-date>
    <meta:print-date>2026-06-19T03:08:58.400229800</meta:print-date>
    <meta:printed-by>Файлы PDF</meta:printed-by>
    <dc:date>2026-06-19T03:09:08.441316400</dc:date>
    <meta:editing-duration>PT10S</meta:editing-duration>
    <meta:editing-cycles>1</meta:editing-cycles>
    <meta:document-statistic meta:object-count="8"/>
    <meta:generator>LibreOffice/26.2.3.2$Windows_X86_64 LibreOffice_project/70e089b17412e4cb7773e41413306b17a2328c34</meta:generator>
  </office:meta>
</office:document-meta>
</file>