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572cm" fo:min-width="2.768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2cm" fo:min-width="3.154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draw:auto-grow-width="false" draw:fit-to-size="false" style:shrink-to-fit="false" fo:min-height="0.972cm" fo:min-width="1.32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1cm" fo:min-width="3.15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Стили_20_стрелок_20_1" draw:marker-end-width="0.3cm" draw:fill="none" draw:textarea-vertical-align="middle" loext:decorative="fals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98cm" fo:min-width="3.154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Стили_20_стрелок_20_3" draw:marker-end-width="0.3cm" draw:fill="none" draw:textarea-vertical-align="top" loext:decorative="fals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9cm" fo:min-width="3.153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2cm" fo:min-width="3.15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98cm" fo:min-width="3.153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1.31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1.278cm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73cm" fo:min-width="3.15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1cm" fo:min-width="3.154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1cm" fo:min-width="3.149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GOST type A" fo:font-size="14pt" style:font-size-asian="21pt" style:font-size-complex="21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GOST type A" fo:font-size="14pt" style:font-size-asian="21pt" style:font-size-complex="21pt"/>
    </style:style>
    <style:style style:name="P3" style:family="paragraph">
      <style:paragraph-properties fo:text-align="center"/>
      <style:text-properties style:font-name="GOST type A" fo:font-size="14pt" style:font-size-asian="18pt" style:font-size-complex="18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GOST type A" fo:font-size="14pt" style:font-size-asian="18pt" style:font-size-complex="18pt"/>
    </style:style>
    <style:style style:name="P5" style:family="paragraph">
      <style:paragraph-properties fo:text-align="center"/>
      <style:text-properties style:font-name="GOST type A" fo:font-size="14pt" style:font-size-asian="16pt" style:font-size-complex="16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GOST type A" fo:font-size="14pt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GOST type A" fo:font-size="14pt" style:font-size-asian="22pt" style:font-size-complex="22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GOST type A" fo:font-size="14pt" style:font-size-asian="22pt" style:font-size-complex="22pt"/>
    </style:style>
    <style:style style:name="T1" style:family="text">
      <style:text-properties style:font-name="GOST type A" fo:font-size="14pt" style:font-size-asian="21pt" style:font-size-complex="21pt"/>
    </style:style>
    <style:style style:name="T2" style:family="text">
      <style:text-properties style:font-name="GOST type A" fo:font-size="14pt" style:font-size-asian="18pt" style:font-size-complex="18pt"/>
    </style:style>
    <style:style style:name="T3" style:family="text">
      <style:text-properties style:font-name="GOST type A" fo:font-size="10.5pt" style:font-size-asian="12pt" style:font-size-complex="12pt"/>
    </style:style>
    <style:style style:name="T4" style:family="text">
      <style:text-properties style:font-name="GOST type A" fo:font-size="14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654cm" svg:height="1.204cm" svg:x="20.674cm" svg:y="2.24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3.654cm" svg:height="2.412cm" svg:x="20.674cm" svg:y="4.267cm">
          <text:p text:style-name="P3"><text:span text:style-name="T2">Создать папку repo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xml:id="id1" draw:id="id1" draw:layer="layout" svg:width="3.654cm" svg:height="2.442cm" svg:x="20.707cm" svg:y="13.93cm">
          <text:p text:style-name="P5"><text:span text:style-name="T3">Данные найдены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4" xml:id="id2" draw:id="id2" draw:layer="layout" svg:width="3.653cm" svg:height="2.411cm" svg:x="15.917cm" svg:y="16.632cm">
          <text:p text:style-name="P3"><text:span text:style-name="T2">Создать новый файл отчета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5" draw:text-style-name="P7" draw:layer="layout" svg:x1="22.514cm" svg:y1="3.448cm" svg:x2="22.514cm" svg:y2="4.256cm">
          <text:p/>
        </draw:line>
        <draw:line draw:style-name="gr5" draw:text-style-name="P7" draw:layer="layout" svg:x1="22.514cm" svg:y1="6.677cm" svg:x2="22.514cm" svg:y2="7.485cm">
          <text:p/>
        </draw:line>
        <draw:line draw:style-name="gr5" draw:text-style-name="P7" draw:layer="layout" svg:x1="22.53cm" svg:y1="13.14cm" svg:x2="22.53cm" svg:y2="13.948cm">
          <text:p/>
        </draw:line>
        <draw:custom-shape draw:style-name="gr6" draw:text-style-name="P4" draw:layer="layout" svg:width="3.654cm" svg:height="2.448cm" svg:x="20.674cm" svg:y="7.469cm">
          <text:p text:style-name="P3"><text:span text:style-name="T2">Сформировать имя файла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7" draw:layer="measurelines" svg:x1="20.707cm" svg:y1="15.151cm" svg:x2="17.744cm" svg:y2="16.632cm" draw:start-shape="id1" draw:start-glue-point="5" draw:end-shape="id2" draw:end-glue-point="4" svg:d="M20707 15151h-2963v1481" svg:viewBox="0 0 2964 1482">
          <text:p/>
        </draw:connector>
        <draw:custom-shape draw:style-name="gr8" draw:text-style-name="P4" draw:layer="measurelines" svg:width="3.653cm" svg:height="2.409cm" svg:x="15.92cm" svg:y="19.859cm">
          <text:p text:style-name="P3"><text:span text:style-name="T2">Установить стиль текста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5" draw:text-style-name="P7" draw:layer="measurelines" svg:x1="17.682cm" svg:y1="19.053cm" svg:x2="17.682cm" svg:y2="19.861cm">
          <text:p/>
        </draw:line>
        <draw:line draw:style-name="gr5" draw:text-style-name="P7" draw:layer="measurelines" svg:x1="17.682cm" svg:y1="22.284cm" svg:x2="17.682cm" svg:y2="23.092cm">
          <text:p/>
        </draw:line>
        <draw:custom-shape draw:style-name="gr9" draw:text-style-name="P4" draw:layer="measurelines" svg:width="3.653cm" svg:height="2.412cm" svg:x="15.92cm" svg:y="23.097cm">
          <text:p text:style-name="P3"><text:span text:style-name="T2">Добавить общую информацию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4" draw:layer="measurelines" svg:width="3.653cm" svg:height="2.448cm" svg:x="15.92cm" svg:y="26.299cm">
          <text:p text:style-name="P3"><text:span text:style-name="T2">Рассчитать Tmin, Tmax, Tav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5" draw:text-style-name="P7" draw:layer="measurelines" svg:x1="17.782cm" svg:y1="25.515cm" svg:x2="17.782cm" svg:y2="26.323cm">
          <text:p/>
        </draw:line>
        <draw:line draw:style-name="gr5" draw:text-style-name="P7" draw:layer="measurelines" svg:x1="17.782cm" svg:y1="28.746cm" svg:x2="17.782cm" svg:y2="29.554cm">
          <text:p/>
        </draw:line>
        <draw:frame draw:style-name="gr11" draw:text-style-name="P9" draw:layer="measurelines" svg:width="3.048cm" svg:height="1.567cm" svg:x="17.614cm" svg:y="13.541cm">
          <draw:text-box>
            <text:p text:style-name="P8"><text:span text:style-name="T4">Да</text:span></text:p>
          </draw:text-box>
        </draw:frame>
        <draw:frame draw:style-name="gr12" draw:text-style-name="P9" draw:layer="measurelines" svg:width="3.061cm" svg:height="1.528cm" svg:x="23.991cm" svg:y="13.323cm">
          <draw:text-box>
            <text:p text:style-name="P8"><text:span text:style-name="T4">Нет</text:span></text:p>
          </draw:text-box>
        </draw:frame>
        <draw:custom-shape draw:style-name="gr13" draw:text-style-name="P4" draw:layer="measurelines" svg:width="3.654cm" svg:height="2.423cm" svg:x="15.919cm" svg:y="29.605cm">
          <text:p text:style-name="P3"><text:span text:style-name="T2">Получить путь к последнему изображению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5" draw:text-style-name="P7" draw:layer="measurelines" svg:x1="17.742cm" svg:y1="32.043cm" svg:x2="17.742cm" svg:y2="32.851cm">
          <text:p/>
        </draw:line>
        <draw:custom-shape draw:style-name="gr14" draw:text-style-name="P4" draw:layer="measurelines" svg:width="3.654cm" svg:height="2.411cm" svg:x="15.919cm" svg:y="32.847cm">
          <text:p text:style-name="P3"><text:span text:style-name="T2">Вставить изображение в отчет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5" draw:text-style-name="P7" draw:layer="measurelines" svg:x1="17.742cm" svg:y1="35.262cm" svg:x2="17.742cm" svg:y2="36.07cm">
          <text:p/>
        </draw:line>
        <draw:custom-shape draw:style-name="gr2" draw:text-style-name="P4" draw:layer="measurelines" svg:width="3.654cm" svg:height="2.412cm" svg:x="15.919cm" svg:y="36.073cm">
          <text:p text:style-name="P3"><text:span text:style-name="T2">Вывести сообщение с именем файла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5" draw:text-style-name="P7" draw:layer="measurelines" svg:x1="17.74cm" svg:y1="39.99cm" svg:x2="27.44cm" svg:y2="39.99cm">
          <text:p/>
        </draw:line>
        <draw:custom-shape draw:style-name="gr1" draw:text-style-name="P2" draw:layer="measurelines" svg:width="3.654cm" svg:height="1.204cm" svg:x="25.6cm" svg:y="41.068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7" draw:layer="measurelines" svg:x1="24.361cm" svg:y1="15.151cm" svg:x2="27.453cm" svg:y2="16.637cm" draw:start-shape="id1" draw:start-glue-point="7" draw:end-shape="id3" draw:end-glue-point="4" svg:d="M24361 15151h3092v1486" svg:viewBox="0 0 3093 1487">
          <text:p/>
        </draw:connector>
        <draw:custom-shape draw:style-name="gr15" draw:text-style-name="P4" xml:id="id3" draw:id="id3" draw:layer="measurelines" svg:width="3.649cm" svg:height="2.411cm" svg:x="25.628cm" svg:y="16.637cm">
          <text:p text:style-name="P3"><text:span text:style-name="T2">Вывести сообщение “Нет данных для экспорта”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5" draw:text-style-name="P7" draw:layer="measurelines" svg:x1="27.451cm" svg:y1="19.052cm" svg:x2="27.451cm" svg:y2="41.052cm">
          <text:p/>
        </draw:line>
        <draw:line draw:style-name="gr16" draw:text-style-name="P7" draw:layer="layout" svg:x1="17.732cm" svg:y1="38.522cm" svg:x2="17.732cm" svg:y2="40.022cm">
          <text:p/>
        </draw:line>
        <draw:line draw:style-name="gr5" draw:text-style-name="P7" draw:layer="layout" svg:x1="22.515cm" svg:y1="9.91cm" svg:x2="22.515cm" svg:y2="10.718cm">
          <text:p/>
        </draw:line>
        <draw:custom-shape draw:style-name="gr6" draw:text-style-name="P4" draw:layer="layout" svg:width="3.654cm" svg:height="2.448cm" svg:x="20.675cm" svg:y="10.702cm">
          <text:p text:style-name="P3"><text:span text:style-name="T2">Получить данные сеанса из БД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6-08T11:35:29.392535400</meta:creation-date>
    <dc:date>2026-06-09T10:25:35.182000000</dc:date>
    <meta:editing-duration>PT45M43S</meta:editing-duration>
    <meta:editing-cycles>7</meta:editing-cycles>
    <meta:generator>LibreOffice/24.2.0.3$Windows_X86_64 LibreOffice_project/da48488a73ddd66ea24cf16bbc4f7b9c08e9bea1</meta:generator>
    <meta:print-date>2026-06-09T10:16:46.090000000</meta:print-date>
    <meta:printed-by>Файлы PDF</meta:printed-by>
    <meta:document-statistic meta:object-count="31"/>
  </office:meta>
</office:document-meta>
</file>