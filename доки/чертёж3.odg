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486cm" fo:min-width="6.236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draw:auto-grow-width="false" draw:fit-to-size="false" style:shrink-to-fit="false" fo:min-height="2.222cm" fo:min-width="3.222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bottom" draw:auto-grow-height="true" draw:auto-grow-width="false" fo:min-height="0.776cm" loext:decorative="false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4.722cm" fo:min-width="6.972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top" fo:padding-top="0.139cm" fo:padding-bottom="0.139cm" fo:padding-left="0.264cm" fo:padding-right="0.264cm" loext:decorative="false"/>
    </style:style>
    <style:style style:name="gr7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937cm" fo:min-width="0.002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="Стили_20_стрелок_20_3" draw:marker-end-width="0.342cm" draw:fill="none" draw:textarea-vertical-align="top" fo:padding-top="0.139cm" fo:padding-bottom="0.139cm" fo:padding-left="0.264cm" fo:padding-right="0.264cm" loext:decorative="false"/>
    </style:style>
    <style:style style:name="gr9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bottom" draw:auto-grow-height="true" draw:auto-grow-width="false" fo:min-height="1.655cm" loext:decorative="false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="Стили_20_стрелок_20_1" draw:marker-end-width="0.342cm" draw:fill="none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  <style:text-properties style:font-name="GOST type A" fo:font-size="20pt" fo:font-style="italic" style:font-size-asian="20pt" style:font-size-complex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20pt" fo:font-style="italic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tyle="italic"/>
    </style:style>
    <style:style style:name="P4" style:family="paragraph">
      <style:paragraph-properties fo:text-align="center"/>
      <style:text-properties style:font-name="GOST type A" fo:font-size="18pt" fo:font-style="italic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GOST type A" fo:font-size="18pt" fo:font-style="italic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8" style:family="paragraph">
      <style:paragraph-properties fo:text-align="center"/>
      <style:text-properties style:font-name="GOST type A" fo:font-size="24pt" fo:font-style="italic" style:font-size-asian="24pt" style:font-size-complex="24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GOST type A" fo:font-size="24pt" fo:font-style="italic" style:font-size-asian="24pt" style:font-size-complex="24pt"/>
    </style:style>
    <style:style style:name="P10" style:family="paragraph">
      <style:paragraph-properties fo:text-align="center"/>
      <style:text-properties style:font-name="GOST type A" fo:font-size="22pt" fo:font-style="italic" style:font-size-asian="22pt" style:font-size-complex="22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GOST type A" fo:font-size="22pt" fo:font-style="italic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GOST type A" fo:font-size="14pt" fo:font-style="italic" style:font-size-asian="14pt" style:font-size-complex="14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GOST type A" fo:font-size="14pt" fo:font-style="italic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GOST type A" fo:font-style="italic"/>
    </style:style>
    <style:style style:name="P15" style:family="paragraph">
      <style:paragraph-properties fo:text-align="center"/>
      <style:text-properties style:font-name="GOST type A" fo:font-size="14pt" fo:font-style="italic" style:font-size-asian="14pt" style:font-size-complex="14pt"/>
    </style:style>
    <style:style style:name="P16" style:family="paragraph">
      <loext:graphic-properties draw:fill="solid" draw:fill-color="#ffffff"/>
      <style:paragraph-properties fo:text-align="center" style:writing-mode="lr-tb"/>
      <style:text-properties style:font-name="GOST type A" fo:font-size="14pt" fo:font-style="italic" style:font-size-asian="14pt" style:font-size-complex="14pt"/>
    </style:style>
    <style:style style:name="P17" style:family="paragraph">
      <loext:graphic-properties draw:fill="none" draw:fill-color="#ffffff"/>
      <style:text-properties fo:font-style="italic"/>
    </style:style>
    <style:style style:name="T1" style:family="text">
      <style:text-properties style:font-name="GOST type A" fo:font-size="24pt" fo:font-style="italic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7.5cm" svg:height="2.5cm" svg:x="27.15cm" svg:y="4.15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30.9cm" svg:y1="6.65cm" svg:x2="30.9cm" svg:y2="8.65cm">
          <text:p/>
        </draw:line>
        <draw:custom-shape draw:style-name="gr3" draw:text-style-name="P5" xml:id="id1" draw:id="id1" draw:layer="layout" svg:width="7.5cm" svg:height="5cm" svg:x="27.15cm" svg:y="29.65cm">
          <text:p text:style-name="P4"><text:span text:style-name="T1">Данные найде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7" draw:layer="layout" svg:width="1.905cm" svg:height="1.026cm" svg:x="29.257cm" svg:y="34.861cm">
          <draw:text-box>
            <text:p text:style-name="P6"><text:span text:style-name="T1">Да</text:span></text:p>
          </draw:text-box>
        </draw:frame>
        <draw:custom-shape draw:style-name="gr5" draw:text-style-name="P9" draw:layer="layout" svg:width="7.5cm" svg:height="5cm" svg:x="27.15cm" svg:y="8.65cm">
          <text:p text:style-name="P8"><text:span text:style-name="T1">Создать каталог re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0.9cm" svg:y1="13.65cm" svg:x2="30.9cm" svg:y2="15.65cm">
          <text:p/>
        </draw:line>
        <draw:custom-shape draw:style-name="gr5" draw:text-style-name="P11" draw:layer="layout" svg:width="7.5cm" svg:height="5cm" svg:x="27.15cm" svg:y="15.65cm">
          <text:p text:style-name="P10"><text:span text:style-name="T1">Сформировать имя фай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3" draw:layer="layout" svg:width="7.5cm" svg:height="5cm" svg:x="27.15cm" svg:y="22.65cm">
          <text:p text:style-name="P12"><text:span text:style-name="T1">Получить данные сеанса из БД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0.9cm" svg:y1="20.65cm" svg:x2="30.9cm" svg:y2="22.65cm">
          <text:p/>
        </draw:line>
        <draw:line draw:style-name="gr2" draw:text-style-name="P3" draw:layer="layout" svg:x1="30.9cm" svg:y1="27.65cm" svg:x2="30.9cm" svg:y2="29.65cm">
          <text:p/>
        </draw:line>
        <draw:connector draw:style-name="gr6" draw:text-style-name="P14" draw:layer="layout" svg:x1="30.9cm" svg:y1="34.65cm" svg:x2="30.9cm" svg:y2="36.65cm" draw:start-shape="id1" draw:start-glue-point="6" draw:end-shape="id2" draw:end-glue-point="4" svg:d="M30900 34650v2000" svg:viewBox="0 0 1 2001">
          <text:p/>
        </draw:connector>
        <draw:custom-shape draw:style-name="gr5" draw:text-style-name="P16" xml:id="id2" draw:id="id2" draw:layer="layout" svg:width="7.5cm" svg:height="5cm" svg:x="27.15cm" svg:y="36.65cm">
          <text:p text:style-name="P15"><text:span text:style-name="T1">Создать новый файл отчет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17" draw:layer="layout" svg:width="0.502cm" svg:height="1.187cm" svg:x="23.638cm" svg:y="5.985cm">
          <draw:text-box>
            <text:p/>
          </draw:text-box>
        </draw:frame>
        <draw:line draw:style-name="gr2" draw:text-style-name="P3" draw:layer="layout" svg:x1="30.9cm" svg:y1="41.65cm" svg:x2="30.9cm" svg:y2="43.65cm">
          <text:p/>
        </draw:line>
        <draw:custom-shape draw:style-name="gr5" draw:text-style-name="P16" draw:layer="layout" svg:width="7.5cm" svg:height="5cm" svg:x="27.15cm" svg:y="43.65cm">
          <text:p text:style-name="P15"><text:span text:style-name="T1">Установить стиль текст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0.9cm" svg:y1="48.65cm" svg:x2="30.9cm" svg:y2="50.65cm">
          <text:p/>
        </draw:line>
        <draw:custom-shape draw:style-name="gr5" draw:text-style-name="P16" draw:layer="layout" svg:width="7.5cm" svg:height="5cm" svg:x="27.145cm" svg:y="50.65cm">
          <text:p text:style-name="P15"><text:span text:style-name="T1">Добавить общую информацию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0.9cm" svg:y1="55.65cm" svg:x2="30.9cm" svg:y2="57.65cm">
          <text:p/>
        </draw:line>
        <draw:custom-shape draw:style-name="gr5" draw:text-style-name="P16" draw:layer="layout" svg:width="7.5cm" svg:height="5cm" svg:x="27.145cm" svg:y="57.65cm">
          <text:p text:style-name="P15"><text:span text:style-name="T1">Получить путь к последнему изображению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4" draw:layer="layout" svg:x1="34.65cm" svg:y1="32.15cm" svg:x2="44.095cm" svg:y2="36.65cm" draw:start-shape="id1" draw:start-glue-point="7" draw:end-shape="id3" draw:end-glue-point="4" svg:d="M34650 32150h9445v4500" svg:viewBox="0 0 9446 4501">
          <text:p/>
        </draw:connector>
        <draw:custom-shape draw:style-name="gr5" draw:text-style-name="P16" xml:id="id3" draw:id="id3" draw:layer="layout" svg:width="7.5cm" svg:height="5cm" svg:x="40.345cm" svg:y="36.65cm">
          <text:p text:style-name="P15"><text:span text:style-name="T1">Вывести сообщение об отсутствии данных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5cm" svg:height="2.5cm" svg:x="40.4cm" svg:y="73.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7" draw:layer="layout" svg:width="3.81cm" svg:height="1.905cm" svg:x="34.655cm" svg:y="30.21cm">
          <draw:text-box>
            <text:p text:style-name="P6"><text:span text:style-name="T1">Нет</text:span></text:p>
          </draw:text-box>
        </draw:frame>
        <draw:line draw:style-name="gr2" draw:text-style-name="P3" draw:layer="layout" svg:x1="44.15cm" svg:y1="41.65cm" svg:x2="44.15cm" svg:y2="73.6cm">
          <text:p/>
        </draw:line>
        <draw:line draw:style-name="gr10" draw:text-style-name="P3" draw:layer="layout" svg:x1="30.9cm" svg:y1="71.65cm" svg:x2="44.15cm" svg:y2="71.65cm">
          <text:p/>
        </draw:line>
        <draw:line draw:style-name="gr11" draw:text-style-name="P3" draw:layer="layout" svg:x1="30.9cm" svg:y1="69.65cm" svg:x2="30.9cm" svg:y2="71.65cm">
          <text:p/>
        </draw:line>
        <draw:line draw:style-name="gr2" draw:text-style-name="P3" draw:layer="layout" svg:x1="30.9cm" svg:y1="62.65cm" svg:x2="30.9cm" svg:y2="64.65cm">
          <text:p/>
        </draw:line>
        <draw:custom-shape draw:style-name="gr5" draw:text-style-name="P16" draw:layer="layout" svg:width="7.5cm" svg:height="5cm" svg:x="27.145cm" svg:y="64.65cm">
          <text:p text:style-name="P15"><text:span text:style-name="T1">Вставить изображение в отчёт и вывести сообщение с именем фай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8T11:35:29.392535400</meta:creation-date>
    <dc:date>2026-06-16T17:00:32.193466600</dc:date>
    <meta:editing-duration>PT1H9M11S</meta:editing-duration>
    <meta:editing-cycles>15</meta:editing-cycles>
    <meta:generator>LibreOffice/26.2.3.2$Windows_X86_64 LibreOffice_project/70e089b17412e4cb7773e41413306b17a2328c34</meta:generator>
    <meta:document-statistic meta:object-count="28"/>
  </office:meta>
</office:document-meta>
</file>