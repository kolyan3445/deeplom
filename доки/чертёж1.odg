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GOST type A" svg:font-family="'GOST type A'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8cm" fo:min-width="6.23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716cm" fo:min-width="6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draw:auto-grow-width="false" draw:fit-to-size="false" style:shrink-to-fit="false" fo:min-height="2.216cm" fo:min-width="3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top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draw:auto-grow-height="true" draw:auto-grow-width="false" fo:min-height="0.703cm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draw:auto-grow-height="true" draw:auto-grow-width="false" fo:min-height="0.831cm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draw:auto-grow-height="true" draw:auto-grow-width="false" fo:min-height="0.577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draw:textarea-vertical-align="top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bottom" draw:auto-grow-height="true" draw:auto-grow-width="false" fo:min-height="0.577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center" draw:textarea-vertical-align="middle" draw:auto-grow-height="false" fo:min-height="1.48cm" fo:min-width="1.23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="" draw:marker-start-width="0.252cm" draw:marker-end="Стили_20_стрелок_20_1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style:font-name="GOST type A" fo:font-size="15.8999996185303pt" fo:font-style="italic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15.8999996185303pt" fo:font-style="italic" style:font-size-asian="16pt" style:font-size-complex="16pt"/>
    </style:style>
    <style:style style:name="P3" style:family="paragraph">
      <style:paragraph-properties fo:text-align="center"/>
      <style:text-properties style:font-name="GOST type A" fo:font-size="13.8999996185303pt" fo:font-style="italic" style:font-size-asian="14pt" style:font-size-complex="14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GOST type A" fo:font-size="13.8999996185303pt" fo:font-style="italic" style:font-size-asian="14pt" style:font-size-complex="14pt"/>
    </style:style>
    <style:style style:name="P5" style:family="paragraph">
      <style:paragraph-properties fo:text-align="center"/>
      <style:text-properties style:font-name="GOST type A" fo:font-size="12.8999996185303pt" fo:font-style="italic" style:font-size-asian="13pt" style:font-size-complex="13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GOST type A" fo:font-size="12.8999996185303pt" fo:font-style="italic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style:font-name="GOST type A" fo:font-style="italic"/>
    </style:style>
    <style:style style:name="P8" style:family="paragraph">
      <style:paragraph-properties fo:text-align="center"/>
      <style:text-properties style:font-name="GOST type A" fo:font-size="20pt" fo:font-style="italic" style:font-size-asian="20pt" style:font-size-complex="20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GOST type A" fo:font-size="20pt" fo:font-style="italic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GOST type A" fo:font-size="18pt" fo:font-style="italic" style:font-size-asian="18pt" style:font-size-complex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GOST type A" fo:font-size="17.8999996185303pt" fo:font-style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GOST type A" fo:font-size="13.8999996185303pt" fo:font-style="italic" style:font-size-asian="14pt" style:font-size-complex="14pt"/>
    </style:style>
    <style:style style:name="P14" style:family="paragraph">
      <style:paragraph-properties fo:text-align="center"/>
      <style:text-properties style:font-name="GOST type A" fo:font-style="italic" style:font-style-asian="italic" style:font-style-complex="italic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GOST type A" fo:font-style="italic" style:font-style-asian="italic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GOST type A" fo:font-size="20pt" fo:font-style="italic" style:font-size-asian="20pt" style:font-size-complex="20pt"/>
    </style:style>
    <style:style style:name="T1" style:family="text">
      <style:text-properties style:font-name="GOST type A" fo:font-size="24pt" fo:font-style="italic" style:font-size-asian="24pt" style:font-size-complex="24pt"/>
    </style:style>
    <style:style style:name="T2" style:family="text">
      <style:text-properties style:font-name="GOST type A" fo:font-size="20pt" fo:font-style="italic" style:font-size-asian="20pt" style:font-size-complex="20pt"/>
    </style:style>
    <style:style style:name="T3" style:family="text">
      <style:text-properties style:font-name="GOST type A" fo:font-size="18pt" fo:font-style="italic" style:font-size-asian="18pt" style:font-size-complex="18pt"/>
    </style:style>
    <style:style style:name="T4" style:family="text">
      <style:text-properties style:font-name="GOST type A" fo:font-size="17.8999996185303pt" fo:font-style="italic"/>
    </style:style>
    <style:style style:name="T5" style:family="text">
      <style:text-properties style:font-name="GOST type A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7.5cm" svg:height="2.5cm" svg:x="13.5cm" svg:y="11.1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5cm" svg:height="5cm" svg:x="13.5cm" svg:y="15.6cm">
          <text:p text:style-name="P3"><text:span text:style-name="T2">Получить изображение от ESP32-C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4" draw:id="id4" draw:layer="layout" svg:width="7.5cm" svg:height="5cm" svg:x="13.502cm" svg:y="29.6cm">
          <text:p text:style-name="P5"><text:span text:style-name="T3">Точки получе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draw:layer="layout" svg:width="7.5cm" svg:height="5cm" svg:x="13.5cm" svg:y="36.6cm">
          <text:p text:style-name="P3"><text:span text:style-name="T2">Извлечь массивы X, Y, 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17.3cm" svg:y1="13.6cm" svg:x2="17.3cm" svg:y2="15.6cm">
          <text:p/>
        </draw:line>
        <draw:line draw:style-name="gr5" draw:text-style-name="P7" draw:layer="layout" svg:x1="17.25cm" svg:y1="20.6cm" svg:x2="17.25cm" svg:y2="22.6cm">
          <text:p/>
        </draw:line>
        <draw:line draw:style-name="gr4" draw:text-style-name="P7" draw:layer="layout" svg:x1="17.25cm" svg:y1="27.6cm" svg:x2="17.25cm" svg:y2="29.6cm">
          <text:p/>
        </draw:line>
        <draw:custom-shape draw:style-name="gr2" draw:text-style-name="P4" draw:layer="layout" svg:width="7.5cm" svg:height="5cm" svg:x="13.5cm" svg:y="22.6cm">
          <text:p text:style-name="P3"><text:span text:style-name="T2">Получить список точек X, Y, 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measurelines" svg:width="7.5cm" svg:height="5cm" svg:x="13.5cm" svg:y="43.6cm">
          <text:p text:style-name="P3"><text:span text:style-name="T2">Вычислить Tmin, Tmax, Tav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1" draw:id="id1" draw:layer="measurelines" svg:width="7.5cm" svg:height="5cm" svg:x="30.5cm" svg:y="15.6cm">
          <text:p text:style-name="P5"><text:span text:style-name="T3">Все значения Na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draw:layer="measurelines" svg:width="7.5cm" svg:height="5cm" svg:x="13.5cm" svg:y="50.6cm">
          <text:p text:style-name="P3"><text:span text:style-name="T2">Создать сетку интерполя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9" draw:layer="measurelines" svg:width="7.5cm" svg:height="5cm" svg:x="13.5cm" svg:y="57.6cm">
          <text:p text:style-name="P8"><text:span text:style-name="T2">Выполнить интерполяцию температурного по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measurelines" svg:x1="34.25cm" svg:y1="20.6cm" svg:x2="34.25cm" svg:y2="22.6cm" draw:start-shape="id1" draw:start-glue-point="6" draw:end-shape="id2" draw:end-glue-point="4" svg:d="M34250 20600v2000" svg:viewBox="0 0 1 2001">
          <text:p/>
        </draw:connector>
        <draw:frame draw:style-name="gr7" draw:text-style-name="P11" draw:layer="measurelines" svg:width="1.27cm" svg:height="0.953cm" svg:x="15.932cm" svg:y="34.472cm">
          <draw:text-box>
            <text:p text:style-name="P10"><text:span text:style-name="T3">Да</text:span></text:p>
          </draw:text-box>
        </draw:frame>
        <draw:frame draw:style-name="gr8" draw:text-style-name="P12" draw:layer="measurelines" svg:width="1.563cm" svg:height="1.081cm" svg:x="20.902cm" svg:y="30.597cm">
          <draw:text-box>
            <text:p text:style-name="P10"><text:span text:style-name="T4">Нет</text:span></text:p>
          </draw:text-box>
        </draw:frame>
        <draw:frame draw:style-name="gr9" draw:text-style-name="P12" draw:layer="measurelines" svg:width="1.264cm" svg:height="0.827cm" svg:x="32.918cm" svg:y="20.812cm">
          <draw:text-box>
            <text:p text:style-name="P10"><text:span text:style-name="T4">Да</text:span></text:p>
          </draw:text-box>
        </draw:frame>
        <draw:connector draw:style-name="gr10" draw:text-style-name="P7" draw:layer="measurelines" svg:x1="38cm" svg:y1="18.1cm" svg:x2="44.25cm" svg:y2="22.6cm" draw:start-shape="id1" draw:start-glue-point="7" draw:end-shape="id3" draw:end-glue-point="4" svg:d="M38000 18100h6250v4500" svg:viewBox="0 0 6251 4501">
          <text:p/>
        </draw:connector>
        <draw:frame draw:style-name="gr11" draw:text-style-name="P12" draw:layer="measurelines" svg:width="1.454cm" svg:height="0.827cm" svg:x="37.857cm" svg:y="16.837cm">
          <draw:text-box>
            <text:p text:style-name="P10"><text:span text:style-name="T4">Нет</text:span></text:p>
          </draw:text-box>
        </draw:frame>
        <draw:custom-shape draw:style-name="gr2" draw:text-style-name="P4" xml:id="id3" draw:id="id3" draw:layer="measurelines" svg:width="7.5cm" svg:height="5cm" svg:x="40.5cm" svg:y="22.6cm">
          <text:p text:style-name="P13"><text:span text:style-name="T2">Построить градиент от темно-синего к темно-красном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measurelines" svg:width="7.5cm" svg:height="5cm" svg:x="30.5cm" svg:y="22.6cm">
          <text:p text:style-name="P3"><text:span text:style-name="T2">Вернуть исход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7" draw:layer="measurelines" svg:x1="21.002cm" svg:y1="32.1cm" svg:x2="27.55cm" svg:y2="36.5cm" draw:start-shape="id4" draw:start-glue-point="7" draw:end-shape="id5" draw:end-glue-point="4" svg:d="M21002 32100h6548v4400" svg:viewBox="0 0 6549 4401">
          <text:p/>
        </draw:connector>
        <draw:custom-shape draw:style-name="gr2" draw:text-style-name="P4" xml:id="id5" draw:id="id5" draw:layer="measurelines" svg:width="7.5cm" svg:height="5cm" svg:x="23.8cm" svg:y="36.5cm">
          <text:p text:style-name="P3"><text:span text:style-name="T2">Вернуть исход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17.25cm" svg:y1="41.6cm" svg:x2="17.25cm" svg:y2="43.601cm">
          <text:p/>
        </draw:line>
        <draw:line draw:style-name="gr4" draw:text-style-name="P7" draw:layer="layout" svg:x1="17.25cm" svg:y1="48.6cm" svg:x2="17.25cm" svg:y2="50.6cm">
          <text:p/>
        </draw:line>
        <draw:line draw:style-name="gr4" draw:text-style-name="P7" draw:layer="layout" svg:x1="17.25cm" svg:y1="55.6cm" svg:x2="17.25cm" svg:y2="57.601cm">
          <text:p/>
        </draw:line>
        <draw:custom-shape draw:style-name="gr12" draw:text-style-name="P15" draw:layer="layout" svg:width="2.5cm" svg:height="2.5cm" svg:x="33cm" svg:y="11.1cm">
          <text:p text:style-name="P14"><text:span text:style-name="T5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34.25cm" svg:y1="13.6cm" svg:x2="34.25cm" svg:y2="15.601cm">
          <text:p/>
        </draw:line>
        <draw:custom-shape draw:style-name="gr1" draw:text-style-name="P2" draw:layer="layout" svg:width="7.5cm" svg:height="2.5cm" svg:x="40.5cm" svg:y="68.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3" draw:text-style-name="P7" draw:layer="layout" svg:x1="27.55cm" svg:y1="62.3cm" svg:x2="44.25cm" svg:y2="62.3cm">
          <text:p/>
        </draw:line>
        <draw:line draw:style-name="gr4" draw:text-style-name="P7" draw:layer="layout" svg:x1="17.25cm" svg:y1="34.601cm" svg:x2="17.25cm" svg:y2="36.602cm">
          <text:p/>
        </draw:line>
        <draw:line draw:style-name="gr4" draw:text-style-name="P7" draw:layer="layout" svg:x1="17.25cm" svg:y1="62.601cm" svg:x2="17.25cm" svg:y2="64.602cm">
          <text:p/>
        </draw:line>
        <draw:custom-shape draw:style-name="gr2" draw:text-style-name="P4" draw:layer="layout" svg:width="7.5cm" svg:height="5cm" svg:x="40.5cm" svg:y="29.601cm">
          <text:p text:style-name="P13"><text:span text:style-name="T2">Сформировать RGB тепловую кар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7.5cm" svg:height="5cm" svg:x="40.5cm" svg:y="36.601cm">
          <text:p text:style-name="P13"><text:span text:style-name="T2">Наложить тепловую карту на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7.5cm" svg:height="5cm" svg:x="40.5cm" svg:y="43.601cm">
          <text:p text:style-name="P13"><text:span text:style-name="T2">Сохранить полученное изображ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7.5cm" svg:height="5cm" svg:x="40.5cm" svg:y="50.601cm">
          <text:p text:style-name="P16"><text:span text:style-name="T2">Передать изображение в интерф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44.25cm" svg:y1="34.601cm" svg:x2="44.25cm" svg:y2="36.602cm">
          <text:p/>
        </draw:line>
        <draw:line draw:style-name="gr4" draw:text-style-name="P7" draw:layer="layout" svg:x1="44.25cm" svg:y1="41.601cm" svg:x2="44.25cm" svg:y2="43.601cm">
          <text:p/>
        </draw:line>
        <draw:line draw:style-name="gr4" draw:text-style-name="P7" draw:layer="layout" svg:x1="44.25cm" svg:y1="48.601cm" svg:x2="44.25cm" svg:y2="50.602cm">
          <text:p/>
        </draw:line>
        <draw:line draw:style-name="gr4" draw:text-style-name="P7" draw:layer="layout" svg:x1="44.25cm" svg:y1="27.602cm" svg:x2="44.25cm" svg:y2="29.603cm">
          <text:p/>
        </draw:line>
        <draw:line draw:style-name="gr4" draw:text-style-name="P7" draw:layer="layout" svg:x1="44.25cm" svg:y1="55.602cm" svg:x2="44.25cm" svg:y2="68.802cm">
          <text:p/>
        </draw:line>
        <draw:line draw:style-name="gr4" draw:text-style-name="P7" draw:layer="layout" svg:x1="27.55cm" svg:y1="41.501cm" svg:x2="27.55cm" svg:y2="62.301cm">
          <text:p/>
        </draw:line>
        <draw:line draw:style-name="gr14" draw:text-style-name="P7" draw:layer="layout" svg:x1="34.25cm" svg:y1="27.601cm" svg:x2="34.25cm" svg:y2="62.301cm">
          <text:p/>
        </draw:line>
        <draw:custom-shape draw:style-name="gr12" draw:text-style-name="P15" draw:layer="layout" svg:width="2.5cm" svg:height="2.5cm" svg:x="16cm" svg:y="64.6cm">
          <text:p text:style-name="P14"><text:span text:style-name="T5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GOST type A" svg:font-family="'GOST type A'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en" style:country-complex="US"/>
    </style:style>
    <style:style style:name="heading_20_1" style:display-name="heading 1" style:family="graphic">
      <style:paragraph-properties fo:margin-top="0cm" fo:margin-bottom="1.344cm"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Tahoma" style:font-family-asian="Tahoma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cm" fo:margin-bottom="1.344cm"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076cm" fo:margin-bottom="1.344cm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cm" fo:margin-bottom="1.344cm" fo:line-height="150%" fo:text-align="center" style:text-autospace="none"/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fo:font-size="9pt" fo:font-weight="bold" style:font-size-asian="9pt" style:font-weight-asian="bold" style:font-size-complex="9pt" style:font-weight-complex="bold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language-asian="ru" style:country-asian="RU" style:font-name-complex="Times New Roman" style:font-family-complex="'Times New Roman'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56" style:display-name="ListLabel 5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57" style:display-name="ListLabel 5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58" style:display-name="ListLabel 5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59" style:display-name="ListLabel 5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60" style:display-name="ListLabel 6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61" style:display-name="ListLabel 6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62" style:display-name="ListLabel 6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63" style:display-name="ListLabel 6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1" style:display-name="ListLabel 2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2" style:display-name="ListLabel 2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3" style:display-name="ListLabel 2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4" style:display-name="ListLabel 2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5" style:display-name="ListLabel 2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6" style:display-name="ListLabel 2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7" style:display-name="ListLabel 2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4" style:display-name="ListLabel 7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5" style:display-name="ListLabel 7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6" style:display-name="ListLabel 7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7" style:display-name="ListLabel 7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8" style:display-name="ListLabel 7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79" style:display-name="ListLabel 7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0" style:display-name="ListLabel 8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1" style:display-name="ListLabel 8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3" style:display-name="ListLabel 8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4" style:display-name="ListLabel 8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5" style:display-name="ListLabel 8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6" style:display-name="ListLabel 8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7" style:display-name="ListLabel 8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8" style:display-name="ListLabel 8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89" style:display-name="ListLabel 8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90" style:display-name="ListLabel 9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91" style:display-name="ListLabel 91" style:family="graphic">
      <style:paragraph-properties style:text-autospace="none"/>
      <style:text-properties style:font-name="Calibri" fo:font-family="Calibri" style:font-family-generic="roman" style:font-pitch="variable" style:font-name-asian="Calibri" style:font-family-asian="Calibri" style:font-family-generic-asian="roman" style:font-pitch-asian="variable" style:font-name-complex="Calibri" style:font-family-complex="Calibri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9" style:display-name="ListLabel 99" style:family="graphic">
      <style:paragraph-properties style:text-autospace="none"/>
      <style:text-properties style:font-name="Calibri" fo:font-family="Calibri" style:font-family-generic="roman" style:font-pitch="variable" style:font-name-asian="Calibri" style:font-family-asian="Calibri" style:font-family-generic-asian="roman" style:font-pitch-asian="variable" style:font-name-complex="Calibri" style:font-family-complex="Calibri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1" style:display-name="ListLabel 10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2" style:display-name="ListLabel 10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3" style:display-name="ListLabel 10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4" style:display-name="ListLabel 10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5" style:display-name="ListLabel 10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6" style:display-name="ListLabel 10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7" style:display-name="ListLabel 10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08" style:display-name="ListLabel 10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28" style:display-name="ListLabel 2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" style:family="graphic">
      <style:paragraph-properties style:text-autospace="none"/>
      <style:text-properties fo:font-size="12pt" style:font-size-asian="12pt" style:font-name-complex="Lucida Sans1" style:font-family-complex="'Lucida Sans'" style:font-family-generic-complex="swiss" style:font-size-complex="12pt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644cm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ы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Содержимое_20_врезки" style:display-name="Содержимое врезки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text-align="center" style:text-autospace="none"/>
    </style:style>
    <style:style style:name="TOC_20_Heading" style:display-name="TOC Heading" style:family="graphic">
      <style:paragraph-properties fo:margin-left="0cm" fo:margin-right="0cm" fo:margin-top="0.762cm" fo:margin-bottom="1.344cm" fo:line-height="100%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2.63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Указатель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toc_20_2" style:display-name="toc 2" style:family="graphic">
      <style:paragraph-properties fo:margin-left="0cm" fo:margin-right="0cm" fo:line-height="150%" fo:text-indent="0cm" style:text-autospace="none" loext:tab-stop-distance="0cm">
        <style:tab-stops>
          <style:tab-stop style:position="31.754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Верхний_20_колонтитул_20_слева" style:display-name="Верхний колонтитул слева" style:family="graphic">
      <style:paragraph-properties style:text-autospace="none" loext:tab-stop-distance="0cm">
        <style:tab-stops>
          <style:tab-stop style:position="16.316cm" style:type="center"/>
          <style:tab-stop style:position="32.634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oc_20_3" style:display-name="toc 3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fo:font-size="9pt" fo:font-weight="bold" style:font-size-asian="9pt" style:font-weight-asian="bold" style:font-size-complex="9pt" style:font-weight-complex="bold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DejaVu Sans Mono" style:font-family-complex="'DejaVu Sans Mono'" style:font-family-generic-complex="modern" style:font-pitch-complex="fixed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</style:style>
    <style:style style:name="Standar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en" style:country-complex="US"/>
    </style:style>
    <style:style style:name="Text_20_body" style:display-name="Text body" style:family="graphic">
      <style:paragraph-properties fo:margin-left="0cm" fo:margin-right="0cm" fo:line-height="150%" fo:text-align="justify" fo:text-indent="2.207cm"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Содержимое_20_таблицы_20__28_user_29_" style:display-name="Содержимое таблицы (user)" style:family="graphic">
      <style:paragraph-properties style:text-autospace="none"/>
    </style:style>
    <style:style style:name="Отступы" style:family="graphic">
      <style:paragraph-properties fo:margin-left="8.821cm" fo:margin-right="0cm" fo:text-indent="-7.938cm" style:text-autospace="none" loext:tab-stop-distance="0cm">
        <style:tab-stops>
          <style:tab-stop style:position="8.821cm"/>
        </style:tab-stops>
      </style:paragraph-properties>
    </style:style>
    <style:style style:name="Body_20_Text_20_First_20_Indent" style:display-name="Body Text First Indent" style:family="graphic">
      <style:paragraph-properties fo:margin-left="0cm" fo:margin-right="0cm" fo:text-indent="0.88cm" style:text-autospace="none"/>
    </style:style>
    <style:style style:name="Рисунок_20_список" style:display-name="Рисунок список" style:family="graphic">
      <style:paragraph-properties style:text-autospace="none"/>
    </style:style>
    <style:style style:name="Комментарий" style:family="graphic">
      <style:paragraph-properties fo:margin-left="0.178cm" fo:margin-right="0.178cm" fo:margin-top="0.175cm" fo:margin-bottom="0cm" fo:line-height="100%" fo:text-indent="0cm" style:text-autospace="none"/>
      <style:text-properties style:use-window-font-color="true" loext:opacity="0%" fo:font-size="10pt" style:font-size-asian="10pt" style:font-size-complex="10pt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32.634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toc_20_5" style:display-name="toc 5" style:family="graphic">
      <style:paragraph-properties fo:margin-left="3.528cm" fo:margin-right="0cm" fo:text-indent="0cm" style:text-autospace="none" loext:tab-stop-distance="0cm">
        <style:tab-stops>
          <style:tab-stop style:position="32.634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Список_20_для_20_рисунков" style:display-name="Список для рисунков" style:family="graphic">
      <style:paragraph-properties fo:margin-left="0cm" fo:margin-right="0cm" fo:margin-top="0.441cm" fo:margin-bottom="0cm" fo:text-align="center" fo:text-indent="0cm" style:text-autospace="none"/>
    </style:style>
  </office:styles>
  <office:automatic-styles>
    <style:page-layout style:name="PM0">
      <style:page-layout-properties fo:margin-top="1.5cm" fo:margin-bottom="3cm" fo:margin-left="2.5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08T11:35:29.392535400</meta:creation-date>
    <dc:date>2026-06-16T08:30:50.275000000</dc:date>
    <meta:editing-duration>PT54M49S</meta:editing-duration>
    <meta:editing-cycles>11</meta:editing-cycles>
    <meta:generator>LibreOffice/24.2.0.3$Windows_X86_64 LibreOffice_project/da48488a73ddd66ea24cf16bbc4f7b9c08e9bea1</meta:generator>
    <meta:print-date>2026-06-15T20:09:32.502331900</meta:print-date>
    <meta:printed-by>Файлы PDF</meta:printed-by>
    <meta:document-statistic meta:object-count="43"/>
  </office:meta>
</office:document-meta>
</file>