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84cm" fo:min-width="7.59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draw:auto-grow-width="false" draw:fit-to-size="false" style:shrink-to-fit="false" fo:min-height="2.75cm" fo:min-width="4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vertical-align="bottom" draw:auto-grow-height="true" draw:auto-grow-width="false" fo:min-height="0.776cm" loext:decorative="false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5.75cm" fo:min-width="8.5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top" fo:padding-top="0.139cm" fo:padding-bottom="0.139cm" fo:padding-left="0.264cm" fo:padding-right="0.264cm" loext:decorative="false"/>
    </style:style>
    <style:style style:name="gr7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937cm" fo:min-width="0.002cm" loext:decorative="false"/>
    </style:style>
    <style:style style:name="gr8" style:family="graphic" style:parent-style-name="objectwithoutfill">
      <style:graphic-properties svg:stroke-width="0.028cm" svg:stroke-color="#000000" draw:marker-start-width="0.242cm" draw:marker-end="Стили_20_стрелок_20_3" draw:marker-end-width="0.342cm" draw:fill="none" draw:textarea-vertical-align="top" fo:padding-top="0.139cm" fo:padding-bottom="0.139cm" fo:padding-left="0.264cm" fo:padding-right="0.264cm" loext:decorative="false"/>
    </style:style>
    <style:style style:name="gr9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vertical-align="bottom" draw:auto-grow-height="true" draw:auto-grow-width="false" fo:min-height="1.655cm" loext:decorative="false"/>
      <style:paragraph-properties style:writing-mode="lr-tb"/>
    </style:style>
    <style:style style:name="gr10" style:family="graphic" style:parent-style-name="objectwithoutfill">
      <style:graphic-properties svg:stroke-width="0.028cm" svg:stroke-color="#000000" draw:marker-start-width="0.242cm" draw:marker-end="Стили_20_стрелок_20_1" draw:marker-end-width="0.342cm" draw:fill="none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P1" style:family="paragraph">
      <style:paragraph-properties fo:text-align="center"/>
      <style:text-properties style:font-name="GOST type A" fo:font-size="20pt" fo:font-style="italic" style:font-size-asian="20pt" style:font-size-complex="20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GOST type A" fo:font-size="20pt" fo:font-style="italic" style:font-size-asian="20pt" style:font-size-complex="20pt"/>
    </style:style>
    <style:style style:name="P3" style:family="paragraph">
      <loext:graphic-properties draw:fill="none"/>
      <style:paragraph-properties fo:text-align="center"/>
      <style:text-properties fo:font-style="italic"/>
    </style:style>
    <style:style style:name="P4" style:family="paragraph">
      <style:paragraph-properties fo:text-align="center"/>
      <style:text-properties style:font-name="GOST type A" fo:font-size="18pt" fo:font-style="italic" style:font-size-asian="18pt" style:font-size-complex="18p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GOST type A" fo:font-size="18pt" fo:font-style="italic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8" style:family="paragraph">
      <style:paragraph-properties fo:text-align="center"/>
      <style:text-properties style:font-name="GOST type A" fo:font-size="24pt" fo:font-style="italic" style:font-size-asian="24pt" style:font-size-complex="24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GOST type A" fo:font-size="24pt" fo:font-style="italic" style:font-size-asian="24pt" style:font-size-complex="24pt"/>
    </style:style>
    <style:style style:name="P10" style:family="paragraph">
      <style:paragraph-properties fo:text-align="center"/>
      <style:text-properties style:font-name="GOST type A" fo:font-size="22pt" fo:font-style="italic" style:font-size-asian="22pt" style:font-size-complex="22pt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GOST type A" fo:font-size="22pt" fo:font-style="italic" style:font-size-asian="22pt" style:font-size-complex="2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GOST type A" fo:font-size="14pt" fo:font-style="italic" style:font-size-asian="14pt" style:font-size-complex="14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GOST type A" fo:font-size="14pt" fo:font-style="italic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style:font-name="GOST type A" fo:font-style="italic"/>
    </style:style>
    <style:style style:name="P15" style:family="paragraph">
      <style:paragraph-properties fo:text-align="center"/>
      <style:text-properties style:font-name="GOST type A" fo:font-size="14pt" fo:font-style="italic" style:font-size-asian="14pt" style:font-size-complex="14pt"/>
    </style:style>
    <style:style style:name="P16" style:family="paragraph">
      <loext:graphic-properties draw:fill="solid" draw:fill-color="#ffffff"/>
      <style:paragraph-properties fo:text-align="center" style:writing-mode="lr-tb"/>
      <style:text-properties style:font-name="GOST type A" fo:font-size="14pt" fo:font-style="italic" style:font-size-asian="14pt" style:font-size-complex="14pt"/>
    </style:style>
    <style:style style:name="P17" style:family="paragraph">
      <loext:graphic-properties draw:fill="none" draw:fill-color="#ffffff"/>
      <style:text-properties fo:font-style="italic"/>
    </style:style>
    <style:style style:name="T1" style:family="text">
      <style:text-properties style:font-name="GOST type 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9cm" svg:height="3cm" svg:x="27.143cm" svg:y="4.135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31.643cm" svg:y1="7.135cm" svg:x2="31.643cm" svg:y2="9.135cm">
          <text:p/>
        </draw:line>
        <draw:custom-shape draw:style-name="gr3" draw:text-style-name="P5" xml:id="id1" draw:id="id1" draw:layer="layout" svg:width="9cm" svg:height="6cm" svg:x="27.143cm" svg:y="33.135cm">
          <text:p text:style-name="P4"><text:span text:style-name="T1">Точки получен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7" draw:layer="layout" svg:width="1.905cm" svg:height="1.026cm" svg:x="29.257cm" svg:y="39.661cm">
          <draw:text-box>
            <text:p text:style-name="P6"><text:span text:style-name="T1">Да</text:span></text:p>
          </draw:text-box>
        </draw:frame>
        <draw:custom-shape draw:style-name="gr5" draw:text-style-name="P9" draw:layer="layout" svg:width="9cm" svg:height="6cm" svg:x="27.143cm" svg:y="9.135cm">
          <text:p text:style-name="P8"><text:span text:style-name="T1">Создать каталог expo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1.643cm" svg:y1="15.135cm" svg:x2="31.643cm" svg:y2="17.135cm">
          <text:p/>
        </draw:line>
        <draw:custom-shape draw:style-name="gr5" draw:text-style-name="P11" draw:layer="layout" svg:width="9cm" svg:height="6cm" svg:x="27.143cm" svg:y="17.135cm">
          <text:p text:style-name="P10"><text:span text:style-name="T1">Сформировать имя файл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3" draw:layer="layout" svg:width="9cm" svg:height="6cm" svg:x="27.143cm" svg:y="25.135cm">
          <text:p text:style-name="P12"><text:span text:style-name="T1">Получить точки сесси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1.643cm" svg:y1="23.135cm" svg:x2="31.643cm" svg:y2="25.135cm">
          <text:p/>
        </draw:line>
        <draw:line draw:style-name="gr2" draw:text-style-name="P3" draw:layer="layout" svg:x1="31.643cm" svg:y1="31.135cm" svg:x2="31.643cm" svg:y2="33.135cm">
          <text:p/>
        </draw:line>
        <draw:connector draw:style-name="gr6" draw:text-style-name="P14" draw:layer="layout" svg:x1="31.643cm" svg:y1="39.135cm" svg:x2="31.645cm" svg:y2="41.135cm" draw:start-shape="id1" draw:start-glue-point="6" draw:end-shape="id2" draw:end-glue-point="4" svg:d="M31643 39135v1001h2v999" svg:viewBox="0 0 3 2001">
          <text:p/>
        </draw:connector>
        <draw:custom-shape draw:style-name="gr5" draw:text-style-name="P16" xml:id="id2" draw:id="id2" draw:layer="layout" svg:width="9cm" svg:height="6cm" svg:x="27.145cm" svg:y="41.135cm">
          <text:p text:style-name="P15"><text:span text:style-name="T1">Создать DataFrame из списка записе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17" draw:layer="layout" svg:width="0.502cm" svg:height="1.187cm" svg:x="23.638cm" svg:y="5.985cm">
          <draw:text-box>
            <text:p/>
          </draw:text-box>
        </draw:frame>
        <draw:line draw:style-name="gr2" draw:text-style-name="P3" draw:layer="layout" svg:x1="31.643cm" svg:y1="47.135cm" svg:x2="31.643cm" svg:y2="49.135cm">
          <text:p/>
        </draw:line>
        <draw:custom-shape draw:style-name="gr5" draw:text-style-name="P16" draw:layer="layout" svg:width="9cm" svg:height="6cm" svg:x="27.145cm" svg:y="49.135cm">
          <text:p text:style-name="P15"><text:span text:style-name="T1">Записать файл *.cs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1.643cm" svg:y1="55.135cm" svg:x2="31.643cm" svg:y2="57.135cm">
          <text:p/>
        </draw:line>
        <draw:custom-shape draw:style-name="gr5" draw:text-style-name="P16" draw:layer="layout" svg:width="9cm" svg:height="6cm" svg:x="27.145cm" svg:y="57.135cm">
          <text:p text:style-name="P15"><text:span text:style-name="T1">Закрыть и сохранить файл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1.643cm" svg:y1="63.135cm" svg:x2="31.643cm" svg:y2="65.135cm">
          <text:p/>
        </draw:line>
        <draw:custom-shape draw:style-name="gr5" draw:text-style-name="P16" draw:layer="layout" svg:width="9cm" svg:height="6cm" svg:x="27.145cm" svg:y="65.135cm">
          <text:p text:style-name="P15"><text:span text:style-name="T1">Вывести сообщение о сохранении файл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4" draw:layer="layout" svg:x1="36.143cm" svg:y1="36.135cm" svg:x2="46.145cm" svg:y2="41.135cm" draw:start-shape="id1" draw:start-glue-point="7" draw:end-shape="id3" draw:end-glue-point="4" svg:d="M36143 36135h10002v5000" svg:viewBox="0 0 10003 5001">
          <text:p/>
        </draw:connector>
        <draw:custom-shape draw:style-name="gr5" draw:text-style-name="P16" xml:id="id3" draw:id="id3" draw:layer="layout" svg:width="9cm" svg:height="6cm" svg:x="41.645cm" svg:y="41.135cm">
          <text:p text:style-name="P15"><text:span text:style-name="T1">Вывести сообщение об отсутствии данных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9cm" svg:height="3cm" svg:x="41.643cm" svg:y="75.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7" draw:layer="layout" svg:width="3.81cm" svg:height="1.905cm" svg:x="36.103cm" svg:y="34.283cm">
          <draw:text-box>
            <text:p text:style-name="P6"><text:span text:style-name="T1">Нет</text:span></text:p>
          </draw:text-box>
        </draw:frame>
        <draw:line draw:style-name="gr2" draw:text-style-name="P3" draw:layer="layout" svg:x1="46.15cm" svg:y1="47.15cm" svg:x2="46.15cm" svg:y2="75.6cm">
          <text:p/>
        </draw:line>
        <draw:line draw:style-name="gr10" draw:text-style-name="P3" draw:layer="layout" svg:x1="31.643cm" svg:y1="73.335cm" svg:x2="46.143cm" svg:y2="73.335cm">
          <text:p/>
        </draw:line>
        <draw:line draw:style-name="gr11" draw:text-style-name="P3" draw:layer="layout" svg:x1="31.643cm" svg:y1="71.135cm" svg:x2="31.643cm" svg:y2="73.3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8T11:35:29.392535400</meta:creation-date>
    <dc:date>2026-06-16T15:55:40.995297300</dc:date>
    <meta:editing-duration>PT48M24S</meta:editing-duration>
    <meta:editing-cycles>11</meta:editing-cycles>
    <meta:generator>LibreOffice/26.2.3.2$Windows_X86_64 LibreOffice_project/70e089b17412e4cb7773e41413306b17a2328c34</meta:generator>
    <meta:document-statistic meta:object-count="26"/>
  </office:meta>
</office:document-meta>
</file>