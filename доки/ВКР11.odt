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20" manifest:media-type=""/>
  <manifest:file-entry manifest:full-path="ObjectReplacements/Object 2" manifest:media-type=""/>
  <manifest:file-entry manifest:full-path="ObjectReplacements/Object 31" manifest:media-type=""/>
  <manifest:file-entry manifest:full-path="ObjectReplacements/Object 32" manifest:media-type=""/>
  <manifest:file-entry manifest:full-path="ObjectReplacements/Object 23" manifest:media-type=""/>
  <manifest:file-entry manifest:full-path="ObjectReplacements/Object 1" manifest:media-type=""/>
  <manifest:file-entry manifest:full-path="ObjectReplacements/Object 33" manifest:media-type=""/>
  <manifest:file-entry manifest:full-path="ObjectReplacements/Object 21" manifest:media-type=""/>
  <manifest:file-entry manifest:full-path="ObjectReplacements/Object 3" manifest:media-type=""/>
  <manifest:file-entry manifest:full-path="ObjectReplacements/Object 34" manifest:media-type=""/>
  <manifest:file-entry manifest:full-path="ObjectReplacements/Object 26" manifest:media-type=""/>
  <manifest:file-entry manifest:full-path="ObjectReplacements/Object 4" manifest:media-type=""/>
  <manifest:file-entry manifest:full-path="ObjectReplacements/Object 27" manifest:media-type=""/>
  <manifest:file-entry manifest:full-path="ObjectReplacements/Object 5" manifest:media-type=""/>
  <manifest:file-entry manifest:full-path="ObjectReplacements/Object 24" manifest:media-type=""/>
  <manifest:file-entry manifest:full-path="ObjectReplacements/Object 6" manifest:media-type=""/>
  <manifest:file-entry manifest:full-path="ObjectReplacements/Object 25"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2"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settings.xml" manifest:media-type="text/xml"/>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10000014A000000992A370071.png" manifest:media-type="image/png"/>
  <manifest:file-entry manifest:full-path="Pictures/10000001000004AF000003E8DEAAB704.png" manifest:media-type="image/png"/>
  <manifest:file-entry manifest:full-path="Pictures/10000000000003A500000089902A4286.png" manifest:media-type="image/png"/>
  <manifest:file-entry manifest:full-path="Pictures/10000001000004AE000003E95BDD973F.png" manifest:media-type="image/png"/>
  <manifest:file-entry manifest:full-path="Pictures/10000000000003F4000007E81DBAE21E.jpg" manifest:media-type="image/jpeg"/>
  <manifest:file-entry manifest:full-path="Pictures/10000000000003F0000007E1C2B4F1A4.jpg" manifest:media-type="image/jpeg"/>
  <manifest:file-entry manifest:full-path="Pictures/10000001000001490000039D5787A3FB.png" manifest:media-type="image/png"/>
  <manifest:file-entry manifest:full-path="Pictures/100000010000016C0000009959E50271.png" manifest:media-type="image/png"/>
  <manifest:file-entry manifest:full-path="Pictures/10000001000002BF00000212D3C953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OST type A" svg:font-family="'GOST type A'" style:font-family-generic="swiss"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Таблица1" style:family="table">
      <style:table-properties style:width="167.53mm" fo:margin-left="-5.01mm" fo:margin-top="0mm" fo:margin-bottom="0mm" table:align="left" style:writing-mode="lr-tb"/>
    </style:style>
    <style:style style:name="Таблица1.A" style:family="table-column">
      <style:table-column-properties style:column-width="18.61mm"/>
    </style:style>
    <style:style style:name="Таблица1.B" style:family="table-column">
      <style:table-column-properties style:column-width="111.42mm"/>
    </style:style>
    <style:style style:name="Таблица1.C" style:family="table-column">
      <style:table-column-properties style:column-width="37.5mm"/>
    </style:style>
    <style:style style:name="Таблица1.1" style:family="table-row">
      <style:table-row-properties fo:keep-together="auto"/>
    </style:style>
    <style:style style:name="Таблица1.A1" style:family="table-cell">
      <style:table-cell-properties style:vertical-align="middle" fo:padding-left="1.91mm" fo:padding-right="1.91mm" fo:padding-top="0mm" fo:padding-bottom="0mm" fo:border="0.5pt solid #000000" style:writing-mode="lr-tb"/>
    </style:style>
    <style:style style:name="Таблица1.B2" style:family="table-cell">
      <style:table-cell-properties fo:padding-left="1.91mm" fo:padding-right="1.91mm" fo:padding-top="0mm" fo:padding-bottom="0mm" fo:border="0.5pt solid #000000" style:writing-mode="lr-tb"/>
    </style:style>
    <style:style style:name="Таблица1.C2" style:family="table-cell">
      <style:table-cell-properties fo:padding-left="1.91mm" fo:padding-right="1.91mm" fo:padding-top="0mm" fo:padding-bottom="0mm" fo:border="0.5pt solid #000000" style:writing-mode="lr-tb"/>
    </style:style>
    <style:style style:name="Таблица1.B3" style:family="table-cell">
      <style:table-cell-properties fo:padding-left="1.91mm" fo:padding-right="1.91mm" fo:padding-top="0mm" fo:padding-bottom="0mm" fo:border="0.5pt solid #000000" style:writing-mode="lr-tb"/>
    </style:style>
    <style:style style:name="Таблица1.C3" style:family="table-cell">
      <style:table-cell-properties fo:padding-left="1.91mm" fo:padding-right="1.91mm" fo:padding-top="0mm" fo:padding-bottom="0mm" fo:border="0.5pt solid #000000" style:writing-mode="lr-tb"/>
    </style:style>
    <style:style style:name="Таблица1.B4" style:family="table-cell">
      <style:table-cell-properties fo:padding-left="1.91mm" fo:padding-right="1.91mm" fo:padding-top="0mm" fo:padding-bottom="0mm" fo:border="0.5pt solid #000000" style:writing-mode="lr-tb"/>
    </style:style>
    <style:style style:name="Таблица1.C4" style:family="table-cell">
      <style:table-cell-properties fo:padding-left="1.91mm" fo:padding-right="1.91mm" fo:padding-top="0mm" fo:padding-bottom="0mm" fo:border="0.5pt solid #000000" style:writing-mode="lr-tb"/>
    </style:style>
    <style:style style:name="Таблица1.B5" style:family="table-cell">
      <style:table-cell-properties fo:padding-left="1.91mm" fo:padding-right="1.91mm" fo:padding-top="0mm" fo:padding-bottom="0mm" fo:border="0.5pt solid #000000" style:writing-mode="lr-tb"/>
    </style:style>
    <style:style style:name="Таблица1.C5" style:family="table-cell">
      <style:table-cell-properties fo:padding-left="1.91mm" fo:padding-right="1.91mm" fo:padding-top="0mm" fo:padding-bottom="0mm" fo:border="0.5pt solid #000000" style:writing-mode="lr-tb"/>
    </style:style>
    <style:style style:name="Таблица1.B6" style:family="table-cell">
      <style:table-cell-properties fo:padding-left="1.91mm" fo:padding-right="1.91mm" fo:padding-top="0mm" fo:padding-bottom="0mm" fo:border="0.5pt solid #000000" style:writing-mode="lr-tb"/>
    </style:style>
    <style:style style:name="Таблица1.C6" style:family="table-cell">
      <style:table-cell-properties fo:padding-left="1.91mm" fo:padding-right="1.91mm" fo:padding-top="0mm" fo:padding-bottom="0mm" fo:border="0.5pt solid #000000" style:writing-mode="lr-tb"/>
    </style:style>
    <style:style style:name="Таблица1.B7" style:family="table-cell">
      <style:table-cell-properties fo:padding-left="1.91mm" fo:padding-right="1.91mm" fo:padding-top="0mm" fo:padding-bottom="0mm" fo:border="0.5pt solid #000000" style:writing-mode="lr-tb"/>
    </style:style>
    <style:style style:name="Таблица1.C7" style:family="table-cell">
      <style:table-cell-properties fo:padding-left="1.91mm" fo:padding-right="1.91mm" fo:padding-top="0mm" fo:padding-bottom="0mm" fo:border="0.5pt solid #000000" style:writing-mode="lr-tb"/>
    </style:style>
    <style:style style:name="Таблица1.B8" style:family="table-cell">
      <style:table-cell-properties fo:padding-left="1.91mm" fo:padding-right="1.91mm" fo:padding-top="0mm" fo:padding-bottom="0mm" fo:border="0.5pt solid #000000" style:writing-mode="lr-tb"/>
    </style:style>
    <style:style style:name="Таблица1.C8" style:family="table-cell">
      <style:table-cell-properties fo:padding-left="1.91mm" fo:padding-right="1.91mm" fo:padding-top="0mm" fo:padding-bottom="0mm" fo:border="0.5pt solid #000000" style:writing-mode="lr-tb"/>
    </style:style>
    <style:style style:name="Таблица1.B9" style:family="table-cell">
      <style:table-cell-properties fo:padding-left="1.91mm" fo:padding-right="1.91mm" fo:padding-top="0mm" fo:padding-bottom="0mm" fo:border="0.5pt solid #000000" style:writing-mode="lr-tb"/>
    </style:style>
    <style:style style:name="Таблица1.C9" style:family="table-cell">
      <style:table-cell-properties fo:padding-left="1.91mm" fo:padding-right="1.91mm" fo:padding-top="0mm" fo:padding-bottom="0mm" fo:border="0.5pt solid #000000" style:writing-mode="lr-tb"/>
    </style:style>
    <style:style style:name="Таблица1.B10" style:family="table-cell">
      <style:table-cell-properties fo:padding-left="1.91mm" fo:padding-right="1.91mm" fo:padding-top="0mm" fo:padding-bottom="0mm" fo:border="0.5pt solid #000000" style:writing-mode="lr-tb"/>
    </style:style>
    <style:style style:name="Таблица1.C10" style:family="table-cell">
      <style:table-cell-properties fo:padding-left="1.91mm" fo:padding-right="1.91mm" fo:padding-top="0mm" fo:padding-bottom="0mm" fo:border="0.5pt solid #000000" style:writing-mode="lr-tb"/>
    </style:style>
    <style:style style:name="Таблица1.B11" style:family="table-cell">
      <style:table-cell-properties fo:padding-left="1.91mm" fo:padding-right="1.91mm" fo:padding-top="0mm" fo:padding-bottom="0mm" fo:border="0.5pt solid #000000" style:writing-mode="lr-tb"/>
    </style:style>
    <style:style style:name="Таблица1.C11" style:family="table-cell">
      <style:table-cell-properties fo:padding-left="1.91mm" fo:padding-right="1.91mm" fo:padding-top="0mm" fo:padding-bottom="0mm" fo:border="0.5pt solid #000000" style:writing-mode="lr-tb"/>
    </style:style>
    <style:style style:name="Таблица1.B12" style:family="table-cell">
      <style:table-cell-properties fo:padding-left="1.91mm" fo:padding-right="1.91mm" fo:padding-top="0mm" fo:padding-bottom="0mm" fo:border="0.5pt solid #000000" style:writing-mode="lr-tb"/>
    </style:style>
    <style:style style:name="Таблица1.C12" style:family="table-cell">
      <style:table-cell-properties fo:padding-left="1.91mm" fo:padding-right="1.91mm" fo:padding-top="0mm" fo:padding-bottom="0mm" fo:border="0.5pt solid #000000" style:writing-mode="lr-tb"/>
    </style:style>
    <style:style style:name="Таблица1.B13" style:family="table-cell">
      <style:table-cell-properties fo:padding-left="1.91mm" fo:padding-right="1.91mm" fo:padding-top="0mm" fo:padding-bottom="0mm" fo:border="0.5pt solid #000000" style:writing-mode="lr-tb"/>
    </style:style>
    <style:style style:name="Таблица1.C13" style:family="table-cell">
      <style:table-cell-properties fo:padding-left="1.91mm" fo:padding-right="1.91mm" fo:padding-top="0mm" fo:padding-bottom="0mm" fo:border="0.5pt solid #000000" style:writing-mode="lr-tb"/>
    </style:style>
    <style:style style:name="Таблица2" style:family="table">
      <style:table-properties style:width="167.53mm" fo:margin-left="-5.01mm" fo:margin-top="0mm" fo:margin-bottom="0mm" table:align="left" style:writing-mode="lr-tb"/>
    </style:style>
    <style:style style:name="Таблица2.A" style:family="table-column">
      <style:table-column-properties style:column-width="52.51mm"/>
    </style:style>
    <style:style style:name="Таблица2.B" style:family="table-column">
      <style:table-column-properties style:column-width="47.52mm"/>
    </style:style>
    <style:style style:name="Таблица2.C" style:family="table-column">
      <style:table-column-properties style:column-width="35mm"/>
    </style:style>
    <style:style style:name="Таблица2.D" style:family="table-column">
      <style:table-column-properties style:column-width="32.51mm"/>
    </style:style>
    <style:style style:name="Таблица2.1" style:family="table-row">
      <style:table-row-properties fo:keep-together="auto"/>
    </style:style>
    <style:style style:name="Таблица2.A1" style:family="table-cell">
      <style:table-cell-properties style:vertical-align="middle" fo:padding-left="1.91mm" fo:padding-right="1.91mm" fo:padding-top="0mm" fo:padding-bottom="0mm" fo:border="0.5pt solid #000000" style:writing-mode="lr-tb"/>
    </style:style>
    <style:style style:name="Таблица2.A3" style:family="table-cell">
      <style:table-cell-properties fo:padding-left="1.91mm" fo:padding-right="1.91mm" fo:padding-top="0mm" fo:padding-bottom="0mm" fo:border="0.5pt solid #000000" style:writing-mode="lr-tb"/>
    </style:style>
    <style:style style:name="Таблица2.B3" style:family="table-cell">
      <style:table-cell-properties fo:padding-left="1.91mm" fo:padding-right="1.91mm" fo:padding-top="0mm" fo:padding-bottom="0mm" fo:border="0.5pt solid #000000" style:writing-mode="lr-tb"/>
    </style:style>
    <style:style style:name="Таблица2.C3" style:family="table-cell">
      <style:table-cell-properties fo:padding-left="1.91mm" fo:padding-right="1.91mm" fo:padding-top="0mm" fo:padding-bottom="0mm" fo:border="0.5pt solid #000000" style:writing-mode="lr-tb"/>
    </style:style>
    <style:style style:name="Таблица2.D3" style:family="table-cell">
      <style:table-cell-properties fo:padding-left="1.91mm" fo:padding-right="1.91mm" fo:padding-top="0mm" fo:padding-bottom="0mm" fo:border="0.5pt solid #000000" style:writing-mode="lr-tb"/>
    </style:style>
    <style:style style:name="Таблица2.A4" style:family="table-cell">
      <style:table-cell-properties fo:padding-left="1.91mm" fo:padding-right="1.91mm" fo:padding-top="0mm" fo:padding-bottom="0mm" fo:border="0.5pt solid #000000" style:writing-mode="lr-tb"/>
    </style:style>
    <style:style style:name="Таблица2.B4" style:family="table-cell">
      <style:table-cell-properties fo:padding-left="1.91mm" fo:padding-right="1.91mm" fo:padding-top="0mm" fo:padding-bottom="0mm" fo:border="0.5pt solid #000000" style:writing-mode="lr-tb"/>
    </style:style>
    <style:style style:name="Таблица2.C4" style:family="table-cell">
      <style:table-cell-properties fo:padding-left="1.91mm" fo:padding-right="1.91mm" fo:padding-top="0mm" fo:padding-bottom="0mm" fo:border="0.5pt solid #000000" style:writing-mode="lr-tb"/>
    </style:style>
    <style:style style:name="Таблица2.D4" style:family="table-cell">
      <style:table-cell-properties fo:padding-left="1.91mm" fo:padding-right="1.91mm" fo:padding-top="0mm" fo:padding-bottom="0mm" fo:border="0.5pt solid #000000" style:writing-mode="lr-tb"/>
    </style:style>
    <style:style style:name="Таблица3" style:family="table">
      <style:table-properties style:width="174.82mm" fo:margin-top="0mm" fo:margin-bottom="0mm" table:align="center" style:writing-mode="lr-tb"/>
    </style:style>
    <style:style style:name="Таблица3.A" style:family="table-column">
      <style:table-column-properties style:column-width="40.3mm"/>
    </style:style>
    <style:style style:name="Таблица3.B" style:family="table-column">
      <style:table-column-properties style:column-width="42.86mm"/>
    </style:style>
    <style:style style:name="Таблица3.C" style:family="table-column">
      <style:table-column-properties style:column-width="29.33mm"/>
    </style:style>
    <style:style style:name="Таблица3.D" style:family="table-column">
      <style:table-column-properties style:column-width="25.36mm"/>
    </style:style>
    <style:style style:name="Таблица3.E" style:family="table-column">
      <style:table-column-properties style:column-width="36.95mm"/>
    </style:style>
    <style:style style:name="Таблица3.1" style:family="table-row">
      <style:table-row-properties style:min-row-height="8.01mm" fo:keep-together="auto"/>
    </style:style>
    <style:style style:name="Таблица3.A1" style:family="table-cell">
      <style:table-cell-properties style:vertical-align="middle" fo:padding-left="1.91mm" fo:padding-right="1.91mm" fo:padding-top="0mm" fo:padding-bottom="0mm" fo:border="0.5pt solid #000000" style:writing-mode="lr-tb"/>
    </style:style>
    <style:style style:name="Таблица4" style:family="table">
      <style:table-properties style:width="174.94mm" fo:margin-left="0.09mm" fo:margin-top="0mm" fo:margin-bottom="0mm" table:align="left" style:writing-mode="lr-tb"/>
    </style:style>
    <style:style style:name="Таблица4.A" style:family="table-column">
      <style:table-column-properties style:column-width="17.41mm"/>
    </style:style>
    <style:style style:name="Таблица4.B" style:family="table-column">
      <style:table-column-properties style:column-width="65.02mm"/>
    </style:style>
    <style:style style:name="Таблица4.C" style:family="table-column">
      <style:table-column-properties style:column-width="92.52mm"/>
    </style:style>
    <style:style style:name="Таблица4.1" style:family="table-row">
      <style:table-row-properties fo:keep-together="auto"/>
    </style:style>
    <style:style style:name="Таблица4.A1" style:family="table-cell">
      <style:table-cell-properties style:vertical-align="middle" fo:padding-left="1.91mm" fo:padding-right="1.91mm" fo:padding-top="0mm" fo:padding-bottom="0mm" fo:border="0.5pt solid #000000" style:writing-mode="lr-tb"/>
    </style:style>
    <style:style style:name="Таблица4.2" style:family="table-row">
      <style:table-row-properties style:min-row-height="8.01mm" fo:keep-together="auto"/>
    </style:style>
    <style:style style:name="Таблица5" style:family="table">
      <style:table-properties style:width="174.94mm" fo:margin-left="0.09mm" fo:margin-top="0mm" fo:margin-bottom="0mm" table:align="left" style:writing-mode="lr-tb"/>
    </style:style>
    <style:style style:name="Таблица5.A" style:family="table-column">
      <style:table-column-properties style:column-width="17.41mm"/>
    </style:style>
    <style:style style:name="Таблица5.B" style:family="table-column">
      <style:table-column-properties style:column-width="65mm"/>
    </style:style>
    <style:style style:name="Таблица5.C" style:family="table-column">
      <style:table-column-properties style:column-width="41.2mm"/>
    </style:style>
    <style:style style:name="Таблица5.D" style:family="table-column">
      <style:table-column-properties style:column-width="51.33mm"/>
    </style:style>
    <style:style style:name="Таблица5.1" style:family="table-row">
      <style:table-row-properties fo:keep-together="auto"/>
    </style:style>
    <style:style style:name="Таблица5.A1" style:family="table-cell">
      <style:table-cell-properties style:vertical-align="middle" fo:padding-left="1.91mm" fo:padding-right="1.91mm" fo:padding-top="0mm" fo:padding-bottom="0mm" fo:border="0.5pt solid #000000" style:writing-mode="lr-tb"/>
    </style:style>
    <style:style style:name="Таблица5.2" style:family="table-row">
      <style:table-row-properties style:min-row-height="8.01mm" fo:keep-together="auto"/>
    </style:style>
    <style:style style:name="Таблица6" style:family="table">
      <style:table-properties style:width="174.94mm" fo:margin-left="0.09mm" fo:margin-top="0mm" fo:margin-bottom="0mm" table:align="left" style:writing-mode="lr-tb"/>
    </style:style>
    <style:style style:name="Таблица6.A" style:family="table-column">
      <style:table-column-properties style:column-width="17.41mm"/>
    </style:style>
    <style:style style:name="Таблица6.B" style:family="table-column">
      <style:table-column-properties style:column-width="65mm"/>
    </style:style>
    <style:style style:name="Таблица6.C" style:family="table-column">
      <style:table-column-properties style:column-width="41.2mm"/>
    </style:style>
    <style:style style:name="Таблица6.D" style:family="table-column">
      <style:table-column-properties style:column-width="51.33mm"/>
    </style:style>
    <style:style style:name="Таблица6.1" style:family="table-row">
      <style:table-row-properties fo:keep-together="auto"/>
    </style:style>
    <style:style style:name="Таблица6.A1" style:family="table-cell">
      <style:table-cell-properties style:vertical-align="middle" fo:padding-left="1.91mm" fo:padding-right="1.91mm" fo:padding-top="0mm" fo:padding-bottom="0mm" fo:border="0.5pt solid #000000" style:writing-mode="lr-tb"/>
    </style:style>
    <style:style style:name="Таблица6.2" style:family="table-row">
      <style:table-row-properties style:min-row-height="8.01mm" fo:keep-together="auto"/>
    </style:style>
    <style:style style:name="Таблица7" style:family="table">
      <style:table-properties style:width="174.94mm" fo:margin-left="0.09mm" fo:margin-top="0mm" fo:margin-bottom="0mm" table:align="left" style:writing-mode="lr-tb"/>
    </style:style>
    <style:style style:name="Таблица7.A" style:family="table-column">
      <style:table-column-properties style:column-width="17.41mm"/>
    </style:style>
    <style:style style:name="Таблица7.B" style:family="table-column">
      <style:table-column-properties style:column-width="65mm"/>
    </style:style>
    <style:style style:name="Таблица7.C" style:family="table-column">
      <style:table-column-properties style:column-width="41.2mm"/>
    </style:style>
    <style:style style:name="Таблица7.D" style:family="table-column">
      <style:table-column-properties style:column-width="51.33mm"/>
    </style:style>
    <style:style style:name="Таблица7.1" style:family="table-row">
      <style:table-row-properties fo:keep-together="auto"/>
    </style:style>
    <style:style style:name="Таблица7.A1" style:family="table-cell">
      <style:table-cell-properties style:vertical-align="middle" fo:padding-left="1.91mm" fo:padding-right="1.91mm" fo:padding-top="0mm" fo:padding-bottom="0mm" fo:border="0.5pt solid #000000" style:writing-mode="lr-tb"/>
    </style:style>
    <style:style style:name="Таблица7.2" style:family="table-row">
      <style:table-row-properties style:min-row-height="8.01mm" fo:keep-together="auto"/>
    </style:style>
    <style:style style:name="Таблица8" style:family="table">
      <style:table-properties style:width="174.82mm" fo:margin-left="0.09mm" fo:margin-top="0mm" fo:margin-bottom="0mm" table:align="left" style:writing-mode="lr-tb"/>
    </style:style>
    <style:style style:name="Таблица8.A" style:family="table-column">
      <style:table-column-properties style:column-width="9.9mm"/>
    </style:style>
    <style:style style:name="Таблица8.B" style:family="table-column">
      <style:table-column-properties style:column-width="44.54mm"/>
    </style:style>
    <style:style style:name="Таблица8.C" style:family="table-column">
      <style:table-column-properties style:column-width="35.77mm"/>
    </style:style>
    <style:style style:name="Таблица8.D" style:family="table-column">
      <style:table-column-properties style:column-width="34.73mm"/>
    </style:style>
    <style:style style:name="Таблица8.E" style:family="table-column">
      <style:table-column-properties style:column-width="49.88mm"/>
    </style:style>
    <style:style style:name="Таблица8.1" style:family="table-row">
      <style:table-row-properties fo:keep-together="auto"/>
    </style:style>
    <style:style style:name="Таблица8.A1" style:family="table-cell">
      <style:table-cell-properties style:vertical-align="middle" fo:padding-left="1.91mm" fo:padding-right="1.91mm" fo:padding-top="0mm" fo:padding-bottom="0mm" fo:border="0.5pt solid #000000" style:writing-mode="lr-tb"/>
    </style:style>
    <style:style style:name="Таблица8.2" style:family="table-row">
      <style:table-row-properties style:min-row-height="8.01mm" fo:keep-together="auto"/>
    </style:style>
    <style:style style:name="Таблица9" style:family="table">
      <style:table-properties style:width="174.82mm" fo:margin-left="0.09mm" fo:margin-top="0mm" fo:margin-bottom="0mm" table:align="left" style:writing-mode="lr-tb"/>
    </style:style>
    <style:style style:name="Таблица9.A" style:family="table-column">
      <style:table-column-properties style:column-width="9.82mm"/>
    </style:style>
    <style:style style:name="Таблица9.B" style:family="table-column">
      <style:table-column-properties style:column-width="43.69mm"/>
    </style:style>
    <style:style style:name="Таблица9.C" style:family="table-column">
      <style:table-column-properties style:column-width="38.05mm"/>
    </style:style>
    <style:style style:name="Таблица9.D" style:family="table-column">
      <style:table-column-properties style:column-width="33.37mm"/>
    </style:style>
    <style:style style:name="Таблица9.E" style:family="table-column">
      <style:table-column-properties style:column-width="49.88mm"/>
    </style:style>
    <style:style style:name="Таблица9.1" style:family="table-row">
      <style:table-row-properties style:min-row-height="8.01mm" fo:keep-together="auto"/>
    </style:style>
    <style:style style:name="Таблица9.A1" style:family="table-cell">
      <style:table-cell-properties style:vertical-align="middle" fo:padding-left="1.91mm" fo:padding-right="1.91mm" fo:padding-top="0mm" fo:padding-bottom="0mm" fo:border="0.5pt solid #000000" style:writing-mode="lr-tb"/>
    </style:style>
    <style:style style:name="Таблица10" style:family="table">
      <style:table-properties style:width="174.82mm" fo:margin-left="0.09mm" fo:margin-top="0mm" fo:margin-bottom="0mm" table:align="left" style:writing-mode="lr-tb"/>
    </style:style>
    <style:style style:name="Таблица10.A" style:family="table-column">
      <style:table-column-properties style:column-width="9.82mm"/>
    </style:style>
    <style:style style:name="Таблица10.B" style:family="table-column">
      <style:table-column-properties style:column-width="43.69mm"/>
    </style:style>
    <style:style style:name="Таблица10.C" style:family="table-column">
      <style:table-column-properties style:column-width="38.05mm"/>
    </style:style>
    <style:style style:name="Таблица10.D" style:family="table-column">
      <style:table-column-properties style:column-width="33.37mm"/>
    </style:style>
    <style:style style:name="Таблица10.E" style:family="table-column">
      <style:table-column-properties style:column-width="49.88mm"/>
    </style:style>
    <style:style style:name="Таблица10.1" style:family="table-row">
      <style:table-row-properties style:min-row-height="8.01mm" fo:keep-together="auto"/>
    </style:style>
    <style:style style:name="Таблица10.A1" style:family="table-cell">
      <style:table-cell-properties style:vertical-align="middle" fo:padding-left="1.91mm" fo:padding-right="1.91mm" fo:padding-top="0mm" fo:padding-bottom="0mm" fo:border="0.5pt solid #000000" style:writing-mode="lr-tb"/>
    </style:style>
    <style:style style:name="Таблица11" style:family="table">
      <style:table-properties style:width="174.82mm" fo:margin-left="0.09mm" fo:margin-top="0mm" fo:margin-bottom="0mm" table:align="left" style:writing-mode="lr-tb"/>
    </style:style>
    <style:style style:name="Таблица11.A" style:family="table-column">
      <style:table-column-properties style:column-width="12.4mm"/>
    </style:style>
    <style:style style:name="Таблица11.B" style:family="table-column">
      <style:table-column-properties style:column-width="57.52mm"/>
    </style:style>
    <style:style style:name="Таблица11.C" style:family="table-column">
      <style:table-column-properties style:column-width="104.9mm"/>
    </style:style>
    <style:style style:name="Таблица11.1" style:family="table-row">
      <style:table-row-properties fo:keep-together="auto"/>
    </style:style>
    <style:style style:name="Таблица11.A1" style:family="table-cell">
      <style:table-cell-properties fo:padding-left="1.91mm" fo:padding-right="1.91mm" fo:padding-top="0mm" fo:padding-bottom="0mm" fo:border="0.5pt solid #000000" style:writing-mode="lr-tb"/>
    </style:style>
    <style:style style:name="Таблица12" style:family="table">
      <style:table-properties style:width="174.82mm" fo:margin-left="0.09mm" fo:margin-top="0mm" fo:margin-bottom="0mm" table:align="left" style:writing-mode="lr-tb"/>
    </style:style>
    <style:style style:name="Таблица12.A" style:family="table-column">
      <style:table-column-properties style:column-width="12.4mm"/>
    </style:style>
    <style:style style:name="Таблица12.B" style:family="table-column">
      <style:table-column-properties style:column-width="57.52mm"/>
    </style:style>
    <style:style style:name="Таблица12.C" style:family="table-column">
      <style:table-column-properties style:column-width="104.9mm"/>
    </style:style>
    <style:style style:name="Таблица12.1" style:family="table-row">
      <style:table-row-properties fo:keep-together="auto"/>
    </style:style>
    <style:style style:name="Таблица12.A1" style:family="table-cell">
      <style:table-cell-properties fo:padding-left="1.91mm" fo:padding-right="1.91mm" fo:padding-top="0mm" fo:padding-bottom="0mm" fo:border="0.5pt solid #000000" style:writing-mode="lr-tb"/>
    </style:style>
    <style:style style:name="Таблица13" style:family="table">
      <style:table-properties style:width="174.82mm" fo:margin-left="0.09mm" fo:margin-top="0mm" fo:margin-bottom="0mm" table:align="left" style:writing-mode="lr-tb"/>
    </style:style>
    <style:style style:name="Таблица13.A" style:family="table-column">
      <style:table-column-properties style:column-width="12.4mm"/>
    </style:style>
    <style:style style:name="Таблица13.B" style:family="table-column">
      <style:table-column-properties style:column-width="57.52mm"/>
    </style:style>
    <style:style style:name="Таблица13.C" style:family="table-column">
      <style:table-column-properties style:column-width="104.9mm"/>
    </style:style>
    <style:style style:name="Таблица13.1" style:family="table-row">
      <style:table-row-properties fo:keep-together="auto"/>
    </style:style>
    <style:style style:name="Таблица13.A1" style:family="table-cell">
      <style:table-cell-properties fo:padding-left="1.91mm" fo:padding-right="1.91mm" fo:padding-top="0mm" fo:padding-bottom="0mm" fo:border="0.5pt solid #000000" style:writing-mode="lr-tb"/>
    </style:style>
    <style:style style:name="Таблица14" style:family="table">
      <style:table-properties style:width="174.82mm" fo:margin-left="0.09mm" fo:margin-top="0mm" fo:margin-bottom="0mm" table:align="left" style:writing-mode="lr-tb"/>
    </style:style>
    <style:style style:name="Таблица14.A" style:family="table-column">
      <style:table-column-properties style:column-width="12.4mm"/>
    </style:style>
    <style:style style:name="Таблица14.B" style:family="table-column">
      <style:table-column-properties style:column-width="57.52mm"/>
    </style:style>
    <style:style style:name="Таблица14.C" style:family="table-column">
      <style:table-column-properties style:column-width="104.9mm"/>
    </style:style>
    <style:style style:name="Таблица14.1" style:family="table-row">
      <style:table-row-properties fo:keep-together="auto"/>
    </style:style>
    <style:style style:name="Таблица14.A1" style:family="table-cell">
      <style:table-cell-properties fo:padding-left="1.91mm" fo:padding-right="1.91mm" fo:padding-top="0mm" fo:padding-bottom="0mm" fo:border="0.5pt solid #000000" style:writing-mode="lr-tb"/>
    </style:style>
    <style:style style:name="Таблица15" style:family="table">
      <style:table-properties style:width="174.82mm" fo:margin-left="0.09mm" fo:margin-top="0mm" fo:margin-bottom="0mm" table:align="left" style:writing-mode="lr-tb"/>
    </style:style>
    <style:style style:name="Таблица15.A" style:family="table-column">
      <style:table-column-properties style:column-width="12.4mm"/>
    </style:style>
    <style:style style:name="Таблица15.B" style:family="table-column">
      <style:table-column-properties style:column-width="57.52mm"/>
    </style:style>
    <style:style style:name="Таблица15.C" style:family="table-column">
      <style:table-column-properties style:column-width="104.9mm"/>
    </style:style>
    <style:style style:name="Таблица15.1" style:family="table-row">
      <style:table-row-properties fo:keep-together="always"/>
    </style:style>
    <style:style style:name="Таблица15.A1" style:family="table-cell">
      <style:table-cell-properties fo:padding-left="1.91mm" fo:padding-right="1.91mm" fo:padding-top="0mm" fo:padding-bottom="0mm" fo:border="0.5pt solid #000000" style:writing-mode="lr-tb"/>
    </style:style>
    <style:style style:name="Таблица16" style:family="table">
      <style:table-properties style:width="169.83mm" fo:margin-left="0.09mm" fo:margin-top="0mm" fo:margin-bottom="0mm" table:align="left" style:writing-mode="lr-tb"/>
    </style:style>
    <style:style style:name="Таблица16.A" style:family="table-column">
      <style:table-column-properties style:column-width="56.6mm"/>
    </style:style>
    <style:style style:name="Таблица16.C" style:family="table-column">
      <style:table-column-properties style:column-width="56.62mm"/>
    </style:style>
    <style:style style:name="Таблица16.1" style:family="table-row">
      <style:table-row-properties fo:keep-together="auto"/>
    </style:style>
    <style:style style:name="Таблица16.A1" style:family="table-cell">
      <style:table-cell-properties style:vertical-align="middle" fo:padding-left="1.91mm" fo:padding-right="1.91mm" fo:padding-top="0mm" fo:padding-bottom="0mm" fo:border="0.5pt solid #000000" style:writing-mode="lr-tb"/>
    </style:style>
    <style:style style:name="Таблица17" style:family="table">
      <style:table-properties style:width="175mm" fo:margin-left="0mm" fo:margin-top="0mm" fo:margin-bottom="0mm" table:align="left" style:writing-mode="lr-tb"/>
    </style:style>
    <style:style style:name="Таблица17.A" style:family="table-column">
      <style:table-column-properties style:column-width="7.5mm"/>
    </style:style>
    <style:style style:name="Таблица17.B" style:family="table-column">
      <style:table-column-properties style:column-width="157.92mm"/>
    </style:style>
    <style:style style:name="Таблица17.C" style:family="table-column">
      <style:table-column-properties style:column-width="9.58mm"/>
    </style:style>
    <style:style style:name="Таблица17.1" style:family="table-row">
      <style:table-row-properties fo:keep-together="auto"/>
    </style:style>
    <style:style style:name="Таблица17.A1" style:family="table-cell">
      <style:table-cell-properties fo:padding-left="1.91mm" fo:padding-right="1.91mm" fo:padding-top="0mm" fo:padding-bottom="0mm" fo:border="none" style:writing-mode="lr-tb"/>
    </style:style>
    <style:style style:name="Таблица17.C1" style:family="table-cell">
      <style:table-cell-properties style:vertical-align="middle" fo:padding-left="1.91mm" fo:padding-right="1.91mm" fo:padding-top="0mm" fo:padding-bottom="0mm" fo:border="none" style:writing-mode="lr-tb"/>
    </style:style>
    <style:style style:name="Таблица18" style:family="table">
      <style:table-properties style:width="174.82mm" fo:margin-top="0mm" fo:margin-bottom="0mm" table:align="center" style:writing-mode="lr-tb"/>
    </style:style>
    <style:style style:name="Таблица18.A" style:family="table-column">
      <style:table-column-properties style:column-width="42.42mm"/>
    </style:style>
    <style:style style:name="Таблица18.B" style:family="table-column">
      <style:table-column-properties style:column-width="97mm"/>
    </style:style>
    <style:style style:name="Таблица18.C" style:family="table-column">
      <style:table-column-properties style:column-width="35.4mm"/>
    </style:style>
    <style:style style:name="Таблица18.1" style:family="table-row">
      <style:table-row-properties style:min-row-height="8.01mm" fo:keep-together="auto"/>
    </style:style>
    <style:style style:name="Таблица18.A1" style:family="table-cell">
      <style:table-cell-properties style:vertical-align="middle" fo:padding-left="1.91mm" fo:padding-right="1.91mm" fo:padding-top="0mm" fo:padding-bottom="0mm" fo:border="0.5pt solid #000000" style:writing-mode="lr-tb"/>
    </style:style>
    <style:style style:name="Таблица19" style:family="table">
      <style:table-properties style:width="175mm" fo:margin-left="0mm" fo:margin-top="0mm" fo:margin-bottom="0mm" table:align="left" style:writing-mode="lr-tb"/>
    </style:style>
    <style:style style:name="Таблица19.A" style:family="table-column">
      <style:table-column-properties style:column-width="7.5mm"/>
    </style:style>
    <style:style style:name="Таблица19.B" style:family="table-column">
      <style:table-column-properties style:column-width="157.92mm"/>
    </style:style>
    <style:style style:name="Таблица19.C" style:family="table-column">
      <style:table-column-properties style:column-width="9.58mm"/>
    </style:style>
    <style:style style:name="Таблица19.1" style:family="table-row">
      <style:table-row-properties fo:keep-together="auto"/>
    </style:style>
    <style:style style:name="Таблица19.A1" style:family="table-cell">
      <style:table-cell-properties fo:padding-left="1.91mm" fo:padding-right="1.91mm" fo:padding-top="0mm" fo:padding-bottom="0mm" fo:border="none" style:writing-mode="lr-tb"/>
    </style:style>
    <style:style style:name="Таблица19.C1" style:family="table-cell">
      <style:table-cell-properties style:vertical-align="middle" fo:padding-left="1.91mm" fo:padding-right="1.91mm" fo:padding-top="0mm" fo:padding-bottom="0mm" fo:border="none" style:writing-mode="lr-tb"/>
    </style:style>
    <style:style style:name="Таблица20" style:family="table">
      <style:table-properties style:width="174.82mm" fo:margin-top="0mm" fo:margin-bottom="0mm" table:align="center" style:writing-mode="lr-tb"/>
    </style:style>
    <style:style style:name="Таблица20.A" style:family="table-column">
      <style:table-column-properties style:column-width="36.87mm"/>
    </style:style>
    <style:style style:name="Таблица20.B" style:family="table-column">
      <style:table-column-properties style:column-width="30.29mm"/>
    </style:style>
    <style:style style:name="Таблица20.C" style:family="table-column">
      <style:table-column-properties style:column-width="43.99mm"/>
    </style:style>
    <style:style style:name="Таблица20.D" style:family="table-column">
      <style:table-column-properties style:column-width="30.32mm"/>
    </style:style>
    <style:style style:name="Таблица20.E" style:family="table-column">
      <style:table-column-properties style:column-width="33.36mm"/>
    </style:style>
    <style:style style:name="Таблица20.1" style:family="table-row">
      <style:table-row-properties style:min-row-height="8.01mm" fo:keep-together="auto"/>
    </style:style>
    <style:style style:name="Таблица20.A1" style:family="table-cell">
      <style:table-cell-properties style:vertical-align="middle" fo:padding-left="1.91mm" fo:padding-right="1.91mm" fo:padding-top="0mm" fo:padding-bottom="0mm" fo:border="0.5pt solid #000000" style:writing-mode="lr-tb"/>
    </style:style>
    <style:style style:name="Таблица21" style:family="table">
      <style:table-properties style:width="175mm" fo:margin-left="0mm" fo:margin-top="0mm" fo:margin-bottom="0mm" table:align="left" style:writing-mode="lr-tb"/>
    </style:style>
    <style:style style:name="Таблица21.A" style:family="table-column">
      <style:table-column-properties style:column-width="7.5mm"/>
    </style:style>
    <style:style style:name="Таблица21.B" style:family="table-column">
      <style:table-column-properties style:column-width="157.92mm"/>
    </style:style>
    <style:style style:name="Таблица21.C" style:family="table-column">
      <style:table-column-properties style:column-width="9.58mm"/>
    </style:style>
    <style:style style:name="Таблица21.1" style:family="table-row">
      <style:table-row-properties fo:keep-together="auto"/>
    </style:style>
    <style:style style:name="Таблица21.A1" style:family="table-cell">
      <style:table-cell-properties fo:padding-left="1.91mm" fo:padding-right="1.91mm" fo:padding-top="0mm" fo:padding-bottom="0mm" fo:border="none" style:writing-mode="lr-tb"/>
    </style:style>
    <style:style style:name="Таблица21.C1" style:family="table-cell">
      <style:table-cell-properties style:vertical-align="middle" fo:padding-left="1.91mm" fo:padding-right="1.91mm" fo:padding-top="0mm" fo:padding-bottom="0mm" fo:border="none" style:writing-mode="lr-tb"/>
    </style:style>
    <style:style style:name="Таблица22" style:family="table">
      <style:table-properties style:width="174.82mm" fo:margin-top="0mm" fo:margin-bottom="0mm" table:align="center" style:writing-mode="lr-tb"/>
    </style:style>
    <style:style style:name="Таблица22.A" style:family="table-column">
      <style:table-column-properties style:column-width="36.87mm"/>
    </style:style>
    <style:style style:name="Таблица22.B" style:family="table-column">
      <style:table-column-properties style:column-width="30.78mm"/>
    </style:style>
    <style:style style:name="Таблица22.C" style:family="table-column">
      <style:table-column-properties style:column-width="40.6mm"/>
    </style:style>
    <style:style style:name="Таблица22.D" style:family="table-column">
      <style:table-column-properties style:column-width="38.06mm"/>
    </style:style>
    <style:style style:name="Таблица22.E" style:family="table-column">
      <style:table-column-properties style:column-width="28.5mm"/>
    </style:style>
    <style:style style:name="Таблица22.1" style:family="table-row">
      <style:table-row-properties style:min-row-height="8.01mm" fo:keep-together="auto"/>
    </style:style>
    <style:style style:name="Таблица22.A1" style:family="table-cell">
      <style:table-cell-properties style:vertical-align="middle" fo:padding-left="1.91mm" fo:padding-right="1.91mm" fo:padding-top="0mm" fo:padding-bottom="0mm" fo:border="0.5pt solid #000000" style:writing-mode="lr-tb"/>
    </style:style>
    <style:style style:name="Таблица23" style:family="table">
      <style:table-properties style:width="175mm" fo:margin-left="0mm" fo:margin-top="0mm" fo:margin-bottom="0mm" table:align="left" style:writing-mode="lr-tb"/>
    </style:style>
    <style:style style:name="Таблица23.A" style:family="table-column">
      <style:table-column-properties style:column-width="7.5mm"/>
    </style:style>
    <style:style style:name="Таблица23.B" style:family="table-column">
      <style:table-column-properties style:column-width="157.92mm"/>
    </style:style>
    <style:style style:name="Таблица23.C" style:family="table-column">
      <style:table-column-properties style:column-width="9.58mm"/>
    </style:style>
    <style:style style:name="Таблица23.1" style:family="table-row">
      <style:table-row-properties fo:keep-together="auto"/>
    </style:style>
    <style:style style:name="Таблица23.A1" style:family="table-cell">
      <style:table-cell-properties fo:padding-left="1.91mm" fo:padding-right="1.91mm" fo:padding-top="0mm" fo:padding-bottom="0mm" fo:border="none" style:writing-mode="lr-tb"/>
    </style:style>
    <style:style style:name="Таблица23.C1" style:family="table-cell">
      <style:table-cell-properties style:vertical-align="middle" fo:padding-left="1.91mm" fo:padding-right="1.91mm" fo:padding-top="0mm" fo:padding-bottom="0mm" fo:border="none" style:writing-mode="lr-tb"/>
    </style:style>
    <style:style style:name="Таблица24" style:family="table">
      <style:table-properties style:width="175mm" fo:margin-left="0mm" fo:margin-top="0mm" fo:margin-bottom="0mm" table:align="left" style:writing-mode="lr-tb"/>
    </style:style>
    <style:style style:name="Таблица24.A" style:family="table-column">
      <style:table-column-properties style:column-width="7.5mm"/>
    </style:style>
    <style:style style:name="Таблица24.B" style:family="table-column">
      <style:table-column-properties style:column-width="157.92mm"/>
    </style:style>
    <style:style style:name="Таблица24.C" style:family="table-column">
      <style:table-column-properties style:column-width="9.58mm"/>
    </style:style>
    <style:style style:name="Таблица24.1" style:family="table-row">
      <style:table-row-properties fo:keep-together="auto"/>
    </style:style>
    <style:style style:name="Таблица24.A1" style:family="table-cell">
      <style:table-cell-properties fo:padding-left="1.91mm" fo:padding-right="1.91mm" fo:padding-top="0mm" fo:padding-bottom="0mm" fo:border="none" style:writing-mode="lr-tb"/>
    </style:style>
    <style:style style:name="Таблица24.C1" style:family="table-cell">
      <style:table-cell-properties style:vertical-align="middle" fo:padding-left="1.91mm" fo:padding-right="1.91mm" fo:padding-top="0mm" fo:padding-bottom="0mm" fo:border="none" style:writing-mode="lr-tb"/>
    </style:style>
    <style:style style:name="Таблица25" style:family="table">
      <style:table-properties style:width="174.82mm" fo:margin-top="0mm" fo:margin-bottom="0mm" table:align="center" style:writing-mode="lr-tb"/>
    </style:style>
    <style:style style:name="Таблица25.A" style:family="table-column">
      <style:table-column-properties style:column-width="81.42mm"/>
    </style:style>
    <style:style style:name="Таблица25.B" style:family="table-column">
      <style:table-column-properties style:column-width="30mm"/>
    </style:style>
    <style:style style:name="Таблица25.C" style:family="table-column">
      <style:table-column-properties style:column-width="31.24mm"/>
    </style:style>
    <style:style style:name="Таблица25.D" style:family="table-column">
      <style:table-column-properties style:column-width="32.16mm"/>
    </style:style>
    <style:style style:name="Таблица25.1" style:family="table-row">
      <style:table-row-properties style:min-row-height="8.01mm" fo:keep-together="auto"/>
    </style:style>
    <style:style style:name="Таблица25.A1" style:family="table-cell">
      <style:table-cell-properties style:vertical-align="middle" fo:padding-left="1.91mm" fo:padding-right="1.91mm" fo:padding-top="0mm" fo:padding-bottom="0mm" fo:border="0.5pt solid #000000" style:writing-mode="lr-tb"/>
    </style:style>
    <style:style style:name="Таблица26" style:family="table">
      <style:table-properties style:width="174.82mm" fo:margin-top="0mm" fo:margin-bottom="0mm" table:align="center" style:writing-mode="lr-tb"/>
    </style:style>
    <style:style style:name="Таблица26.A" style:family="table-column">
      <style:table-column-properties style:column-width="142.66mm"/>
    </style:style>
    <style:style style:name="Таблица26.B" style:family="table-column">
      <style:table-column-properties style:column-width="32.16mm"/>
    </style:style>
    <style:style style:name="Таблица26.1" style:family="table-row">
      <style:table-row-properties style:min-row-height="8.01mm" fo:keep-together="auto"/>
    </style:style>
    <style:style style:name="Таблица26.A1" style:family="table-cell">
      <style:table-cell-properties style:vertical-align="middle" fo:padding-left="1.91mm" fo:padding-right="1.91mm" fo:padding-top="0mm" fo:padding-bottom="0mm" fo:border="0.5pt solid #000000" style:writing-mode="lr-tb"/>
    </style:style>
    <style:style style:name="Таблица27" style:family="table">
      <style:table-properties style:width="175mm" fo:margin-left="0mm" fo:margin-top="0mm" fo:margin-bottom="0mm" table:align="left" style:writing-mode="lr-tb"/>
    </style:style>
    <style:style style:name="Таблица27.A" style:family="table-column">
      <style:table-column-properties style:column-width="7.5mm"/>
    </style:style>
    <style:style style:name="Таблица27.B" style:family="table-column">
      <style:table-column-properties style:column-width="157.92mm"/>
    </style:style>
    <style:style style:name="Таблица27.C" style:family="table-column">
      <style:table-column-properties style:column-width="9.58mm"/>
    </style:style>
    <style:style style:name="Таблица27.1" style:family="table-row">
      <style:table-row-properties fo:keep-together="auto"/>
    </style:style>
    <style:style style:name="Таблица27.A1" style:family="table-cell">
      <style:table-cell-properties fo:padding-left="1.91mm" fo:padding-right="1.91mm" fo:padding-top="0mm" fo:padding-bottom="0mm" fo:border="none" style:writing-mode="lr-tb"/>
    </style:style>
    <style:style style:name="Таблица27.C1" style:family="table-cell">
      <style:table-cell-properties style:vertical-align="middle" fo:padding-left="1.91mm" fo:padding-right="1.91mm" fo:padding-top="0mm" fo:padding-bottom="0mm" fo:border="none" style:writing-mode="lr-tb"/>
    </style:style>
    <style:style style:name="Таблица28" style:family="table">
      <style:table-properties style:width="175mm" fo:margin-left="0mm" fo:margin-top="0mm" fo:margin-bottom="0mm" table:align="left" style:writing-mode="lr-tb"/>
    </style:style>
    <style:style style:name="Таблица28.A" style:family="table-column">
      <style:table-column-properties style:column-width="7.5mm"/>
    </style:style>
    <style:style style:name="Таблица28.B" style:family="table-column">
      <style:table-column-properties style:column-width="157.92mm"/>
    </style:style>
    <style:style style:name="Таблица28.C" style:family="table-column">
      <style:table-column-properties style:column-width="9.58mm"/>
    </style:style>
    <style:style style:name="Таблица28.1" style:family="table-row">
      <style:table-row-properties fo:keep-together="auto"/>
    </style:style>
    <style:style style:name="Таблица28.A1" style:family="table-cell">
      <style:table-cell-properties fo:padding-left="1.91mm" fo:padding-right="1.91mm" fo:padding-top="0mm" fo:padding-bottom="0mm" fo:border="none" style:writing-mode="lr-tb"/>
    </style:style>
    <style:style style:name="Таблица28.C1" style:family="table-cell">
      <style:table-cell-properties style:vertical-align="middle" fo:padding-left="1.91mm" fo:padding-right="1.91mm" fo:padding-top="0mm" fo:padding-bottom="0mm" fo:border="none" style:writing-mode="lr-tb"/>
    </style:style>
    <style:style style:name="P1" style:family="paragraph" style:parent-style-name="Standard" style:master-page-name="Standard">
      <style:paragraph-properties fo:margin-left="-10mm" fo:margin-right="-5.03mm" fo:margin-top="0mm" fo:margin-bottom="2.12mm" style:contextual-spacing="false" fo:line-height="150%" fo:text-align="center" style:justify-single-word="false" style:page-number="1"/>
    </style:style>
    <style:style style:name="P2" style:family="paragraph" style:parent-style-name="Standard">
      <style:paragraph-properties fo:margin-left="-10mm" fo:margin-right="-5.03mm" fo:margin-top="0mm" fo:margin-bottom="2.12mm" style:contextual-spacing="false" fo:text-align="center" style:justify-single-word="false"/>
    </style:style>
    <style:style style:name="P3" style:family="paragraph" style:parent-style-name="Standard">
      <style:paragraph-properties fo:margin-left="-10mm" fo:margin-right="-5.03mm" fo:margin-top="0mm" fo:margin-bottom="2.12mm" style:contextual-spacing="false" fo:line-height="150%" fo:text-align="center" style:justify-single-word="false"/>
    </style:style>
    <style:style style:name="P4" style:family="paragraph" style:parent-style-name="Standard">
      <style:paragraph-properties fo:margin-left="-10mm" fo:margin-right="-5.03mm" fo:margin-top="0mm" fo:margin-bottom="2.12mm" style:contextual-spacing="false" fo:line-height="150%"/>
    </style:style>
    <style:style style:name="P5" style:family="paragraph" style:parent-style-name="Standard">
      <style:paragraph-properties fo:margin-left="-10mm" fo:margin-right="-5.03mm" fo:margin-top="0mm" fo:margin-bottom="2.12mm" style:contextual-spacing="false"/>
    </style:style>
    <style:style style:name="P6" style:family="paragraph" style:parent-style-name="Standard">
      <style:paragraph-properties fo:margin-left="-10mm" fo:margin-right="-5.03mm"/>
    </style:style>
    <style:style style:name="P7" style:family="paragraph" style:parent-style-name="Standard">
      <style:paragraph-properties fo:margin-left="-10mm" fo:margin-right="-0.04mm" fo:margin-top="0mm" fo:margin-bottom="2.12mm" style:contextual-spacing="false" fo:line-height="150%"/>
    </style:style>
    <style:style style:name="P8" style:family="paragraph" style:parent-style-name="Standard">
      <style:paragraph-properties fo:margin-left="-10mm" fo:margin-right="-0.04mm"/>
    </style:style>
    <style:style style:name="P9" style:family="paragraph" style:parent-style-name="Standard">
      <style:paragraph-properties fo:margin-left="-10mm" fo:margin-right="-5.03mm" fo:text-align="center" style:justify-single-word="false"/>
    </style:style>
    <style:style style:name="P10" style:family="paragraph" style:parent-style-name="Standard">
      <style:paragraph-properties fo:margin-left="-10mm" fo:margin-right="-5.03mm" fo:line-height="150%" fo:text-align="center" style:justify-single-word="false"/>
    </style:style>
    <style:style style:name="P11" style:family="paragraph" style:parent-style-name="Standard">
      <style:paragraph-properties fo:margin-left="15.01mm" fo:margin-right="-5.03mm" fo:margin-top="0mm" fo:margin-bottom="2.12mm" style:contextual-spacing="false" fo:line-height="150%" fo:text-indent="22.51mm" style:auto-text-indent="false"/>
    </style:style>
    <style:style style:name="P12" style:family="paragraph" style:parent-style-name="Standard">
      <style:paragraph-properties fo:margin-left="-10mm" fo:margin-right="-0.04mm" fo:line-height="150%"/>
    </style:style>
    <style:style style:name="P13" style:family="paragraph" style:parent-style-name="Standard">
      <style:paragraph-properties fo:margin-left="-10mm" fo:margin-right="-0.04mm" fo:line-height="150%" fo:text-align="justify" style:justify-single-word="false" loext:word-spacing-minimum="75%" loext:word-spacing-maximum="133%"/>
    </style:style>
    <style:style style:name="P14" style:family="paragraph" style:parent-style-name="Standard">
      <style:paragraph-properties fo:margin-left="-10mm" fo:margin-right="2.47mm" fo:line-height="150%" fo:text-align="justify" style:justify-single-word="false" loext:word-spacing-minimum="75%" loext:word-spacing-maximum="133%"/>
    </style:style>
    <style:style style:name="P15" style:family="paragraph" style:parent-style-name="Standard" style:master-page-name="Converted1">
      <style:paragraph-properties fo:margin-left="-5.01mm" fo:margin-right="2.47mm" fo:margin-top="0mm" fo:margin-bottom="2.12mm" style:contextual-spacing="false" fo:line-height="150%" fo:text-align="justify" style:justify-single-word="false" style:page-number="auto" loext:word-spacing-minimum="75%" loext:word-spacing-maximum="133%"/>
    </style:style>
    <style:style style:name="P16" style:family="paragraph" style:parent-style-name="Standard">
      <style:paragraph-properties fo:margin-top="2.12mm" fo:margin-bottom="2.12mm" style:contextual-spacing="false" fo:text-align="center" style:justify-single-word="false" fo:orphans="2" fo:widows="2"/>
      <style:text-properties fo:language="ru" fo:country="RU" style:letter-kerning="false" style:language-complex="ar" style:country-complex="SA"/>
    </style:style>
    <style:style style:name="P17" style:family="paragraph" style:parent-style-name="Standard">
      <style:paragraph-properties fo:margin-top="0mm" fo:margin-bottom="0mm" style:contextual-spacing="false" fo:text-align="center" style:justify-single-word="false" fo:orphans="2" fo:widows="2"/>
      <style:text-properties fo:language="ru" fo:country="RU" style:letter-kerning="false" style:language-complex="ar" style:country-complex="SA"/>
    </style:style>
    <style:style style:name="P18" style:family="paragraph" style:parent-style-name="Standard">
      <style:paragraph-properties fo:margin-top="0mm" fo:margin-bottom="0mm" style:contextual-spacing="false" fo:text-align="justify" style:justify-single-word="false" fo:orphans="2" fo:widows="2" loext:word-spacing-minimum="75%" loext:word-spacing-maximum="133%"/>
      <style:text-properties fo:language="ru" fo:country="RU" style:letter-kerning="false" style:language-complex="ar" style:country-complex="SA"/>
    </style:style>
    <style:style style:name="P19" style:family="paragraph" style:parent-style-name="Standard">
      <style:paragraph-properties fo:margin-top="0mm" fo:margin-bottom="0mm" style:contextual-spacing="false" fo:text-align="left" style:justify-single-word="false" fo:orphans="2" fo:widows="2"/>
      <style:text-properties fo:language="ru" fo:country="RU" style:letter-kerning="false" style:language-complex="ar" style:country-complex="SA"/>
    </style:style>
    <style:style style:name="P20" style:family="paragraph" style:parent-style-name="Standard">
      <style:paragraph-properties fo:margin-top="0mm" fo:margin-bottom="0mm" style:contextual-spacing="false" fo:text-align="center" style:justify-single-word="false" fo:orphans="2" fo:widows="2"/>
      <style:text-properties fo:language="ru" fo:country="RU" fo:font-style="italic" style:letter-kerning="false" style:font-style-asian="italic" style:language-complex="ar" style:country-complex="SA" style:font-style-complex="italic"/>
    </style:style>
    <style:style style:name="P21" style:family="paragraph" style:parent-style-name="Standard">
      <style:paragraph-properties fo:margin-top="0mm" fo:margin-bottom="0mm" style:contextual-spacing="false" fo:text-align="justify" style:justify-single-word="false" fo:orphans="2" fo:widows="2" loext:word-spacing-minimum="75%" loext:word-spacing-maximum="133%"/>
      <style:text-properties fo:language="ru" fo:country="RU" fo:font-style="italic" style:letter-kerning="false" style:font-style-asian="italic" style:language-complex="ar" style:country-complex="SA" style:font-style-complex="italic"/>
    </style:style>
    <style:style style:name="P22" style:family="paragraph" style:parent-style-name="Standard">
      <style:paragraph-properties fo:margin-top="0mm" fo:margin-bottom="0mm" style:contextual-spacing="false" fo:text-align="left" style:justify-single-word="false" fo:orphans="2" fo:widows="2"/>
      <style:text-properties fo:language="ru" fo:country="RU" fo:font-style="italic" style:letter-kerning="false" style:font-style-asian="italic" style:language-complex="ar" style:country-complex="SA" style:font-style-complex="italic"/>
    </style:style>
    <style:style style:name="P23" style:family="paragraph" style:parent-style-name="Standard">
      <style:paragraph-properties fo:margin-top="0mm" fo:margin-bottom="0mm" style:contextual-spacing="false" fo:line-height="150%" fo:text-align="center" style:justify-single-word="false" fo:orphans="2" fo:widows="2"/>
      <style:text-properties fo:language="ru" fo:country="RU" style:letter-kerning="false" style:language-complex="ar" style:country-complex="SA"/>
    </style:style>
    <style:style style:name="P24" style:family="paragraph" style:parent-style-name="Standard">
      <style:paragraph-properties fo:margin-top="0mm" fo:margin-bottom="0mm" style:contextual-spacing="false" fo:line-height="150%" fo:text-align="left" style:justify-single-word="false" fo:orphans="2" fo:widows="2"/>
      <style:text-properties fo:language="ru" fo:country="RU" style:letter-kerning="false" style:language-complex="ar" style:country-complex="SA"/>
    </style:style>
    <style:style style:name="P25" style:family="paragraph" style:parent-style-name="Standard">
      <style:paragraph-properties fo:margin-left="-5.01mm" fo:margin-right="-5.03mm" fo:margin-top="0mm" fo:margin-bottom="2.12mm" style:contextual-spacing="false" fo:line-height="150%"/>
    </style:style>
    <style:style style:name="P26" style:family="paragraph" style:parent-style-name="Standard">
      <style:paragraph-properties fo:margin-top="2.12mm" fo:margin-bottom="2.12mm" style:contextual-spacing="false" fo:text-align="left" style:justify-single-word="false" fo:orphans="2" fo:widows="2"/>
      <style:text-properties fo:language="ru" fo:country="RU" style:letter-kerning="false" style:language-complex="ar" style:country-complex="SA"/>
    </style:style>
    <style:style style:name="P27" style:family="paragraph" style:parent-style-name="Standard">
      <style:paragraph-properties fo:margin-top="2.12mm" fo:margin-bottom="2.12mm" style:contextual-spacing="false" fo:text-align="left" style:justify-single-word="false" fo:orphans="2" fo:widows="2"/>
      <style:text-properties fo:language="ru" fo:country="RU" fo:font-style="italic" style:letter-kerning="false" style:font-style-asian="italic" style:language-complex="ar" style:country-complex="SA" style:font-style-complex="italic"/>
    </style:style>
    <style:style style:name="P28" style:family="paragraph" style:parent-style-name="Standard">
      <style:paragraph-properties fo:margin-left="-5.01mm" fo:margin-right="-5.03mm"/>
    </style:style>
    <style:style style:name="P29" style:family="paragraph" style:parent-style-name="Standard">
      <style:paragraph-properties fo:margin-left="77.54mm" fo:margin-right="-5.03mm" fo:margin-top="0mm" fo:margin-bottom="2.12mm" style:contextual-spacing="false" fo:line-height="150%" fo:text-indent="22.51mm" style:auto-text-indent="false"/>
    </style:style>
    <style:style style:name="P30" style:family="paragraph" style:parent-style-name="Standard">
      <style:paragraph-properties fo:margin-top="0mm" fo:margin-bottom="3.53mm" style:contextual-spacing="false" fo:line-height="150%" fo:text-align="center" style:justify-single-word="false"/>
    </style:style>
    <style:style style:name="P31" style:family="paragraph" style:parent-style-name="Standard">
      <style:paragraph-properties fo:margin-top="0mm" fo:margin-bottom="3.53mm" style:contextual-spacing="false" fo:line-height="150%"/>
      <style:text-properties fo:font-size="11pt" fo:font-style="italic" style:font-size-asian="11pt" style:font-style-asian="italic" style:font-size-complex="10pt" style:font-style-complex="italic"/>
    </style:style>
    <style:style style:name="P32" style:family="paragraph" style:parent-style-name="Standard">
      <style:paragraph-properties fo:margin-top="4.23mm" fo:margin-bottom="4.23mm" style:contextual-spacing="false" fo:line-height="115%" fo:text-align="center" style:justify-single-word="false"/>
    </style:style>
    <style:style style:name="P33" style:family="paragraph" style:parent-style-name="Standard">
      <style:paragraph-properties fo:line-height="150%" fo:text-align="justify" style:justify-single-word="false" fo:text-indent="15.01mm" style:auto-text-indent="false" loext:word-spacing-minimum="75%" loext:word-spacing-maximum="133%"/>
    </style:style>
    <style:style style:name="P34" style:family="paragraph" style:parent-style-name="Text_20_body">
      <style:paragraph-properties fo:margin-top="0mm" fo:margin-bottom="0mm" style:contextual-spacing="false" fo:line-height="150%" fo:text-align="justify" style:justify-single-word="false" fo:orphans="0" fo:widows="0" fo:text-indent="15.01mm" style:auto-text-indent="false" loext:word-spacing-minimum="75%" loext:word-spacing-maximum="133%"/>
    </style:style>
    <style:style style:name="P35" style:family="paragraph" style:parent-style-name="Standard">
      <style:paragraph-properties fo:margin-top="0mm" fo:margin-bottom="3.53mm" style:contextual-spacing="false" fo:line-height="150%" fo:text-align="center" style:justify-single-word="false"/>
      <style:text-properties fo:font-size="11pt" fo:font-style="italic" style:font-size-asian="11pt" style:font-style-asian="italic" style:font-size-complex="10pt" style:font-style-complex="italic"/>
    </style:style>
    <style:style style:name="P36" style:family="paragraph" style:parent-style-name="Standard" style:master-page-name="Converted2">
      <style:paragraph-properties fo:line-height="150%" fo:text-align="center" style:justify-single-word="false" style:page-number="auto"/>
    </style:style>
    <style:style style:name="P37" style:family="paragraph" style:parent-style-name="Contents_20_1">
      <style:paragraph-properties fo:margin-top="0mm" fo:margin-bottom="0mm" style:contextual-spacing="false" fo:line-height="150%">
        <style:tab-stops>
          <style:tab-stop style:position="174.82mm" style:type="right" style:leader-style="dotted" style:leader-text="."/>
        </style:tab-stops>
      </style:paragraph-properties>
    </style:style>
    <style:style style:name="P38" style:family="paragraph" style:parent-style-name="Contents_20_2">
      <style:paragraph-properties fo:margin-top="0mm" fo:margin-bottom="0mm" style:contextual-spacing="false" fo:line-height="150%">
        <style:tab-stops>
          <style:tab-stop style:position="174.82mm" style:type="right" style:leader-style="dotted" style:leader-text="."/>
        </style:tab-stops>
      </style:paragraph-properties>
    </style:style>
    <style:style style:name="P39" style:family="paragraph" style:parent-style-name="Standard">
      <style:paragraph-properties fo:line-height="150%"/>
      <style:text-properties fo:font-size="14pt" style:font-size-asian="14pt" style:font-size-complex="14pt"/>
    </style:style>
    <style:style style:name="P40" style:family="paragraph" style:parent-style-name="Standard">
      <style:paragraph-properties fo:margin-top="0mm" fo:margin-bottom="3.53mm" style:contextual-spacing="false" fo:line-height="115%"/>
      <style:text-properties fo:font-size="14pt" style:letter-kerning="true" style:font-size-asian="14pt" style:font-size-complex="14pt" style:font-weight-complex="bold"/>
    </style:style>
    <style:style style:name="P41" style:family="paragraph" style:parent-style-name="Heading_20_1">
      <style:paragraph-properties fo:margin-top="0mm" fo:margin-bottom="15.17mm" style:contextual-spacing="false" fo:break-before="page"/>
    </style:style>
    <style:style style:name="P42" style:family="paragraph" style:parent-style-name="Standard">
      <style:paragraph-properties fo:line-height="150%" fo:text-indent="15.01mm" style:auto-text-indent="false"/>
      <style:text-properties fo:font-size="14pt" style:font-size-asian="14pt"/>
    </style:style>
    <style:style style:name="P43" style:family="paragraph" style:parent-style-name="Standard">
      <style:paragraph-properties fo:margin-top="0mm" fo:margin-bottom="3.53mm" style:contextual-spacing="false" fo:line-height="115%"/>
      <style:text-properties fo:text-transform="uppercase" fo:color="#000000" loext:opacity="100%" fo:font-size="14pt" fo:font-weight="bold" style:font-size-asian="14pt" style:language-asian="en" style:country-asian="US" style:font-weight-asian="bold" style:font-size-complex="14pt" style:font-weight-complex="bold"/>
    </style:style>
    <style:style style:name="P44" style:family="paragraph" style:parent-style-name="Standard">
      <style:paragraph-properties fo:margin-top="0mm" fo:margin-bottom="2.82mm" style:contextual-spacing="false" fo:line-height="116%"/>
    </style:style>
    <style:style style:name="P45" style:family="paragraph" style:parent-style-name="Standard">
      <style:paragraph-properties fo:margin-top="0mm" fo:margin-bottom="2.82mm" style:contextual-spacing="false" fo:line-height="116%"/>
      <style:text-properties fo:color="#000000" loext:opacity="100%" fo:font-size="14pt" style:letter-kerning="true" style:font-size-asian="14pt" style:language-asian="en" style:country-asian="US" style:font-size-complex="14pt"/>
    </style:style>
    <style:style style:name="P46" style:family="paragraph" style:parent-style-name="Heading_20_2">
      <style:paragraph-properties fo:margin-top="0mm" fo:margin-bottom="8.11mm" style:contextual-spacing="false" fo:break-before="page"/>
    </style:style>
    <style:style style:name="P47" style:family="paragraph" style:parent-style-name="_36_._20_Марк._20_список" style:list-style-name="WWNum10">
      <style:paragraph-properties fo:margin-left="0mm" fo:text-indent="15.01mm" style:auto-text-indent="false"/>
    </style:style>
    <style:style style:name="P48" style:family="paragraph" style:parent-style-name="Standard">
      <style:paragraph-properties fo:margin-top="0mm" fo:margin-bottom="2.82mm" style:contextual-spacing="false" fo:line-height="150%" fo:text-align="justify" style:justify-single-word="false" fo:text-indent="12.51mm" style:auto-text-indent="false" loext:word-spacing-minimum="75%" loext:word-spacing-maximum="133%"/>
    </style:style>
    <style:style style:name="P49" style:family="paragraph" style:parent-style-name="_34_._20_Нум._20_список" style:list-style-name="WWNum9"/>
    <style:style style:name="P50" style:family="paragraph" style:parent-style-name="Standard">
      <style:paragraph-properties fo:margin-top="0mm" fo:margin-bottom="2.82mm" style:contextual-spacing="false" fo:text-align="justify" style:justify-single-word="false" loext:word-spacing-minimum="75%" loext:word-spacing-maximum="133%"/>
    </style:style>
    <style:style style:name="P51" style:family="paragraph" style:parent-style-name="Standard">
      <style:paragraph-properties fo:margin-top="0mm" fo:margin-bottom="0mm" style:contextual-spacing="false" fo:line-height="150%" fo:text-align="center" style:justify-single-word="false" fo:orphans="2" fo:widows="2"/>
      <style:text-properties fo:language="ru" fo:country="RU" style:letter-kerning="true" style:language-complex="ar" style:country-complex="SA"/>
    </style:style>
    <style:style style:name="P52" style:family="paragraph" style:parent-style-name="Standard">
      <style:paragraph-properties fo:margin-top="0mm" fo:margin-bottom="0mm" style:contextual-spacing="false" fo:text-align="left" style:justify-single-word="false" fo:orphans="2" fo:widows="2"/>
      <style:text-properties fo:language="ru" fo:country="RU" style:letter-kerning="true" style:language-complex="ar" style:country-complex="SA"/>
    </style:style>
    <style:style style:name="P53" style:family="paragraph" style:parent-style-name="Standard">
      <style:paragraph-properties fo:margin-top="0mm" fo:margin-bottom="0mm" style:contextual-spacing="false" fo:text-align="center" style:justify-single-word="false" fo:orphans="2" fo:widows="2"/>
      <style:text-properties fo:language="ru" fo:country="RU" style:letter-kerning="true" style:language-complex="ar" style:country-complex="SA"/>
    </style:style>
    <style:style style:name="P54" style:family="paragraph" style:parent-style-name="Standard">
      <style:paragraph-properties fo:margin-top="0mm" fo:margin-bottom="3.53mm" style:contextual-spacing="false" fo:line-height="115%"/>
      <style:text-properties fo:font-size="14pt" style:font-name-asian="Calibri2" style:font-size-asian="14pt" style:language-asian="en" style:country-asian="US" style:font-size-complex="14pt"/>
    </style:style>
    <style:style style:name="P55" style:family="paragraph" style:parent-style-name="Heading_20_1">
      <style:paragraph-properties fo:margin-left="20.02mm" fo:margin-top="0mm" fo:margin-bottom="15.17mm" style:contextual-spacing="false" fo:break-before="page"/>
    </style:style>
    <style:style style:name="P56" style:family="paragraph" style:parent-style-name="Standard">
      <style:paragraph-properties fo:margin-top="0mm" fo:margin-bottom="2.82mm" style:contextual-spacing="false" fo:line-height="150%" fo:text-align="justify" style:justify-single-word="false" fo:keep-with-next="always" loext:word-spacing-minimum="75%" loext:word-spacing-maximum="133%"/>
    </style:style>
    <style:style style:name="P57" style:family="paragraph">
      <loext:graphic-properties draw:fill="none"/>
      <style:paragraph-properties fo:text-align="left"/>
      <style:text-properties fo:font-size="18pt"/>
    </style:style>
    <style:style style:name="P58" style:family="paragraph" style:parent-style-name="Caption">
      <style:paragraph-properties fo:text-align="center" style:justify-single-word="false"/>
    </style:style>
    <style:style style:name="P59" style:family="paragraph" style:parent-style-name="Standard">
      <style:paragraph-properties fo:margin-top="0mm" fo:margin-bottom="3.53mm" style:contextual-spacing="false"/>
      <style:text-properties fo:font-size="14pt" style:font-size-asian="14pt" style:font-size-complex="14pt"/>
    </style:style>
    <style:style style:name="P60" style:family="paragraph" style:parent-style-name="Standard">
      <style:paragraph-properties fo:margin-top="0mm" fo:margin-bottom="3.53mm" style:contextual-spacing="false" fo:line-height="115%"/>
      <style:text-properties fo:font-size="14pt" fo:font-weight="bold" style:font-name-asian="F" style:font-size-asian="14pt" style:font-weight-asian="bold"/>
    </style:style>
    <style:style style:name="P61" style:family="paragraph" style:parent-style-name="Heading_20_3">
      <style:paragraph-properties fo:margin-top="0mm" fo:margin-bottom="8.11mm" style:contextual-spacing="false" fo:break-before="page"/>
    </style:style>
    <style:style style:name="P62" style:family="paragraph" style:parent-style-name="Standard">
      <style:paragraph-properties fo:margin-top="0mm" fo:margin-bottom="2.82mm" style:contextual-spacing="false" fo:line-height="150%" fo:text-indent="12.51mm" style:auto-text-indent="false"/>
    </style:style>
    <style:style style:name="P63" style:family="paragraph" style:parent-style-name="Caption">
      <style:paragraph-properties fo:margin-top="0mm" fo:margin-bottom="3.53mm" style:contextual-spacing="false" fo:break-before="page"/>
    </style:style>
    <style:style style:name="P64" style:family="paragraph" style:parent-style-name="List_20_Paragraph" style:list-style-name="WWNum8">
      <style:paragraph-properties fo:margin-top="0mm" fo:margin-bottom="2.82mm" style:contextual-spacing="true" fo:line-height="150%"/>
      <style:text-properties fo:font-size="14pt" style:letter-kerning="true" style:font-name-asian="Calibri2" style:font-size-asian="14pt" style:language-asian="en" style:country-asian="US"/>
    </style:style>
    <style:style style:name="P65" style:family="paragraph" style:parent-style-name="Heading_20_1" style:list-style-name="WWNum4">
      <style:paragraph-properties fo:margin-left="26.6mm" fo:margin-top="0mm" fo:margin-bottom="13.41mm" style:contextual-spacing="false" fo:text-indent="-6.6mm" style:auto-text-indent="false" fo:break-before="page"/>
    </style:style>
    <style:style style:name="P66" style:family="paragraph" style:parent-style-name="Heading_20_2">
      <style:paragraph-properties fo:margin-top="4.23mm" fo:margin-bottom="6.7mm" style:contextual-spacing="false"/>
    </style:style>
    <style:style style:name="P67" style:family="paragraph" style:parent-style-name="Standard">
      <style:paragraph-properties fo:margin-top="0mm" fo:margin-bottom="3.53mm" style:contextual-spacing="false" fo:line-height="115%"/>
      <style:text-properties fo:font-size="14pt" style:font-name-asian="Calibri2" style:font-size-asian="14pt" style:language-asian="en" style:country-asian="US" style:font-size-complex="14pt" style:language-complex="hi" style:country-complex="IN"/>
    </style:style>
    <style:style style:name="P68" style:family="paragraph" style:parent-style-name="_5f_Текст">
      <style:paragraph-properties fo:margin-top="0mm" fo:margin-bottom="0mm" style:contextual-spacing="false" fo:break-before="page"/>
    </style:style>
    <style:style style:name="P69" style:family="paragraph" style:parent-style-name="_5f_Текст">
      <style:text-properties style:language-complex="hi" style:country-complex="IN"/>
    </style:style>
    <style:style style:name="P70" style:family="paragraph" style:parent-style-name="Standard">
      <style:paragraph-properties fo:line-height="150%" fo:text-align="center" style:justify-single-word="false" fo:hyphenation-ladder-count="no-limit" fo:hyphenation-keep="auto" loext:hyphenation-keep-type="column" loext:hyphenation-keep-line="false" fo:text-indent="12.51mm" style:auto-text-indent="false" fo:keep-with-next="always"/>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2.12mm" fo:margin-bottom="2.12mm" style:contextual-spacing="false" fo:line-height="150%" fo:text-align="center" style:justify-single-word="false" fo:hyphenation-ladder-count="no-limit" fo:hyphenation-keep="auto" loext:hyphenation-keep-type="column" loext:hyphenation-keep-line="false" fo:text-indent="12.51mm" style:auto-text-indent="false"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_5f_Текст">
      <style:paragraph-properties fo:text-align="center" style:justify-single-word="false" loext:word-spacing-minimum="75%" loext:word-spacing-maximum="133%"/>
    </style:style>
    <style:style style:name="P73" style:family="paragraph" style:parent-style-name="Standard">
      <style:paragraph-properties fo:margin-top="0mm" fo:margin-bottom="3.53mm" style:contextual-spacing="false" fo:line-height="115%" fo:text-align="center" style:justify-single-word="false" fo:keep-with-next="always"/>
    </style:style>
    <style:style style:name="P74" style:family="paragraph" style:parent-style-name="Heading_20_1" style:list-style-name="WWNum3">
      <style:paragraph-properties fo:margin-top="0mm" fo:margin-bottom="15.17mm" style:contextual-spacing="false" fo:break-before="page"/>
    </style:style>
    <style:style style:name="P75" style:family="paragraph" style:parent-style-name="Heading_20_2" style:list-style-name="WWNum3"/>
    <style:style style:name="P76" style:family="paragraph" style:parent-style-name="_5f_Текст">
      <style:paragraph-properties fo:margin-top="0mm" fo:margin-bottom="0mm" style:contextual-spacing="false" fo:text-align="center" style:justify-single-word="false" fo:orphans="2" fo:widows="2" fo:text-indent="0mm" style:auto-text-indent="false" loext:word-spacing-minimum="75%" loext:word-spacing-maximum="133%"/>
      <style:text-properties fo:language="ru" fo:country="RU" style:letter-kerning="false" style:language-complex="ar" style:country-complex="SA"/>
    </style:style>
    <style:style style:name="P77" style:family="paragraph" style:parent-style-name="_5f_Текст">
      <style:paragraph-properties fo:margin-top="0mm" fo:margin-bottom="0mm" style:contextual-spacing="false" fo:line-height="100%" fo:orphans="2" fo:widows="2" fo:text-indent="0mm" style:auto-text-indent="false"/>
      <style:text-properties fo:language="ru" fo:country="RU" style:letter-kerning="false" style:language-complex="ar" style:country-complex="SA"/>
    </style:style>
    <style:style style:name="P78" style:family="paragraph" style:parent-style-name="_5f_Текст">
      <style:paragraph-properties fo:margin-top="0mm" fo:margin-bottom="0mm" style:contextual-spacing="false" fo:orphans="2" fo:widows="2" fo:text-indent="0mm" style:auto-text-indent="false"/>
      <style:text-properties fo:language="ru" fo:country="RU" style:letter-kerning="false" style:language-complex="ar" style:country-complex="SA"/>
    </style:style>
    <style:style style:name="P79" style:family="paragraph" style:parent-style-name="Standard">
      <style:paragraph-properties fo:margin-top="0mm" fo:margin-bottom="3.53mm" style:contextual-spacing="false" fo:line-height="115%"/>
      <style:text-properties fo:font-size="14pt" fo:font-style="italic" fo:font-weight="bold" style:font-name-asian="Arial" style:font-size-asian="14pt" style:language-asian="en" style:country-asian="US" style:font-style-asian="italic" style:font-weight-asian="bold" style:language-complex="hi" style:country-complex="IN" style:font-style-complex="italic"/>
    </style:style>
    <style:style style:name="P80" style:family="paragraph" style:parent-style-name="Heading_20_4">
      <style:paragraph-properties fo:margin-top="0mm" fo:margin-bottom="8.11mm" style:contextual-spacing="false" fo:break-before="page"/>
    </style:style>
    <style:style style:name="P81" style:family="paragraph" style:parent-style-name="Standard">
      <style:paragraph-properties fo:margin-top="0mm" fo:margin-bottom="3.53mm" style:contextual-spacing="false" fo:line-height="115%"/>
      <style:text-properties fo:font-size="14pt" style:font-name-asian="Calibri2" style:font-size-asian="14pt" style:language-asian="zh" style:country-asian="CN" style:font-size-complex="14pt" style:language-complex="hi" style:country-complex="IN"/>
    </style:style>
    <style:style style:name="P82" style:family="paragraph" style:parent-style-name="Heading_20_3">
      <style:paragraph-properties fo:margin-top="8.11mm" fo:margin-bottom="4.23mm" style:contextual-spacing="false"/>
    </style:style>
    <style:style style:name="P83" style:family="paragraph" style:parent-style-name="_34_._20_Нум._20_список" style:list-style-name="WWNum11">
      <style:paragraph-properties fo:margin-left="0mm" fo:text-indent="15.01mm" style:auto-text-indent="false"/>
    </style:style>
    <style:style style:name="P84" style:family="paragraph" style:parent-style-name="_5f_Текст">
      <style:paragraph-properties fo:text-align="center" style:justify-single-word="false" fo:keep-with-next="always" loext:word-spacing-minimum="75%" loext:word-spacing-maximum="133%"/>
    </style:style>
    <style:style style:name="P85" style:family="paragraph" style:parent-style-name="Standard">
      <style:paragraph-properties fo:text-align="center" style:justify-single-word="false" fo:keep-with-next="always"/>
    </style:style>
    <style:style style:name="P86" style:family="paragraph" style:parent-style-name="Standard">
      <style:paragraph-properties fo:margin-top="0mm" fo:margin-bottom="3.53mm" style:contextual-spacing="false" fo:line-height="115%"/>
      <style:text-properties style:language-complex="hi" style:country-complex="IN"/>
    </style:style>
    <style:style style:name="P87" style:family="paragraph" style:parent-style-name="Standard">
      <style:paragraph-properties fo:margin-top="0mm" fo:margin-bottom="0mm" style:contextual-spacing="false" fo:text-align="center" style:justify-single-word="false" fo:orphans="2" fo:widows="2" fo:hyphenation-ladder-count="no-limit" fo:hyphenation-keep="auto" loext:hyphenation-keep-type="column" loext:hyphenation-keep-line="false"/>
      <style:text-properties fo:language="ru" fo:country="RU" style:letter-kerning="true" style:language-complex="hi" style:country-complex="IN"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mm" fo:margin-bottom="3.53mm" style:contextual-spacing="false" fo:line-height="115%"/>
      <style:text-properties fo:font-size="14pt" style:font-size-asian="14pt"/>
    </style:style>
    <style:style style:name="P89" style:family="paragraph" style:parent-style-name="Heading_20_1" style:list-style-name="WWNum5">
      <style:paragraph-properties fo:margin-left="6.6mm" fo:margin-top="0mm" fo:margin-bottom="15.17mm" style:contextual-spacing="false" fo:text-indent="-6.6mm" style:auto-text-indent="false" fo:break-before="page"/>
    </style:style>
    <style:style style:name="P90" style:family="paragraph" style:parent-style-name="Heading_20_2" style:list-style-name="WWNum5"/>
    <style:style style:name="P91" style:family="paragraph" style:parent-style-name="Heading_20_3" style:list-style-name="WWNum5"/>
    <style:style style:name="P92" style:family="paragraph" style:parent-style-name="Heading_20_1" style:list-style-name="WWNum5">
      <style:paragraph-properties fo:margin-left="6.6mm" fo:text-indent="-6.6mm" style:auto-text-indent="false"/>
    </style:style>
    <style:style style:name="P93" style:family="paragraph" style:parent-style-name="Default">
      <style:paragraph-properties fo:line-height="150%" fo:text-align="justify" style:justify-single-word="false" fo:text-indent="15.01mm" style:auto-text-indent="false" loext:word-spacing-minimum="75%" loext:word-spacing-maximum="133%"/>
    </style:style>
    <style:style style:name="P94" style:family="paragraph" style:parent-style-name="Default">
      <style:paragraph-properties fo:margin-top="2.12mm" fo:margin-bottom="2.12mm" style:contextual-spacing="false" fo:text-align="center" style:justify-single-word="false" fo:orphans="2" fo:widows="2"/>
      <style:text-properties fo:language="ru" fo:country="RU" style:letter-kerning="false" style:font-name-asian="Calibri2" style:language-asian="en" style:country-asian="US" style:language-complex="ar" style:country-complex="SA"/>
    </style:style>
    <style:style style:name="P95" style:family="paragraph" style:parent-style-name="Table_20_Paragraph">
      <style:paragraph-properties fo:margin-top="0mm" fo:margin-bottom="0mm" style:contextual-spacing="false" fo:text-align="center" style:justify-single-word="false"/>
      <style:text-properties fo:language="ru" fo:country="RU" style:letter-kerning="false" style:language-complex="ar" style:country-complex="SA"/>
    </style:style>
    <style:style style:name="P96" style:family="paragraph" style:parent-style-name="Default">
      <style:paragraph-properties fo:line-height="150%" fo:text-align="justify" style:justify-single-word="false" fo:text-indent="15.01mm" style:auto-text-indent="false" loext:word-spacing-minimum="75%" loext:word-spacing-maximum="133%"/>
      <style:text-properties fo:font-size="14pt" style:font-size-asian="14pt" style:font-size-complex="14pt"/>
    </style:style>
    <style:style style:name="P97" style:family="paragraph" style:parent-style-name="Standard">
      <style:paragraph-properties fo:line-height="150%" fo:text-align="justify" style:justify-single-word="false" loext:word-spacing-minimum="75%" loext:word-spacing-maximum="133%"/>
    </style:style>
    <style:style style:name="P98" style:family="paragraph" style:parent-style-name="Standard">
      <style:paragraph-properties fo:line-height="150%" fo:text-align="justify" style:justify-single-word="false" fo:text-indent="15.01mm" style:auto-text-indent="false" loext:word-spacing-minimum="75%" loext:word-spacing-maximum="133%"/>
      <style:text-properties fo:font-size="14pt" style:font-name-asian="TimesNewRomanPSMT" style:font-size-asian="14pt" style:language-asian="en" style:country-asian="US" style:font-size-complex="14pt"/>
    </style:style>
    <style:style style:name="P99" style:family="paragraph" style:parent-style-name="Heading_20_2">
      <style:paragraph-properties fo:margin-top="6.35mm" fo:margin-bottom="8.11mm" style:contextual-spacing="false"/>
    </style:style>
    <style:style style:name="P100" style:family="paragraph" style:parent-style-name="ГОСТ_20_Обычный_20_текст" style:list-style-name="WWNum7"/>
    <style:style style:name="P101" style:family="paragraph" style:parent-style-name="ГОСТ_20_Обычный_20_текст">
      <style:paragraph-properties fo:text-indent="0mm" style:auto-text-indent="false"/>
    </style:style>
    <style:style style:name="P102" style:family="paragraph" style:parent-style-name="Standard">
      <style:paragraph-properties fo:line-height="150%" fo:text-align="justify" style:justify-single-word="false" loext:word-spacing-minimum="75%" loext:word-spacing-maximum="133%"/>
      <style:text-properties fo:font-size="14pt" style:font-name-asian="TimesNewRomanPSMT" style:font-size-asian="14pt" style:font-size-complex="14pt"/>
    </style:style>
    <style:style style:name="P103" style:family="paragraph" style:parent-style-name="Standard">
      <style:paragraph-properties fo:line-height="150%" fo:text-align="justify" style:justify-single-word="false" fo:text-indent="12.51mm" style:auto-text-indent="false" loext:word-spacing-minimum="75%" loext:word-spacing-maximum="133%"/>
    </style:style>
    <style:style style:name="P104" style:family="paragraph" style:parent-style-name="Standard">
      <style:paragraph-properties fo:margin-top="0mm" fo:margin-bottom="3.53mm" style:contextual-spacing="false" fo:line-height="115%"/>
      <style:text-properties fo:font-size="14pt" fo:font-weight="bold" style:font-name-asian="F" style:font-size-asian="14pt" style:language-asian="en" style:country-asian="US" style:font-weight-asian="bold" style:font-size-complex="13pt"/>
    </style:style>
    <style:style style:name="P105" style:family="paragraph" style:parent-style-name="ГОСТ_20_Обычный_20_текст">
      <style:paragraph-properties fo:text-indent="0mm" style:auto-text-indent="false"/>
      <style:text-properties style:language-asian="en" style:country-asian="US"/>
    </style:style>
    <style:style style:name="P106" style:family="paragraph" style:parent-style-name="Standard">
      <style:paragraph-properties fo:margin-top="0mm" fo:margin-bottom="3.53mm" style:contextual-spacing="false" fo:line-height="115%"/>
      <style:text-properties fo:font-size="14pt" style:font-name-asian="TimesNewRomanPSMT" style:font-size-asian="14pt" style:language-asian="en" style:country-asian="US" style:font-size-complex="14pt"/>
    </style:style>
    <style:style style:name="P107" style:family="paragraph" style:parent-style-name="List_20_Paragraph" style:list-style-name="WWNum6">
      <style:paragraph-properties fo:margin-left="0mm" fo:line-height="150%" fo:text-align="justify" style:justify-single-word="false" fo:text-indent="15.01mm" style:auto-text-indent="false" loext:word-spacing-minimum="75%" loext:word-spacing-maximum="133%"/>
    </style:style>
    <style:style style:name="P108" style:family="paragraph" style:parent-style-name="Heading_20_1">
      <style:paragraph-properties fo:margin-top="0mm" fo:margin-bottom="4.23mm" style:contextual-spacing="false" fo:break-before="page"/>
    </style:style>
    <style:style style:name="P109" style:family="paragraph" style:parent-style-name="Standard">
      <style:paragraph-properties fo:margin-top="0mm" fo:margin-bottom="3.53mm" style:contextual-spacing="false" fo:line-height="115%" fo:text-align="center" style:justify-single-word="false"/>
    </style:style>
    <style:style style:name="P110" style:family="paragraph" style:parent-style-name="Standard">
      <style:paragraph-properties fo:margin-top="0mm" fo:margin-bottom="3.53mm" style:contextual-spacing="false" fo:text-align="center" style:justify-single-word="false"/>
    </style:style>
    <style:style style:name="P111" style:family="paragraph" style:parent-style-name="Стиль3">
      <style:paragraph-properties fo:line-height="100%" fo:text-align="left" style:justify-single-word="false" fo:text-indent="0mm" style:auto-text-indent="false" loext:word-spacing-minimum="75%" loext:word-spacing-maximum="133%"/>
    </style:style>
    <style:style style:name="P112" style:family="paragraph" style:parent-style-name="Standard">
      <loext:graphic-properties draw:fill="solid" draw:fill-color="#ffffff"/>
      <style:paragraph-properties fo:background-color="#ffffff"/>
    </style:style>
    <style:style style:name="P113" style:family="paragraph" style:parent-style-name="Standard">
      <loext:graphic-properties draw:fill="solid" draw:fill-color="#ffffff"/>
      <style:paragraph-properties fo:background-color="#ffffff"/>
      <style:text-properties fo:color="#202020" loext:opacity="100%" style:font-name="Consolas" fo:font-size="9pt" fo:language="en" fo:country="US" style:font-size-asian="9pt" style:font-size-complex="9pt"/>
    </style:style>
    <style:style style:name="P114" style:family="paragraph" style:parent-style-name="Стиль3">
      <style:paragraph-properties fo:line-height="100%" fo:text-align="left" style:justify-single-word="false" fo:text-indent="0mm" style:auto-text-indent="false" loext:word-spacing-minimum="75%" loext:word-spacing-maximum="133%"/>
      <style:text-properties style:font-size-complex="9pt"/>
    </style:style>
    <style:style style:name="P115" style:family="paragraph" style:parent-style-name="Standard">
      <loext:graphic-properties draw:fill="solid" draw:fill-color="#ffffff"/>
      <style:paragraph-properties fo:margin-top="0mm" fo:margin-bottom="4.23mm" style:contextual-spacing="false" fo:background-color="#ffffff"/>
      <style:text-properties fo:color="#202020" loext:opacity="100%" style:font-name="Consolas" fo:font-size="9pt" fo:language="en" fo:country="US" style:font-size-asian="9pt" style:font-size-complex="9pt"/>
    </style:style>
    <style:style style:name="P116" style:family="paragraph" style:parent-style-name="Standard">
      <loext:graphic-properties draw:fill="solid" draw:fill-color="#ffffff"/>
      <style:paragraph-properties fo:margin-top="0mm" fo:margin-bottom="4.23mm" style:contextual-spacing="false" fo:background-color="#ffffff"/>
      <style:text-properties fo:color="#202020" loext:opacity="100%" style:font-name="Consolas" fo:font-size="9pt" style:font-size-asian="9pt" style:font-size-complex="9pt"/>
    </style:style>
    <style:style style:name="P117" style:family="paragraph" style:parent-style-name="Стиль3">
      <style:paragraph-properties fo:line-height="100%" fo:text-align="left" style:justify-single-word="false" fo:text-indent="0mm" style:auto-text-indent="false" loext:word-spacing-minimum="75%" loext:word-spacing-maximum="133%"/>
      <style:text-properties fo:font-size="11pt" fo:font-weight="bold" style:font-size-asian="11pt" style:font-weight-asian="bold" style:font-size-complex="11pt" style:font-weight-complex="bold"/>
    </style:style>
    <style:style style:name="P118" style:family="paragraph" style:parent-style-name="Standard">
      <loext:graphic-properties draw:fill="solid" draw:fill-color="#ffffff"/>
      <style:paragraph-properties fo:background-color="#ffffff"/>
      <style:text-properties fo:color="#202020" loext:opacity="100%" style:font-name="Consolas" fo:font-size="9pt" style:font-size-asian="9pt" style:font-size-complex="9pt"/>
    </style:style>
    <style:style style:name="P119" style:family="paragraph" style:parent-style-name="Стиль3">
      <style:paragraph-properties fo:line-height="100%" fo:text-align="left" style:justify-single-word="false" fo:text-indent="0mm" style:auto-text-indent="false" loext:word-spacing-minimum="75%" loext:word-spacing-maximum="133%"/>
      <style:text-properties fo:font-weight="bold" style:font-weight-asian="bold" style:font-size-complex="9pt" style:font-weight-complex="bold"/>
    </style:style>
    <style:style style:name="P120" style:family="paragraph" style:parent-style-name="Standard">
      <loext:graphic-properties draw:fill="solid" draw:fill-color="#ffffff"/>
      <style:paragraph-properties fo:background-color="#ffffff"/>
      <style:text-properties fo:color="#202020" loext:opacity="100%" style:font-name="Consolas" fo:font-size="10.5pt" fo:language="en" fo:country="US" style:font-size-asian="10.5pt" style:font-size-complex="10.5pt"/>
    </style:style>
    <style:style style:name="P121" style:family="paragraph" style:parent-style-name="Стиль3">
      <style:paragraph-properties fo:line-height="100%" fo:text-align="left" style:justify-single-word="false" fo:text-indent="0mm" style:auto-text-indent="false" loext:word-spacing-minimum="75%" loext:word-spacing-maximum="133%"/>
      <style:text-properties fo:font-size="12pt" fo:font-weight="bold" style:font-size-asian="12pt" style:font-weight-asian="bold" style:font-size-complex="12pt" style:font-weight-complex="bold"/>
    </style:style>
    <style:style style:name="P122" style:family="paragraph">
      <loext:graphic-properties draw:fill="none"/>
      <style:paragraph-properties fo:text-align="left"/>
      <style:text-properties fo:font-size="12pt"/>
    </style:style>
    <style:style style:name="P123" style:family="paragraph" style:parent-style-name="Чертежный">
      <style:paragraph-properties fo:text-align="center" style:justify-single-word="false" loext:word-spacing-minimum="75%" loext:word-spacing-maximum="133%"/>
    </style:style>
    <style:style style:name="P124" style:family="paragraph">
      <loext:graphic-properties draw:fill="none"/>
      <style:paragraph-properties fo:text-align="left"/>
    </style:style>
    <style:style style:name="P125" style:family="paragraph" style:parent-style-name="Footer">
      <style:paragraph-properties fo:text-align="center" style:justify-single-word="false"/>
    </style:style>
    <style:style style:name="P126" style:family="paragraph" style:parent-style-name="Чертежный">
      <style:text-properties style:font-name="GOST type A" fo:font-size="12pt" style:font-size-asian="12pt" style:font-size-complex="12pt"/>
    </style:style>
    <style:style style:name="P127" style:family="paragraph" style:parent-style-name="Чертежный">
      <style:text-properties fo:font-size="9pt" fo:language="ru" fo:country="RU" style:font-size-asian="9pt"/>
    </style:style>
    <style:style style:name="P128" style:family="paragraph" style:parent-style-name="Чертежный">
      <style:text-properties style:font-name="GOST type A" fo:font-size="12pt" fo:language="ru" fo:country="RU" style:font-size-asian="12pt" style:font-size-complex="12pt"/>
    </style:style>
    <style:style style:name="P129" style:family="paragraph" style:parent-style-name="Standard">
      <style:paragraph-properties fo:text-align="center" style:justify-single-word="false"/>
    </style:style>
    <style:style style:name="P130" style:family="paragraph" style:parent-style-name="Standard">
      <style:paragraph-properties fo:text-align="center" style:justify-single-word="false"/>
      <style:text-properties style:font-name="GOST type A"/>
    </style:style>
    <style:style style:name="P131" style:family="paragraph" style:parent-style-name="Standard">
      <style:paragraph-properties fo:margin-top="0mm" fo:margin-bottom="2.12mm" style:contextual-spacing="false" fo:text-align="center" style:justify-single-word="false"/>
      <style:text-properties style:font-name="GOST type A" fo:font-size="18pt" fo:font-style="italic" style:font-name-asian="Calibri2" style:font-size-asian="18pt" style:font-style-asian="italic" style:font-size-complex="18pt"/>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cript-type="asian"/>
    </style:style>
    <style:style style:name="T3" style:family="text">
      <style:text-properties style:script-type="asian"/>
    </style:style>
    <style:style style:name="T4" style:family="text">
      <style:text-properties style:text-underline-style="solid" style:text-underline-width="auto" style:text-underline-color="font-color"/>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8pt" style:font-size-asian="8pt" style:font-size-complex="8pt"/>
    </style:style>
    <style:style style:name="T7" style:family="text">
      <style:text-properties fo:font-size="9pt" style:font-size-asian="9pt" style:font-size-complex="9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tyle="italic" style:text-underline-style="solid" style:text-underline-width="auto" style:text-underline-color="font-color" style:font-style-asian="italic" style:font-style-complex="italic" style:script-type="asian"/>
    </style:style>
    <style:style style:name="T10" style:family="text">
      <style:text-properties fo:font-style="italic" style:text-underline-style="solid" style:text-underline-width="auto" style:text-underline-color="font-color" style:font-style-asian="italic"/>
    </style:style>
    <style:style style:name="T11" style:family="text">
      <style:text-properties fo:language="en" fo:country="US" fo:font-style="italic" style:text-underline-style="solid" style:text-underline-width="auto" style:text-underline-color="font-color" style:font-style-asian="italic"/>
    </style:style>
    <style:style style:name="T12" style:family="text">
      <style:text-properties fo:font-weight="bold" style:font-weight-asian="bold"/>
    </style:style>
    <style:style style:name="T13" style:family="text">
      <style:text-properties fo:font-style="italic" style:font-style-asian="italic" style:font-style-complex="italic"/>
    </style:style>
    <style:style style:name="T14" style:family="text">
      <style:text-properties fo:color="#000000" loext:opacity="100%" fo:font-style="italic" style:font-style-asian="italic" style:font-style-complex="italic"/>
    </style:style>
    <style:style style:name="T15" style:family="text">
      <style:text-properties fo:font-style="italic" style:font-style-asian="italic"/>
    </style:style>
    <style:style style:name="T16" style:family="text">
      <style:text-properties fo:font-size="11pt" fo:font-style="italic" style:font-size-asian="11pt" style:font-style-asian="italic" style:font-size-complex="10pt" style:font-style-complex="italic"/>
    </style:style>
    <style:style style:name="T17" style:family="text">
      <style:text-properties fo:font-size="14pt" fo:font-weight="bold" style:font-name-asian="Calibri2" style:font-size-asian="14pt" style:language-asian="en" style:country-asian="US" style:font-weight-asian="bold" style:font-size-complex="11pt"/>
    </style:style>
    <style:style style:name="T18" style:family="text">
      <style:text-properties fo:font-size="14pt" style:font-size-asian="14pt"/>
    </style:style>
    <style:style style:name="T19" style:family="text">
      <style:text-properties fo:font-size="14pt" fo:font-weight="bold" style:font-size-asian="14pt" style:language-asian="en" style:country-asian="US" style:font-weight-asian="bold" style:font-size-complex="15pt"/>
    </style:style>
    <style:style style:name="T20" style:family="text">
      <style:text-properties fo:font-size="14pt" style:font-size-asian="14pt" style:language-asian="en" style:country-asian="US" style:font-size-complex="15pt"/>
    </style:style>
    <style:style style:name="T21" style:family="text">
      <style:text-properties fo:font-size="14pt" style:font-size-asian="14pt" style:language-asian="en" style:country-asian="US" style:font-size-complex="14pt"/>
    </style:style>
    <style:style style:name="T22" style:family="text">
      <style:text-properties fo:font-size="14pt" fo:font-style="italic" style:font-size-asian="14pt" style:font-style-asian="italic"/>
    </style:style>
    <style:style style:name="T23" style:family="text">
      <style:text-properties fo:font-size="14pt" fo:language="en" fo:country="US" style:font-size-asian="14pt" style:language-asian="en" style:country-asian="US" style:font-size-complex="15pt"/>
    </style:style>
    <style:style style:name="T24" style:family="text">
      <style:text-properties fo:font-size="14pt" fo:font-weight="bold" style:font-size-asian="14pt" style:font-weight-asian="bold" style:font-size-complex="14pt" style:font-weight-complex="bold"/>
    </style:style>
    <style:style style:name="T25" style:family="text">
      <style:text-properties fo:text-transform="uppercase" fo:font-size="14pt" fo:font-weight="bold" style:letter-kerning="true" style:font-size-asian="14pt" style:language-asian="en" style:country-asian="US" style:font-weight-asian="bold" style:font-size-complex="14pt" style:font-weight-complex="bold"/>
    </style:style>
    <style:style style:name="T26" style:family="text">
      <style:text-properties fo:font-variant="normal" fo:text-transform="none" style:font-name="Times New Roman" fo:font-size="14pt" fo:font-weight="normal" style:letter-kerning="true" style:font-name-asian="F" style:font-size-asian="14pt" style:font-weight-asian="normal" style:font-size-complex="14pt" style:font-weight-complex="normal"/>
    </style:style>
    <style:style style:name="T27" style:family="text">
      <style:text-properties style:font-name="Times New Roman" fo:font-size="14pt" fo:font-weight="normal" style:font-size-asian="14pt" style:font-weight-asian="normal" style:font-size-complex="14pt" style:font-weight-complex="normal"/>
    </style:style>
    <style:style style:name="T28" style:family="text">
      <style:text-properties style:font-name="Times New Roman" fo:font-size="14pt" fo:font-weight="normal" style:font-size-asian="14pt" style:font-weight-asian="normal" style:font-size-complex="14pt" style:font-weight-complex="normal" text:display="true"/>
    </style:style>
    <style:style style:name="T29" style:family="text">
      <style:text-properties style:font-name="Times New Roman" fo:font-size="14pt" fo:font-weight="normal" style:letter-kerning="true" style:font-name-asian="F" style:font-size-asian="14pt" style:font-weight-asian="normal" style:font-name-complex="Times New Roman1" style:font-size-complex="14pt" style:font-weight-complex="normal"/>
    </style:style>
    <style:style style:name="T30" style:family="text">
      <style:text-properties style:font-name="Times New Roman" fo:font-size="14pt" fo:font-weight="normal" style:font-size-asian="14pt" style:font-weight-asian="normal" style:font-name-complex="Times New Roman1" style:font-size-complex="14pt" style:font-weight-complex="normal"/>
    </style:style>
    <style:style style:name="T31" style:family="text">
      <style:text-properties style:font-name="Times New Roman" fo:font-size="14pt" fo:font-weight="normal" style:font-size-asian="14pt" style:font-weight-asian="normal" style:font-name-complex="Times New Roman1" style:font-size-complex="14pt" style:font-weight-complex="normal" text:display="true"/>
    </style:style>
    <style:style style:name="T32" style:family="text">
      <style:text-properties style:letter-kerning="true" style:font-name-asian="F"/>
    </style:style>
    <style:style style:name="T33" style:family="text">
      <style:text-properties text:display="true"/>
    </style:style>
    <style:style style:name="T34" style:family="text">
      <style:text-properties style:letter-kerning="true" style:font-name-asian="F" text:display="true"/>
    </style:style>
    <style:style style:name="T35" style:family="text">
      <style:text-properties style:language-asian="en" style:country-asian="US"/>
    </style:style>
    <style:style style:name="T36" style:family="text">
      <style:text-properties fo:language="en" fo:country="US" style:language-asian="en" style:country-asian="US"/>
    </style:style>
    <style:style style:name="T37" style:family="text">
      <style:text-properties style:font-name="Times New Roman" fo:font-size="14pt" fo:font-weight="normal" style:font-name-asian="Arial" style:font-size-asian="14pt" style:font-weight-asian="normal" style:font-name-complex="Times New Roman1" style:font-size-complex="14pt" style:language-complex="hi" style:country-complex="IN" style:font-weight-complex="normal"/>
    </style:style>
    <style:style style:name="T38" style:family="text">
      <style:text-properties style:font-name="Times New Roman" fo:font-size="14pt" fo:font-weight="normal" style:font-size-asian="14pt" style:font-weight-asian="normal" style:font-name-complex="Times New Roman1" style:font-size-complex="14pt" style:language-complex="hi" style:country-complex="IN" style:font-weight-complex="normal"/>
    </style:style>
    <style:style style:name="T39" style:family="text">
      <style:text-properties style:font-name="Times New Roman" fo:font-size="14pt" fo:language="en" fo:country="US" fo:font-weight="normal" style:font-size-asian="14pt" style:font-weight-asian="normal" style:font-name-complex="Times New Roman1" style:font-size-complex="14pt" style:language-complex="hi" style:country-complex="IN" style:font-weight-complex="normal"/>
    </style:style>
    <style:style style:name="T40" style:family="text">
      <style:text-properties style:font-name-asian="Arial" style:language-asian="zh" style:country-asian="CN" style:language-complex="hi" style:country-complex="IN"/>
    </style:style>
    <style:style style:name="T41" style:family="text">
      <style:text-properties style:font-name="Times New Roman" fo:font-size="14pt" fo:font-weight="normal" style:font-name-asian="Calibri2" style:font-size-asian="14pt" style:font-weight-asian="normal" style:font-name-complex="Times New Roman1" style:font-size-complex="14pt" style:font-weight-complex="normal"/>
    </style:style>
    <style:style style:name="T42" style:family="text">
      <style:text-properties style:font-name="Times New Roman" fo:font-size="14pt" fo:font-weight="normal" style:font-name-asian="TimesNewRomanPSMT" style:font-size-asian="14pt" style:font-weight-asian="normal" style:font-name-complex="Times New Roman1" style:font-size-complex="14pt" style:font-weight-complex="normal"/>
    </style:style>
    <style:style style:name="T43" style:family="text">
      <style:text-properties fo:font-size="14pt" style:font-size-asian="14pt" style:font-size-complex="14pt"/>
    </style:style>
    <style:style style:name="T44" style:family="text">
      <style:text-properties fo:font-size="14pt" style:letter-kerning="true" style:font-size-asian="14pt" style:font-size-complex="14pt" style:font-weight-complex="bold"/>
    </style:style>
    <style:style style:name="T45" style:family="text">
      <style:text-properties fo:font-size="14pt" fo:font-weight="bold" style:font-size-asian="14pt" style:font-weight-asian="bold"/>
    </style:style>
    <style:style style:name="T46" style:family="text">
      <style:text-properties fo:text-transform="uppercase" fo:color="#000000" loext:opacity="100%" fo:font-size="14pt" fo:font-weight="bold" style:font-size-asian="14pt" style:language-asian="en" style:country-asian="US" style:font-weight-asian="bold" style:font-size-complex="14pt" style:font-weight-complex="bold"/>
    </style:style>
    <style:style style:name="T47" style:family="text">
      <style:text-properties fo:color="#ffffff" loext:opacity="100%" fo:font-size="14pt" fo:font-style="italic" style:letter-kerning="true" style:font-name-asian="Calibri2" style:font-size-asian="14pt" style:language-asian="en" style:country-asian="US" style:font-style-asian="italic" style:font-style-complex="italic">
        <loext:char-complex-color loext:theme-type="light1" loext:color-type="theme"/>
      </style:text-properties>
    </style:style>
    <style:style style:name="T48" style:family="text">
      <style:text-properties fo:color="#000000" loext:opacity="100%" fo:font-size="14pt" style:letter-kerning="true" style:font-size-asian="14pt" style:language-asian="en" style:country-asian="US" style:font-size-complex="14pt"/>
    </style:style>
    <style:style style:name="T49" style:family="text">
      <style:text-properties fo:color="#000000" loext:opacity="100%"/>
    </style:style>
    <style:style style:name="T50" style:family="text">
      <style:text-properties fo:language="en" fo:country="US"/>
    </style:style>
    <style:style style:name="T51" style:family="text">
      <style:text-properties fo:color="#000000" loext:opacity="100%" style:letter-kerning="true"/>
    </style:style>
    <style:style style:name="T52" style:family="text">
      <style:text-properties fo:color="#000000" loext:opacity="100%" fo:font-family="Symbol" style:font-family-generic="roman" style:font-pitch="variable" style:font-charset="x-symbol" fo:font-size="14pt" style:letter-kerning="true" style:font-family-asian="Symbol" style:font-family-generic-asian="system" style:font-pitch-asian="variable" style:font-size-asian="14pt" style:language-asian="en" style:country-asian="US" style:font-family-complex="Symbol" style:font-family-generic-complex="system" style:font-pitch-complex="variable" style:font-size-complex="14pt"/>
    </style:style>
    <style:style style:name="T53" style:family="text">
      <style:text-properties fo:font-size="14pt" fo:language="en" fo:country="US" fo:font-weight="bold" style:font-size-asian="14pt" style:language-asian="en" style:country-asian="US" style:font-weight-asian="bold" style:font-size-complex="14pt" style:font-weight-complex="bold"/>
    </style:style>
    <style:style style:name="T54" style:family="text">
      <style:text-properties fo:font-size="14pt" fo:font-weight="bold" style:font-name-asian="Calibri2" style:font-size-asian="14pt" style:language-asian="en" style:country-asian="US" style:font-weight-asian="bold" style:font-size-complex="14pt" style:font-weight-complex="bold"/>
    </style:style>
    <style:style style:name="T55" style:family="text">
      <style:text-properties fo:font-size="14pt" fo:language="en" fo:country="US" fo:font-weight="bold" style:font-name-asian="Calibri2" style:font-size-asian="14pt" style:language-asian="en" style:country-asian="US" style:font-weight-asian="bold" style:font-size-complex="14pt" style:font-weight-complex="bold"/>
    </style:style>
    <style:style style:name="T56" style:family="text">
      <style:text-properties fo:font-size="14pt" style:font-name-asian="Calibri2" style:font-size-asian="14pt" style:language-asian="en" style:country-asian="US" style:font-size-complex="14pt"/>
    </style:style>
    <style:style style:name="T57" style:family="text">
      <style:text-properties fo:font-size="14pt" fo:language="en" fo:country="US" style:font-size-asian="14pt" style:language-asian="en" style:country-asian="US" style:font-size-complex="14pt"/>
    </style:style>
    <style:style style:name="T58" style:family="text">
      <style:text-properties fo:font-size="14pt" fo:language="en" fo:country="US" style:font-name-asian="Calibri2" style:font-size-asian="14pt" style:language-asian="en" style:country-asian="US" style:font-size-complex="14pt"/>
    </style:style>
    <style:style style:name="T59" style:family="text">
      <style:text-properties fo:font-size="22pt" style:letter-kerning="true" style:font-name-asian="Calibri2" style:font-size-asian="22pt" style:language-asian="en" style:country-asian="US"/>
    </style:style>
    <style:style style:name="T60"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style>
    <style:style style:name="T61" style:family="text">
      <style:text-properties fo:font-size="14pt" fo:language="en" fo:country="US" style:font-size-asian="14pt" style:font-size-complex="14pt"/>
    </style:style>
    <style:style style:name="T62" style:family="text">
      <style:text-properties fo:font-size="14pt" fo:font-weight="bold" style:font-name-asian="F" style:font-size-asian="14pt" style:font-weight-asian="bold"/>
    </style:style>
    <style:style style:name="T63" style:family="text">
      <style:text-properties fo:font-size="14pt" style:letter-kerning="true" style:font-name-asian="Calibri2" style:font-size-asian="14pt" style:language-asian="en" style:country-asian="US"/>
    </style:style>
    <style:style style:name="T64" style:family="text">
      <style:text-properties fo:font-size="14pt" fo:font-weight="bold" style:font-name-asian="Calibri2" style:font-size-asian="14pt" style:language-asian="en" style:country-asian="US" style:font-weight-asian="bold" style:font-weight-complex="bold"/>
    </style:style>
    <style:style style:name="T65" style:family="text">
      <style:text-properties fo:font-size="14pt" style:font-name-asian="Calibri2" style:font-size-asian="14pt" style:language-asian="en" style:country-asian="US"/>
    </style:style>
    <style:style style:name="T66" style:family="text">
      <style:text-properties fo:font-size="14pt" fo:language="en" fo:country="US" style:font-name-asian="Calibri2" style:font-size-asian="14pt" style:language-asian="en" style:country-asian="US"/>
    </style:style>
    <style:style style:name="T67" style:family="text">
      <style:text-properties fo:font-size="14pt" fo:language="en" fo:country="US" style:font-size-asian="14pt"/>
    </style:style>
    <style:style style:name="T68" style:family="text">
      <style:text-properties style:font-name-asian="Arial" style:language-complex="hi" style:country-complex="IN"/>
    </style:style>
    <style:style style:name="T69" style:family="text">
      <style:text-properties style:language-complex="hi" style:country-complex="IN"/>
    </style:style>
    <style:style style:name="T70" style:family="text">
      <style:text-properties fo:language="en" fo:country="US" style:language-complex="hi" style:country-complex="IN"/>
    </style:style>
    <style:style style:name="T71" style:family="text">
      <style:text-properties style:font-name-asian="NSimSun" style:language-complex="hi" style:country-complex="IN"/>
    </style:style>
    <style:style style:name="T72" style:family="text">
      <style:text-properties fo:font-size="14pt" style:font-name-asian="Calibri2" style:font-size-asian="14pt" style:language-asian="en" style:country-asian="US" style:font-size-complex="14pt" style:language-complex="hi" style:country-complex="IN"/>
    </style:style>
    <style:style style:name="T73" style:family="text">
      <style:text-properties fo:font-size="14pt" fo:language="en" fo:country="US" style:letter-kerning="true" style:font-name-asian="NSimSun" style:font-size-asian="14pt" style:language-asian="zh" style:country-asian="CN" style:font-size-complex="14pt" style:language-complex="hi" style:country-complex="IN"/>
    </style:style>
    <style:style style:name="T74" style:family="text">
      <style:text-properties fo:font-size="14pt" style:letter-kerning="true" style:font-name-asian="NSimSun" style:font-size-asian="14pt" style:language-asian="zh" style:country-asian="CN" style:font-size-complex="14pt" style:language-complex="hi" style:country-complex="IN"/>
    </style:style>
    <style:style style:name="T75" style:family="text">
      <style:text-properties fo:language="en" fo:country="US" style:font-name-asian="NSimSun" style:language-complex="hi" style:country-complex="IN"/>
    </style:style>
    <style:style style:name="T76"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language-complex="hi" style:country-complex="IN"/>
    </style:style>
    <style:style style:name="T77" style:family="text">
      <style:text-properties fo:font-weight="bold" style:font-weight-asian="bold" style:language-complex="hi" style:country-complex="IN" style:font-weight-complex="bold"/>
    </style:style>
    <style:style style:name="T78" style:family="text">
      <style:text-properties fo:font-size="14pt" fo:font-style="italic" fo:font-weight="bold" style:font-name-asian="Arial" style:font-size-asian="14pt" style:language-asian="en" style:country-asian="US" style:font-style-asian="italic" style:font-weight-asian="bold" style:language-complex="hi" style:country-complex="IN" style:font-style-complex="italic"/>
    </style:style>
    <style:style style:name="T79" style:family="text">
      <style:text-properties fo:font-size="14pt" style:font-name-asian="Calibri2" style:font-size-asian="14pt" style:language-asian="zh" style:country-asian="CN" style:font-size-complex="14pt" style:language-complex="hi" style:country-complex="IN"/>
    </style:style>
    <style:style style:name="T80" style:family="text">
      <style:text-properties fo:font-size="14pt" fo:font-weight="bold" style:font-name-asian="NSimSun" style:font-size-asian="14pt" style:language-asian="zh" style:country-asian="CN" style:font-weight-asian="bold" style:font-size-complex="14pt" style:font-weight-complex="bold"/>
    </style:style>
    <style:style style:name="T81" style:family="text">
      <style:text-properties fo:font-size="14pt" style:font-name-asian="NSimSun" style:font-size-asian="14pt" style:language-asian="zh" style:country-asian="CN" style:font-size-complex="14pt"/>
    </style:style>
    <style:style style:name="T82" style:family="text">
      <style:text-properties fo:font-size="14pt" fo:language="en" fo:country="US" style:font-name-asian="NSimSun" style:font-size-asian="14pt" style:language-asian="zh" style:country-asian="CN" style:font-size-complex="14pt"/>
    </style:style>
    <style:style style:name="T83" style:family="text">
      <style:text-properties style:font-name-asian="Calibri2"/>
    </style:style>
    <style:style style:name="T84" style:family="text">
      <style:text-properties fo:font-size="14pt" style:font-size-asian="14pt" style:font-size-complex="12pt"/>
    </style:style>
    <style:style style:name="T85" style:family="text">
      <style:text-properties fo:font-size="14pt" style:font-name-asian="TimesNewRomanPSMT" style:font-size-asian="14pt" style:font-size-complex="14pt"/>
    </style:style>
    <style:style style:name="T86" style:family="text">
      <style:text-properties fo:font-size="14pt" style:font-name-asian="TimesNewRomanPSMT" style:font-size-asian="14pt" style:language-asian="en" style:country-asian="US" style:font-size-complex="14pt"/>
    </style:style>
    <style:style style:name="T87" style:family="text">
      <style:text-properties fo:font-family="Symbol" style:font-family-generic="roman" style:font-pitch="variable" style:font-charset="x-symbol" fo:font-size="14pt" style:font-family-asian="Symbol" style:font-family-generic-asian="system" style:font-pitch-asian="variable" style:font-size-asian="14pt" style:font-family-complex="Symbol" style:font-family-generic-complex="system" style:font-pitch-complex="variable" style:font-size-complex="14pt"/>
    </style:style>
    <style:style style:name="T88" style:family="text">
      <style:text-properties fo:font-size="14pt" fo:language="en" fo:country="US" style:font-name-asian="TimesNewRomanPSMT" style:font-size-asian="14pt" style:font-size-complex="14pt"/>
    </style:style>
    <style:style style:name="T89" style:family="text">
      <style:text-properties fo:font-family="Symbol" style:font-family-generic="roman" style:font-pitch="variable" style:font-charset="x-symbol" fo:font-size="14pt" fo:language="en" fo:country="US" style:font-family-asian="Symbol" style:font-family-generic-asian="system" style:font-pitch-asian="variable" style:font-size-asian="14pt" style:font-family-complex="Symbol" style:font-family-generic-complex="system" style:font-pitch-complex="variable" style:font-size-complex="14pt"/>
    </style:style>
    <style:style style:name="T90" style:family="text">
      <style:text-properties fo:font-size="14pt" fo:language="en" fo:country="US" style:font-size-asian="14pt" style:font-size-complex="12pt"/>
    </style:style>
    <style:style style:name="T91" style:family="text">
      <style:text-properties fo:font-size="14pt" style:font-size-asian="14pt" style:font-size-complex="16pt"/>
    </style:style>
    <style:style style:name="T92" style:family="text">
      <style:text-properties fo:font-size="14pt" fo:language="en" fo:country="US" style:font-size-asian="14pt" style:font-size-complex="16pt"/>
    </style:style>
    <style:style style:name="T93" style:family="text">
      <style:text-properties style:font-name-asian="TimesNewRomanPSMT"/>
    </style:style>
    <style:style style:name="T94" style:family="text">
      <style:text-properties fo:language="en" fo:country="US" style:font-name-asian="TimesNewRomanPSMT"/>
    </style:style>
    <style:style style:name="T95" style:family="text">
      <style:text-properties fo:font-size="14pt" style:font-name-asian="TimesNewRomanPSMT" style:font-size-asian="14pt" style:font-size-complex="14pt" style:font-style-complex="italic"/>
    </style:style>
    <style:style style:name="T96" style:family="text">
      <style:text-properties fo:font-size="13pt" style:font-size-asian="13pt" style:font-size-complex="13pt"/>
    </style:style>
    <style:style style:name="T97" style:family="text">
      <style:text-properties fo:font-size="14pt" fo:font-weight="bold" style:font-name-asian="F" style:font-size-asian="14pt" style:language-asian="en" style:country-asian="US" style:font-weight-asian="bold" style:font-size-complex="13pt"/>
    </style:style>
    <style:style style:name="T98" style:family="text">
      <style:text-properties style:font-name-asian="F" style:font-size-complex="13pt"/>
    </style:style>
    <style:style style:name="T99" style:family="text">
      <style:text-properties fo:font-size="14pt" style:font-name-asian="TimesNewRomanPSMT" style:font-size-asian="14pt" style:font-size-complex="12pt" style:font-style-complex="italic"/>
    </style:style>
    <style:style style:name="T100" style:family="text">
      <style:text-properties style:font-name-asian="TimesNewRomanPSMT" style:font-style-complex="italic"/>
    </style:style>
    <style:style style:name="T101" style:family="text">
      <style:text-properties style:font-size-complex="20pt"/>
    </style:style>
    <style:style style:name="T102" style:family="text">
      <style:text-properties fo:font-family="Symbol" style:font-family-generic="roman" style:font-pitch="variable" style:font-charset="x-symbol" style:font-family-asian="Symbol" style:font-family-generic-asian="system" style:font-pitch-asian="variable" style:language-asian="en" style:country-asian="US" style:font-family-complex="Symbol" style:font-family-generic-complex="system" style:font-pitch-complex="variable"/>
    </style:style>
    <style:style style:name="T103" style:family="text">
      <style:text-properties fo:color="#000000" loext:opacity="100%" fo:font-size="14pt" style:font-size-asian="14pt" style:font-size-complex="14pt"/>
    </style:style>
    <style:style style:name="T104" style:family="text">
      <style:text-properties fo:font-size="14pt" style:font-size-asian="14pt" style:font-size-complex="14pt" style:font-weight-complex="bold"/>
    </style:style>
    <style:style style:name="T105" style:family="text">
      <style:text-properties fo:font-size="14pt" fo:font-weight="bold" style:font-size-asian="14pt" style:font-weight-asian="bold" style:font-size-complex="14pt"/>
    </style:style>
    <style:style style:name="T106" style:family="text">
      <style:text-properties fo:font-size="12pt" fo:font-weight="bold" style:font-size-asian="12pt" style:font-weight-asian="bold" style:font-size-complex="12pt" style:font-weight-complex="bold"/>
    </style:style>
    <style:style style:name="T107" style:family="text">
      <style:text-properties fo:color="#202020" loext:opacity="100%" style:font-name="Consolas" fo:font-size="9pt" fo:language="en" fo:country="US" style:font-size-asian="9pt" style:font-size-complex="9pt"/>
    </style:style>
    <style:style style:name="T108" style:family="text">
      <style:text-properties fo:color="#af00db" loext:opacity="100%" style:font-name="Consolas" fo:font-size="9pt" fo:language="en" fo:country="US" style:font-size-asian="9pt" style:font-size-complex="9pt"/>
    </style:style>
    <style:style style:name="T109" style:family="text">
      <style:text-properties fo:color="#267f99" loext:opacity="100%" style:font-name="Consolas" fo:font-size="9pt" fo:language="en" fo:country="US" style:font-size-asian="9pt" style:font-size-complex="9pt"/>
    </style:style>
    <style:style style:name="T110" style:family="text">
      <style:text-properties fo:color="#8250df" loext:opacity="100%" style:font-name="Consolas" fo:font-size="9pt" fo:language="en" fo:country="US" style:font-size-asian="9pt" style:font-size-complex="9pt"/>
    </style:style>
    <style:style style:name="T111" style:family="text">
      <style:text-properties fo:color="#0a3069" loext:opacity="100%" style:font-name="Consolas" fo:font-size="9pt" fo:language="en" fo:country="US" style:font-size-asian="9pt" style:font-size-complex="9pt"/>
    </style:style>
    <style:style style:name="T112" style:family="text">
      <style:text-properties fo:color="#953800" loext:opacity="100%" style:font-name="Consolas" fo:font-size="9pt" fo:language="en" fo:country="US" style:font-size-asian="9pt" style:font-size-complex="9pt"/>
    </style:style>
    <style:style style:name="T113" style:family="text">
      <style:text-properties fo:color="#000000" loext:opacity="100%" style:font-name="Consolas" fo:font-size="9pt" fo:language="en" fo:country="US" style:font-size-asian="9pt" style:font-size-complex="9pt"/>
    </style:style>
    <style:style style:name="T114" style:family="text">
      <style:text-properties fo:color="#1f2328" loext:opacity="100%" style:font-name="Consolas" fo:font-size="9pt" fo:language="en" fo:country="US" style:font-size-asian="9pt" style:font-size-complex="9pt"/>
    </style:style>
    <style:style style:name="T115" style:family="text">
      <style:text-properties style:font-size-complex="9pt"/>
    </style:style>
    <style:style style:name="T116" style:family="text">
      <style:text-properties fo:color="#cf222e" loext:opacity="100%" style:font-name="Consolas" fo:font-size="9pt" fo:language="en" fo:country="US" style:font-size-asian="9pt" style:font-size-complex="9pt"/>
    </style:style>
    <style:style style:name="T117" style:family="text">
      <style:text-properties fo:color="#795e26" loext:opacity="100%" style:font-name="Consolas" fo:font-size="9pt" fo:language="en" fo:country="US" style:font-size-asian="9pt" style:font-size-complex="9pt"/>
    </style:style>
    <style:style style:name="T118" style:family="text">
      <style:text-properties fo:color="#0550ae" loext:opacity="100%" style:font-name="Consolas" fo:font-size="9pt" fo:language="en" fo:country="US" style:font-size-asian="9pt" style:font-size-complex="9pt"/>
    </style:style>
    <style:style style:name="T119" style:family="text">
      <style:text-properties fo:color="#0a3069" loext:opacity="100%" style:font-name="Consolas" fo:font-size="9pt" style:font-size-asian="9pt" style:font-size-complex="9pt"/>
    </style:style>
    <style:style style:name="T120" style:family="text">
      <style:text-properties fo:color="#098658" loext:opacity="100%" style:font-name="Consolas" fo:font-size="9pt" fo:language="en" fo:country="US" style:font-size-asian="9pt" style:font-size-complex="9pt"/>
    </style:style>
    <style:style style:name="T121" style:family="text">
      <style:text-properties fo:color="#0000ff" loext:opacity="100%" style:font-name="Consolas" fo:font-size="9pt" fo:language="en" fo:country="US" style:font-size-asian="9pt" style:font-size-complex="9pt"/>
    </style:style>
    <style:style style:name="T122" style:family="text">
      <style:text-properties fo:color="#6e7781" loext:opacity="100%" style:font-name="Consolas" fo:font-size="9pt" fo:language="en" fo:country="US" style:font-size-asian="9pt" style:font-size-complex="9pt"/>
    </style:style>
    <style:style style:name="T123" style:family="text">
      <style:text-properties fo:color="#6e7781" loext:opacity="100%" style:font-name="Consolas" fo:font-size="9pt" style:font-size-asian="9pt" style:font-size-complex="9pt"/>
    </style:style>
    <style:style style:name="T124" style:family="text">
      <style:text-properties fo:color="#202020" loext:opacity="100%" style:font-name="Consolas" fo:font-size="9pt" style:font-size-asian="9pt" style:font-size-complex="9pt"/>
    </style:style>
    <style:style style:name="T125" style:family="text">
      <style:text-properties fo:color="#cf222e" loext:opacity="100%" style:font-name="Consolas" fo:font-size="9pt" style:font-size-asian="9pt" style:font-size-complex="9pt"/>
    </style:style>
    <style:style style:name="T126" style:family="text">
      <style:text-properties fo:color="#953800" loext:opacity="100%" style:font-name="Consolas" fo:font-size="9pt" style:font-size-asian="9pt" style:font-size-complex="9pt"/>
    </style:style>
    <style:style style:name="T127" style:family="text">
      <style:text-properties fo:font-size="11pt" fo:font-weight="bold" style:font-size-asian="11pt" style:font-weight-asian="bold" style:font-size-complex="11pt" style:font-weight-complex="bold"/>
    </style:style>
    <style:style style:name="T128" style:family="text">
      <style:text-properties fo:color="#8250df" loext:opacity="100%" style:font-name="Consolas" fo:font-size="9pt" style:font-size-asian="9pt" style:font-size-complex="9pt"/>
    </style:style>
    <style:style style:name="T129" style:family="text">
      <style:text-properties fo:font-weight="bold" style:font-weight-asian="bold" style:font-size-complex="9pt" style:font-weight-complex="bold"/>
    </style:style>
    <style:style style:name="T130" style:family="text">
      <style:text-properties fo:color="#202020" loext:opacity="100%" style:font-name="Consolas" fo:font-size="10.5pt" fo:language="en" fo:country="US" style:font-size-asian="10.5pt" style:font-size-complex="10.5pt"/>
    </style:style>
    <style:style style:name="T131" style:family="text">
      <style:text-properties style:font-name="GOST type A" fo:font-size="12pt" fo:language="ru" fo:country="RU" style:font-size-asian="12pt" style:font-size-complex="12pt"/>
    </style:style>
    <style:style style:name="T132" style:family="text">
      <style:text-properties style:font-name="GOST type A" fo:font-size="12pt" style:font-size-asian="12pt" style:font-size-complex="12pt"/>
    </style:style>
    <style:style style:name="T133" style:family="text">
      <style:text-properties style:font-name="GOST type A" fo:font-size="12pt" fo:language="en" fo:country="US" style:font-size-asian="12pt" style:font-size-complex="12pt"/>
    </style:style>
    <style:style style:name="T134" style:family="text">
      <style:text-properties style:font-name="Calibri1" fo:font-size="20pt" style:font-size-asian="20pt"/>
    </style:style>
    <style:style style:name="T135" style:family="text">
      <style:text-properties style:font-name="GOST type A" fo:font-size="20pt" fo:font-style="italic" style:font-size-asian="20pt" style:font-style-asian="italic" style:font-style-complex="italic"/>
    </style:style>
    <style:style style:name="T136" style:family="text">
      <style:text-properties style:font-name="GOST type A" fo:font-size="20pt" fo:language="en" fo:country="US" fo:font-style="italic" style:font-size-asian="20pt" style:font-style-asian="italic" style:font-style-complex="italic"/>
    </style:style>
    <style:style style:name="T137" style:family="text">
      <style:text-properties fo:color="#212529" loext:opacity="100%" fo:font-family="'Segoe UI'" style:font-family-generic="swiss" style:font-pitch="variable" fo:background-color="#ffffff" loext:char-shading-value="0" style:font-family-complex="'Segoe UI'" style:font-family-generic-complex="system" style:font-pitch-complex="variable"/>
    </style:style>
    <style:style style:name="T138" style:family="text">
      <style:text-properties style:font-name="GOST type A"/>
    </style:style>
    <style:style style:name="T139" style:family="text">
      <style:text-properties fo:font-size="9pt" fo:language="ru" fo:country="RU" style:font-size-asian="9pt"/>
    </style:style>
    <style:style style:name="T140" style:family="text">
      <style:text-properties style:font-name="Times New Roman" fo:font-size="9pt" style:font-size-asian="9pt" style:font-size-complex="9pt"/>
    </style:style>
    <style:style style:name="T141" style:family="text">
      <style:text-properties style:font-name="GOST type A" fo:font-size="18pt" fo:font-style="italic" style:font-size-asian="18pt" style:font-style-asian="italic" style:font-size-complex="16pt" style:font-style-complex="italic"/>
    </style:style>
    <style:style style:name="T142" style:family="text">
      <style:text-properties style:font-name="GOST type A" fo:font-style="italic" style:font-style-asian="italic" style:font-size-complex="11pt" style:font-style-complex="italic"/>
    </style:style>
    <style:style style:name="T143" style:family="text">
      <style:text-properties style:font-name="GOST type A" fo:font-size="24pt" fo:language="en" fo:country="US" fo:font-style="italic" style:font-size-asian="24pt" style:font-style-asian="italic" style:font-size-complex="24pt"/>
    </style:style>
    <style:style style:name="T144" style:family="text">
      <style:text-properties style:font-name="GOST type A" fo:font-size="26pt" fo:font-style="italic" style:font-size-asian="26pt" style:font-style-asian="italic" style:font-size-complex="26pt"/>
    </style:style>
    <style:style style:name="T145" style:family="text">
      <style:text-properties fo:font-family="Arial" style:font-family-generic="swiss" style:font-pitch="variable" fo:font-size="26pt" fo:font-style="italic" style:font-size-asian="26pt" style:font-style-asian="italic" style:font-name-complex="Arial" style:font-size-complex="26pt"/>
    </style:style>
    <style:style style:name="T146" style:family="text">
      <style:text-properties style:font-name="GOST type A" fo:font-size="26pt" fo:language="en" fo:country="US" fo:font-style="italic" style:font-size-asian="26pt" style:font-style-asian="italic" style:font-size-complex="26pt"/>
    </style:style>
    <style:style style:name="T147" style:family="text">
      <style:text-properties style:font-name="GOST type A" fo:font-style="italic" style:font-style-asian="italic"/>
    </style:style>
    <style:style style:name="T148" style:family="text">
      <style:text-properties style:font-name="GOST type A" fo:font-size="18pt" fo:font-style="italic" style:font-name-asian="Calibri2" style:font-size-asian="18pt" style:font-style-asian="italic" style:font-size-complex="18pt"/>
    </style:style>
    <style:style style:name="fr1"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0mm, 0mm)" draw:luminance="0%" draw:contrast="0%" draw:red="0%" draw:green="0%" draw:blue="0%" draw:gamma="100%" draw:color-inversion="false" draw:image-opacity="100%" draw:color-mode="standard" loext:decorative="false"/>
    </style:style>
    <style:style style:name="fr2" style:family="graphic" style:parent-style-name="Formula">
      <style:graphic-properties fo:margin-left="0mm" fo:margin-right="0mm" fo:margin-top="0mm" fo:margin-bottom="0mm" style:vertical-pos="middle" style:vertical-rel="text" draw:ole-draw-aspect="1"/>
    </style:style>
    <style:style style:name="Sect1" style:family="section">
      <style:section-properties style:editable="false">
        <style:columns fo:column-count="1" fo:column-gap="0mm"/>
      </style:section-properties>
    </style:style>
    <style:style style:name="gr1" style:family="graphic">
      <style:graphic-properties draw:stroke="none" svg:stroke-width="0mm" draw:fill="none" loext:fill-use-slide-background="fals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loext:decorative="false" fo:margin-left="0mm" fo:margin-right="0mm" fo:margin-top="0mm" fo:margin-bottom="0m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mm" draw:fill="none" loext:fill-use-slide-background="false" draw:textarea-vertical-align="top" draw:auto-grow-height="false" fo:min-height="4.67mm" fo:min-width="23.11mm" fo:padding-top="0.35mm" fo:padding-bottom="0.35mm" fo:padding-left="0.35mm" fo:padding-right="0.35mm" fo:wrap-option="wrap" loext:decorative="false" fo:margin-left="0mm" fo:margin-right="0.02mm" fo:margin-top="0mm" fo:margin-bottom="0m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fo:margin-left="0mm" fo:margin-right="0.67mm" fo:margin-top="0mm" fo:margin-bottom="0.65m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71mm" svg:stroke-color="#000000" draw:stroke-linejoin="miter" draw:fill="none" loext:fill-use-slide-background="false" draw:textarea-vertical-align="top" draw:auto-grow-height="false" fo:min-height="0mm" fo:min-width="0mm" fo:padding-top="1.27mm" fo:padding-bottom="1.27mm" fo:padding-left="2.54mm" fo:padding-right="2.54mm" fo:wrap-option="wrap" loext:decorative="false" style:run-through="background"/>
    </style:style>
    <style:style style:name="gr5" style:family="graphic">
      <style:graphic-properties draw:stroke="solid" svg:stroke-width="0.71mm" svg:stroke-color="#000000" draw:stroke-linejoin="round" draw:fill="none" loext:fill-use-slide-background="false" draw:textarea-horizontal-align="center" draw:textarea-vertical-align="top" draw:auto-grow-height="false" fo:padding-top="0mm" fo:padding-bottom="0mm" fo:padding-left="0mm" fo:padding-right="0mm" fo:wrap-option="wrap" loext:decorative="false" style:run-through="background"/>
    </style:style>
    <style:style style:name="gr6" style:family="graphic">
      <style:graphic-properties draw:stroke="solid" svg:stroke-width="0.35mm" svg:stroke-color="#000000" draw:stroke-linejoin="round" draw:fill="none" loext:fill-use-slide-background="false" draw:textarea-horizontal-align="center" draw:textarea-vertical-align="top" draw:auto-grow-height="false" fo:padding-top="0mm" fo:padding-bottom="0mm" fo:padding-left="0mm" fo:padding-right="0mm" fo:wrap-option="wrap" loext:decorative="false" style:run-through="background"/>
    </style:style>
    <style:style style:name="gr7" style:family="graphic" style:parent-style-name="Frame">
      <style:graphic-properties draw:stroke="none" svg:stroke-width="0mm" draw:fill="none" loext:fill-use-slide-background="false" draw:textarea-vertical-align="top" draw:auto-grow-height="false" fo:min-height="0mm" fo:min-width="0mm" fo:padding-top="0.35mm" fo:padding-bottom="0.35mm" fo:padding-left="0.35mm" fo:padding-right="0.35mm" fo:wrap-option="wrap" loext:decorative="false" style:run-through="background"/>
    </style:style>
    <style:style style:name="gr8" style:family="graphic" style:parent-style-name="Frame">
      <style:graphic-properties draw:stroke="none" svg:stroke-width="0mm" draw:fill="none" loext:fill-use-slide-background="false" draw:textarea-vertical-align="middle" draw:auto-grow-height="false" fo:min-height="0mm" fo:min-width="0mm" fo:padding-top="0mm" fo:padding-bottom="0mm" fo:padding-left="0mm" fo:padding-right="0mm" fo:wrap-option="wrap" loext:decorative="false" style:run-through="background"/>
    </style:style>
    <style:style style:name="gr9" style:family="graphic">
      <style:graphic-properties style:writing-mode="lr-tb" loext:decorative="false" style:run-through="background"/>
    </style:style>
    <style:style style:name="gr10" style:family="graphic" style:parent-style-name="Frame">
      <style:graphic-properties draw:stroke="none" svg:stroke-width="0mm" draw:fill="none" loext:fill-use-slide-background="false" draw:textarea-vertical-align="middle" draw:auto-grow-height="false" fo:min-height="0mm" fo:min-width="0mm" fo:padding-top="0.35mm" fo:padding-bottom="0.35mm" fo:padding-left="0.35mm" fo:padding-right="0.35mm" fo:wrap-option="wrap" loext:decorative="false" style:run-through="background"/>
    </style:style>
    <style:style style:name="gr11" style:family="graphic">
      <style:graphic-properties style:writing-mode="lr-tb" loext:decorative="false" fo:margin-left="0mm" fo:margin-right="0.41mm" fo:margin-top="0mm" fo:margin-bottom="0.93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06069033"/><text:span text:style-name="T2">МИНИСТЕРСТВО</text:span><text:span text:style-name="T1"> НАУКИ И ВЫСШЕГО ОБРАЗОВАНИЯ РОССИЙСКОЙ ФЕДЕРАЦИИ</text:span></text:p>
      <text:p text:style-name="P2"><text:span text:style-name="T3">федеральное</text:span> государственное бюджетное образовательное учреждение</text:p>
      <text:p text:style-name="P2">высшего образования</text:p>
      <text:p text:style-name="P3" loext:marker-style-name="T1"><text:span text:style-name="T2">«УЛЬЯНОВСКИЙ</text:span><text:span text:style-name="T1"> ГОСУДАРСТВЕННЫЙ ТЕХНИЧЕСКИЙ УНИВЕРСИТЕТ»</text:span></text:p>
      <text:p text:style-name="P4">Факультет <text:span text:style-name="T4"><text:tab/></text:span><text:span text:style-name="T5">ИСТ</text:span><text:span text:style-name="T4"><text:tab/><text:tab/><text:tab/><text:tab/><text:tab/></text:span> Кафедра <text:span text:style-name="T4"><text:tab/></text:span><text:span text:style-name="T5">ИВК</text:span><text:span text:style-name="T4"><text:tab/><text:tab/><text:tab/><text:tab/><text:tab/></text:span></text:p>
      <text:p text:style-name="P4"/>
      <text:p text:style-name="P5"><text:tab/><text:tab/><text:tab/><text:tab/><text:tab/><text:tab/><text:tab/><text:tab/>К ЗАЩИТЕ ДОПУСТИТЬ</text:p>
      <text:p text:style-name="P4"><text:tab/><text:tab/><text:tab/><text:tab/><text:tab/><text:tab/><text:tab/><text:tab/>Зав. кафедрой</text:p>
      <text:p text:style-name="P6"><text:tab/><text:tab/><text:tab/><text:tab/><text:tab/><text:tab/><text:tab/><text:tab/><text:span text:style-name="T4"><text:tab/><text:tab/></text:span> / <text:span text:style-name="T4"><text:tab/><text:tab/><text:tab/><text:tab/></text:span> /</text:p>
      <text:p text:style-name="P5" loext:marker-style-name="T6"><text:span text:style-name="T7"><text:tab/><text:tab/><text:tab/><text:tab/><text:tab/><text:tab/><text:tab/><text:tab/></text:span><text:span text:style-name="T6"> <text:s text:c="8"/>подпись<text:tab/><text:tab/>инициалы, фамилия</text:span></text:p>
      <text:p text:style-name="P4"><text:tab/><text:tab/><text:tab/><text:tab/><text:tab/><text:tab/><text:tab/><text:tab/>«<text:span text:style-name="T4"><text:tab/></text:span>» <text:span text:style-name="T4"><text:tab/><text:tab/><text:tab/></text:span> 20<text:span text:style-name="T4"><text:tab/></text:span> г.</text:p>
      <text:p text:style-name="P4"/>
      <text:p text:style-name="P3" loext:marker-style-name="T8"><text:span text:style-name="T8">ВЫПУСКНАЯ КВАЛИФИКАЦИОННАЯ РАБОТА</text:span><text:span text:style-name="T8"/></text:p>
      <text:p text:style-name="P7" loext:marker-style-name="T4">Тема<text:tab/><text:span text:style-name="T4"> <text:s text:c="2"/></text:span><text:span text:style-name="T5">Программное обеспечение для управления камерой и обработки данных в системе инфракрасного мониторинга температуры объекта</text:span><text:span text:style-name="T4"><text:tab/><text:tab/><text:tab/><text:tab/><text:tab/><text:tab/><text:tab/><text:tab/><text:tab/><text:tab/><text:tab/><text:tab/><text:tab/><text:tab/><text:tab/><text:tab/><text:tab/><text:tab/><text:tab/><text:tab/><text:tab/></text:span></text:p>
      <text:p text:style-name="P8">Обучающийся<text:tab/><text:tab/><text:span text:style-name="T4"><text:tab/><text:tab/><text:tab/><text:tab/><text:tab/></text:span> / <text:span text:style-name="T4"><text:tab/><text:tab/></text:span><text:span text:style-name="T5">Н.Н. Лашманов</text:span><text:span text:style-name="T4"> <text:s text:c="7"/></text:span><text:s/>/</text:p>
      <text:p text:style-name="P4" loext:marker-style-name="T6"><text:span text:style-name="T7"><text:tab/><text:tab/><text:tab/><text:tab/><text:tab/><text:tab/></text:span><text:span text:style-name="T6">подпись<text:tab/><text:tab/><text:tab/><text:tab/><text:tab/>инициалы, фамилия</text:span></text:p>
      <text:p text:style-name="P4" loext:marker-style-name="T4">Обозначение работы <text:span text:style-name="T4"><text:tab/><text:tab/></text:span><text:span text:style-name="T9">В</text:span><text:span text:style-name="T5">КР-УлГТУ-09.03.02-22/2410-2026</text:span><text:span text:style-name="T4"><text:tab/></text:span> Группа <text:span text:style-name="T4"><text:s text:c="2"/></text:span><text:span text:style-name="T5">ИСТбд-41<text:tab/></text:span></text:p>
      <text:p text:style-name="P6" loext:marker-style-name="T4">Направление подготовки <text:span text:style-name="T4"><text:tab/><text:tab/></text:span><text:span text:style-name="T5">09.03.02 «Информационные системы и технологии»<text:tab/></text:span><text:span text:style-name="T4"><text:tab/></text:span></text:p>
      <text:p text:style-name="P5" loext:marker-style-name="T6"><text:span text:style-name="T7"><text:tab/><text:tab/><text:tab/><text:tab/><text:tab/><text:tab/><text:tab/><text:tab/></text:span><text:span text:style-name="T6">код, наименование</text:span></text:p>
      <text:p text:style-name="P4" loext:marker-style-name="T4"><text:span text:style-name="T4"><text:tab/><text:tab/><text:tab/><text:tab/><text:tab/><text:tab/><text:tab/><text:tab/><text:tab/><text:tab/><text:tab/><text:tab/><text:tab/><text:tab/></text:span><text:span text:style-name="T4"/></text:p>
      <text:p text:style-name="P6">Руководитель работы<text:tab/><text:span text:style-name="T4"><text:tab/><text:tab/><text:tab/><text:tab/><text:tab/></text:span> / <text:span text:style-name="T4"><text:tab/><text:tab/></text:span><text:span text:style-name="T5">М.В. Тамьярова</text:span><text:span text:style-name="T4"><text:tab/></text:span> /</text:p>
      <text:p text:style-name="P4" loext:marker-style-name="T7"><text:span text:style-name="T7"><text:tab/><text:tab/><text:tab/><text:tab/><text:tab/><text:tab/></text:span><text:span text:style-name="T6">подпись<text:tab/><text:tab/><text:tab/><text:tab/><text:tab/>инициалы, фамилия</text:span></text:p>
      <text:p text:style-name="P4">Консультанты:</text:p>
      <text:p text:style-name="P6"><text:span text:style-name="T4">Экономический раздел</text:span> <text:tab/><text:span text:style-name="T4"><text:tab/><text:tab/><text:tab/><text:tab/><text:tab/></text:span> / <text:span text:style-name="T4"><text:tab/><text:tab/></text:span><text:span text:style-name="T5">М.В. Рыбкина</text:span><text:span text:style-name="T4"><text:tab/></text:span> /</text:p>
      <text:p text:style-name="P4" loext:marker-style-name="T7"><text:span text:style-name="T7"><text:s text:c="3"/>наименование раздела<text:tab/><text:tab/><text:tab/><text:tab/></text:span><text:span text:style-name="T6">подпись, дата<text:tab/><text:tab/><text:tab/><text:tab/>инициалы, фамилия</text:span></text:p>
      <text:p text:style-name="P9"/>
      <text:p text:style-name="P9"/>
      <text:p text:style-name="P9"/>
      <text:p text:style-name="P9"/>
      <text:p text:style-name="P9"/>
      <text:p text:style-name="P9"/>
      <text:p text:style-name="P3">Ульяновск, 2026</text:p>
      <text:p text:style-name="P3" loext:marker-style-name="T1"><text:soft-page-break/><text:span text:style-name="T2">МИНИСТЕРСТВО</text:span><text:span text:style-name="T1"> НАУКИ И ВЫСШЕГО ОБРАЗОВАНИЯ РОССИЙСКОЙ ФЕДЕРАЦИИ</text:span></text:p>
      <text:p text:style-name="P2"><text:span text:style-name="T3">федеральное</text:span> государственное бюджетное образовательное учреждение</text:p>
      <text:p text:style-name="P2">высшего образования</text:p>
      <text:p text:style-name="P3" loext:marker-style-name="T1"><text:span text:style-name="T2">«УЛЬЯНОВСКИЙ</text:span><text:span text:style-name="T1"> ГОСУДАРСТВЕННЫЙ ТЕХНИЧЕСКИЙ УНИВЕРСИТЕТ»</text:span></text:p>
      <text:p text:style-name="P4" loext:marker-style-name="T4">Факультет <text:span text:style-name="T4"><text:tab/></text:span><text:span text:style-name="T5">ИСТ<text:tab/></text:span><text:span text:style-name="T4"><text:tab/><text:tab/><text:tab/><text:tab/></text:span> Кафедра <text:span text:style-name="T4"><text:tab/></text:span><text:span text:style-name="T5">ИВК<text:tab/></text:span><text:span text:style-name="T4"><text:tab/><text:tab/><text:tab/><text:tab/></text:span></text:p>
      <text:p text:style-name="P4">Направление подготовки <text:span text:style-name="T4"><text:tab/></text:span><text:span text:style-name="T5">информационные системы и технологии<text:tab/></text:span><text:span text:style-name="T4"><text:tab/><text:tab/><text:tab/><text:tab/></text:span></text:p>
      <text:p text:style-name="P4"/>
      <text:p text:style-name="P5"><text:tab/><text:tab/><text:tab/><text:tab/><text:tab/><text:tab/><text:tab/><text:tab/>УТВЕРЖДАЮ</text:p>
      <text:p text:style-name="P4"><text:tab/><text:tab/><text:tab/><text:tab/><text:tab/><text:tab/><text:tab/><text:tab/>Зав. кафедрой</text:p>
      <text:p text:style-name="P6"><text:tab/><text:tab/><text:tab/><text:tab/><text:tab/><text:tab/><text:tab/><text:tab/><text:span text:style-name="T4"><text:tab/><text:tab/></text:span> / <text:span text:style-name="T4"><text:tab/><text:tab/><text:tab/><text:tab/></text:span> /</text:p>
      <text:p text:style-name="P5" loext:marker-style-name="T6"><text:span text:style-name="T7"><text:tab/><text:tab/><text:tab/><text:tab/><text:tab/><text:tab/><text:tab/><text:tab/></text:span><text:span text:style-name="T6"> <text:s text:c="8"/>подпись<text:tab/><text:tab/>инициалы, фамилия</text:span></text:p>
      <text:p text:style-name="P4"><text:tab/><text:tab/><text:tab/><text:tab/><text:tab/><text:tab/><text:tab/><text:tab/>«<text:span text:style-name="T4"><text:tab/></text:span>» <text:span text:style-name="T4"><text:tab/><text:tab/><text:tab/></text:span> 20<text:span text:style-name="T4"><text:tab/></text:span> г.</text:p>
      <text:p text:style-name="P4"/>
      <text:p text:style-name="P10">ЗАДАНИЕ</text:p>
      <text:p text:style-name="P3" loext:marker-style-name="T1"><text:span text:style-name="T1">на выпускную квалификационную работу</text:span><text:span text:style-name="T1"/></text:p>
      <text:p text:style-name="P6" loext:marker-style-name="T4">обучающемуся <text:span text:style-name="T4"><text:tab/></text:span><text:span text:style-name="T5">Лашманову Николаю Николаевичу </text:span><text:span text:style-name="T4"><text:tab/></text:span> курса <text:span text:style-name="T4"><text:tab/> <text:s text:c="4"/></text:span><text:span text:style-name="T5">4</text:span><text:span text:style-name="T4"><text:tab/></text:span> группы <text:span text:style-name="T4"><text:s text:c="3"/></text:span><text:span text:style-name="T5">ИСТбд-41</text:span><text:span text:style-name="T4"><text:tab/></text:span></text:p>
      <text:p text:style-name="P11"><text:span text:style-name="T6">фамилия, имя, отчество</text:span></text:p>
      <text:p text:style-name="P12" loext:marker-style-name="T4">1. Тема работы <text:span text:style-name="T5">Программное обеспечение для управления камерой и обработки данных в системе инфракрасного мониторинга температуры объекта<text:tab/></text:span><text:span text:style-name="T4"><text:tab/> <text:s text:c="23"/><text:tab/><text:tab/><text:tab/><text:tab/><text:tab/><text:tab/><text:tab/><text:tab/><text:tab/><text:tab/><text:tab/><text:tab/><text:tab/><text:tab/><text:tab/></text:span></text:p>
      <text:p text:style-name="P13">утверждена приказом по университету № <text:span text:style-name="T4"><text:s text:c="2"/>6</text:span><text:span text:style-name="T5">4</text:span><text:span text:style-name="T4"><text:tab/></text:span> от «<text:span text:style-name="T5">15</text:span>» <text:span text:style-name="T4"><text:tab/><text:tab/></text:span><text:span text:style-name="T5">января <text:s text:c="20"/></text:span><text:span text:style-name="T4"><text:tab/></text:span>20<text:span text:style-name="T4"> </text:span><text:span text:style-name="T5">26</text:span> г.</text:p>
      <text:p text:style-name="P12">2. Срок сдачи обучающимся законченной работы «<text:span text:style-name="T5">22</text:span><text:span text:style-name="T4"><text:tab/></text:span>» <text:span text:style-name="T4"><text:tab/><text:tab/></text:span><text:span text:style-name="T5">июня</text:span><text:span text:style-name="T4"><text:tab/><text:tab/> <text:s text:c="10"/></text:span><text:s/>20<text:span text:style-name="T4"> </text:span><text:span text:style-name="T5">26 </text:span>г.</text:p>
      <text:p text:style-name="P14" loext:marker-style-name="T10">3. Исходные данные к работе <text:span text:style-name="T10">Создать </text:span><text:span text:style-name="T5">программное обеспечение для управления камерой и обработки данных в системе инфракрасного мониторинга температуры объекта</text:span><text:span text:style-name="T10"><text:line-break/> <text:s text:c="16"/></text:span><text:span text:style-name="T4"><text:s text:c="146"/></text:span></text:p>
      <text:p text:style-name="P14" loext:marker-style-name="T4">4. Содержание пояснительной записки <text:span text:style-name="T4"><text:tab/></text:span><text:span text:style-name="T5">техническое задание на создание системы; информационное, алгоритмическое, программное обеспечение системы; тестирование системы.</text:span><text:span text:style-name="T4">_________________________________________________________________________ <text:s text:c="12"/><text:tab/> <text:s text:c="10"/><text:tab/><text:tab/><text:tab/><text:tab/><text:tab/><text:tab/>_________________________________________ <text:s text:c="124"/></text:span></text:p>
      <text:p text:style-name="P14" loext:marker-style-name="T4">5. Перечень графического материала (чертежей) <text:span text:style-name="T10">схема алгоритма компиляции программного кода примеров (чертёж формата А1 по ГОСТ 19.701-90), концептуальная схема базы данных (чертёж формата <text:s/>А1 <text:s/>в нотации </text:span><text:span text:style-name="T11">IDEF</text:span><text:span text:style-name="T10">1</text:span><text:span text:style-name="T11">X</text:span><text:span text:style-name="T10">).</text:span><text:span text:style-name="T5">____________________________________________</text:span><text:span text:style-name="T4"><text:tab/>____________________________________________________________________________</text:span></text:p>
      <text:p text:style-name="P15">6. Календарный график работы на весь период (с указанием сроков выполнения и содержания отдельных этапов)</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6" loext:marker-style-name="T12"><text:span text:style-name="T12">№ этапа</text:span><text:span text:style-name="T12"/></text:p>
          </table:table-cell>
          <table:table-cell table:style-name="Таблица1.A1" office:value-type="string">
            <text:p text:style-name="P16" loext:marker-style-name="T12"><text:span text:style-name="T12">Содержание этапа</text:span><text:span text:style-name="T12"/></text:p>
          </table:table-cell>
          <table:table-cell table:style-name="Таблица1.A1" office:value-type="string">
            <text:p text:style-name="P16" loext:marker-style-name="T12"><text:span text:style-name="T12">Срок выполнения</text:span><text:span text:style-name="T12"/></text:p>
          </table:table-cell>
        </table:table-row>
        <table:table-row table:style-name="Таблица1.1">
          <table:table-cell table:style-name="Таблица1.A1" office:value-type="string">
            <text:p text:style-name="P17" loext:marker-style-name="T13"><text:span text:style-name="T13">1</text:span><text:span text:style-name="T13"/></text:p>
          </table:table-cell>
          <table:table-cell table:style-name="Таблица1.B2" office:value-type="string">
            <text:p text:style-name="P18" loext:marker-style-name="T13"><text:span text:style-name="T14">Реализация предварительной версии системы и её показ на выставке программных продуктов недели студенческой науки</text:span><text:span text:style-name="T14"/></text:p>
          </table:table-cell>
          <table:table-cell table:style-name="Таблица1.C2" office:value-type="string">
            <text:p text:style-name="P19" loext:marker-style-name="T13"><text:span text:style-name="T13">14.04.2026</text:span><text:span text:style-name="T13"/></text:p>
          </table:table-cell>
        </table:table-row>
        <table:table-row table:style-name="Таблица1.1">
          <table:table-cell table:style-name="Таблица1.A1" office:value-type="string">
            <text:p text:style-name="P17" loext:marker-style-name="T13"><text:span text:style-name="T13">2</text:span><text:span text:style-name="T13"/></text:p>
          </table:table-cell>
          <table:table-cell table:style-name="Таблица1.B3" office:value-type="string">
            <text:p text:style-name="P18" loext:marker-style-name="T13"><text:span text:style-name="T14">Реализация окончательной версии системы</text:span><text:span text:style-name="T14"/></text:p>
          </table:table-cell>
          <table:table-cell table:style-name="Таблица1.C3" office:value-type="string">
            <text:p text:style-name="P19" loext:marker-style-name="T13"><text:span text:style-name="T13">31.05.2026</text:span><text:span text:style-name="T13"/></text:p>
          </table:table-cell>
        </table:table-row>
        <table:table-row table:style-name="Таблица1.1">
          <table:table-cell table:style-name="Таблица1.A1" office:value-type="string">
            <text:p text:style-name="P17" loext:marker-style-name="T13"><text:span text:style-name="T13">3</text:span><text:span text:style-name="T13"/></text:p>
          </table:table-cell>
          <table:table-cell table:style-name="Таблица1.B4" office:value-type="string">
            <text:p text:style-name="P18" loext:marker-style-name="T13"><text:span text:style-name="T14">Тестирование системы</text:span><text:span text:style-name="T14"/></text:p>
          </table:table-cell>
          <table:table-cell table:style-name="Таблица1.C4" office:value-type="string">
            <text:p text:style-name="P19" loext:marker-style-name="T13"><text:span text:style-name="T13">02.06.2026</text:span><text:span text:style-name="T13"/></text:p>
          </table:table-cell>
        </table:table-row>
        <table:table-row table:style-name="Таблица1.1">
          <table:table-cell table:style-name="Таблица1.A1" office:value-type="string">
            <text:p text:style-name="P17" loext:marker-style-name="T13"><text:span text:style-name="T13">4</text:span><text:span text:style-name="T13"/></text:p>
          </table:table-cell>
          <table:table-cell table:style-name="Таблица1.B5" office:value-type="string">
            <text:p text:style-name="P18" loext:marker-style-name="T14"><text:span text:style-name="T14">Написание пояснительной записки</text:span><text:span text:style-name="T14"/></text:p>
          </table:table-cell>
          <table:table-cell table:style-name="Таблица1.C5" office:value-type="string">
            <text:p text:style-name="P19" loext:marker-style-name="T13"><text:span text:style-name="T13">04.06.2026</text:span><text:span text:style-name="T13"/></text:p>
          </table:table-cell>
        </table:table-row>
        <table:table-row table:style-name="Таблица1.1">
          <table:table-cell table:style-name="Таблица1.A1" office:value-type="string">
            <text:p text:style-name="P17" loext:marker-style-name="T13"><text:span text:style-name="T13">5</text:span><text:span text:style-name="T13"/></text:p>
          </table:table-cell>
          <table:table-cell table:style-name="Таблица1.B6" office:value-type="string">
            <text:p text:style-name="P18" loext:marker-style-name="T13"><text:span text:style-name="T14">Создание чертежей</text:span><text:span text:style-name="T14"/></text:p>
          </table:table-cell>
          <table:table-cell table:style-name="Таблица1.C6" office:value-type="string">
            <text:p text:style-name="P19" loext:marker-style-name="T13"><text:span text:style-name="T13">06.06.2026</text:span><text:span text:style-name="T13"/></text:p>
          </table:table-cell>
        </table:table-row>
        <table:table-row table:style-name="Таблица1.1">
          <table:table-cell table:style-name="Таблица1.A1" office:value-type="string">
            <text:p text:style-name="P17" loext:marker-style-name="T13"><text:span text:style-name="T13">6</text:span><text:span text:style-name="T13"/></text:p>
          </table:table-cell>
          <table:table-cell table:style-name="Таблица1.B7" office:value-type="string">
            <text:p text:style-name="P18" loext:marker-style-name="T13"><text:span text:style-name="T13">Прохождение нормоконтроля</text:span><text:span text:style-name="T13"/></text:p>
          </table:table-cell>
          <table:table-cell table:style-name="Таблица1.C7" office:value-type="string">
            <text:p text:style-name="P19" loext:marker-style-name="T13"><text:span text:style-name="T13">09.06.2026</text:span><text:span text:style-name="T13"/></text:p>
          </table:table-cell>
        </table:table-row>
        <table:table-row table:style-name="Таблица1.1">
          <table:table-cell table:style-name="Таблица1.A1" office:value-type="string">
            <text:p text:style-name="P17" loext:marker-style-name="T13"><text:span text:style-name="T13">7</text:span><text:span text:style-name="T13"/></text:p>
          </table:table-cell>
          <table:table-cell table:style-name="Таблица1.B8" office:value-type="string">
            <text:p text:style-name="P18" loext:marker-style-name="T13"><text:span text:style-name="T13">Защита</text:span><text:span text:style-name="T13"/></text:p>
          </table:table-cell>
          <table:table-cell table:style-name="Таблица1.C8" office:value-type="string">
            <text:p text:style-name="P19" loext:marker-style-name="T13"><text:span text:style-name="T13">23.06.2026</text:span><text:span text:style-name="T13"/></text:p>
          </table:table-cell>
        </table:table-row>
        <table:table-row table:style-name="Таблица1.1">
          <table:table-cell table:style-name="Таблица1.A1" office:value-type="string">
            <text:p text:style-name="P20" loext:marker-style-name="T13"/>
          </table:table-cell>
          <table:table-cell table:style-name="Таблица1.B9" office:value-type="string">
            <text:p text:style-name="P21" loext:marker-style-name="T13"/>
          </table:table-cell>
          <table:table-cell table:style-name="Таблица1.C9" office:value-type="string">
            <text:p text:style-name="P22" loext:marker-style-name="T13"/>
          </table:table-cell>
        </table:table-row>
        <table:table-row table:style-name="Таблица1.1">
          <table:table-cell table:style-name="Таблица1.A1" office:value-type="string">
            <text:p text:style-name="P23"/>
          </table:table-cell>
          <table:table-cell table:style-name="Таблица1.B10" office:value-type="string">
            <text:p text:style-name="P24"/>
          </table:table-cell>
          <table:table-cell table:style-name="Таблица1.C10" office:value-type="string">
            <text:p text:style-name="P24"/>
          </table:table-cell>
        </table:table-row>
        <table:table-row table:style-name="Таблица1.1">
          <table:table-cell table:style-name="Таблица1.A1" office:value-type="string">
            <text:p text:style-name="P23"/>
          </table:table-cell>
          <table:table-cell table:style-name="Таблица1.B11" office:value-type="string">
            <text:p text:style-name="P24"/>
          </table:table-cell>
          <table:table-cell table:style-name="Таблица1.C11" office:value-type="string">
            <text:p text:style-name="P24"/>
          </table:table-cell>
        </table:table-row>
        <table:table-row table:style-name="Таблица1.1">
          <table:table-cell table:style-name="Таблица1.A1" office:value-type="string">
            <text:p text:style-name="P23"/>
          </table:table-cell>
          <table:table-cell table:style-name="Таблица1.B12" office:value-type="string">
            <text:p text:style-name="P24"/>
          </table:table-cell>
          <table:table-cell table:style-name="Таблица1.C12" office:value-type="string">
            <text:p text:style-name="P24"/>
          </table:table-cell>
        </table:table-row>
        <table:table-row table:style-name="Таблица1.1">
          <table:table-cell table:style-name="Таблица1.A1" office:value-type="string">
            <text:p text:style-name="P23"/>
          </table:table-cell>
          <table:table-cell table:style-name="Таблица1.B13" office:value-type="string">
            <text:p text:style-name="P24"/>
          </table:table-cell>
          <table:table-cell table:style-name="Таблица1.C13" office:value-type="string">
            <text:p text:style-name="P24"/>
          </table:table-cell>
        </table:table-row>
      </table:table>
      <text:p text:style-name="P4"/>
      <text:p text:style-name="P25">7. Консультанты</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2" office:value-type="string">
            <text:p text:style-name="P16" loext:marker-style-name="T12"><text:span text:style-name="T12">Раздел</text:span><text:span text:style-name="T12"/></text:p>
          </table:table-cell>
          <table:table-cell table:style-name="Таблица2.A1" table:number-rows-spanned="2" office:value-type="string">
            <text:p text:style-name="P16" loext:marker-style-name="T12"><text:span text:style-name="T12">Ф.И.О. консультанта</text:span><text:span text:style-name="T12"/></text:p>
          </table:table-cell>
          <table:table-cell table:style-name="Таблица2.A1" table:number-columns-spanned="2" office:value-type="string">
            <text:p text:style-name="P16" loext:marker-style-name="T12"><text:span text:style-name="T12">Подпись, дата</text:span><text:span text:style-name="T12"/></text:p>
          </table:table-cell>
          <table:covered-table-cell/>
        </table:table-row>
        <table:table-row table:style-name="Таблица2.1">
          <table:covered-table-cell table:style-name="Таблица2.A1"/>
          <table:covered-table-cell table:style-name="Таблица2.A1"/>
          <table:table-cell table:style-name="Таблица2.A1" office:value-type="string">
            <text:p text:style-name="P16">задание выдал</text:p>
          </table:table-cell>
          <table:table-cell table:style-name="Таблица2.A1" office:value-type="string">
            <text:p text:style-name="P16">задание принял</text:p>
          </table:table-cell>
        </table:table-row>
        <table:table-row table:style-name="Таблица2.1">
          <table:table-cell table:style-name="Таблица2.A3" office:value-type="string">
            <text:p text:style-name="P26" loext:marker-style-name="T15"><text:span text:style-name="T15">Экономический раздел</text:span><text:span text:style-name="T15"/></text:p>
          </table:table-cell>
          <table:table-cell table:style-name="Таблица2.B3" office:value-type="string">
            <text:p text:style-name="P26" loext:marker-style-name="T15"><text:span text:style-name="T15">М.В. Рыбкина</text:span><text:span text:style-name="T15"/></text:p>
          </table:table-cell>
          <table:table-cell table:style-name="Таблица2.C3" office:value-type="string">
            <text:p text:style-name="P27" loext:marker-style-name="T13"/>
          </table:table-cell>
          <table:table-cell table:style-name="Таблица2.D3" office:value-type="string">
            <text:p text:style-name="P27" loext:marker-style-name="T13"/>
          </table:table-cell>
        </table:table-row>
        <table:table-row table:style-name="Таблица2.1">
          <table:table-cell table:style-name="Таблица2.A4" office:value-type="string">
            <text:p text:style-name="P26"/>
          </table:table-cell>
          <table:table-cell table:style-name="Таблица2.B4" office:value-type="string">
            <text:p text:style-name="P26"/>
          </table:table-cell>
          <table:table-cell table:style-name="Таблица2.C4" office:value-type="string">
            <text:p text:style-name="P26"/>
          </table:table-cell>
          <table:table-cell table:style-name="Таблица2.D4" office:value-type="string">
            <text:p text:style-name="P26"/>
          </table:table-cell>
        </table:table-row>
      </table:table>
      <text:p text:style-name="P4"/>
      <text:p text:style-name="P25">8. Дата выдачи задания «<text:span text:style-name="T5">17</text:span>» <text:span text:style-name="T4"><text:tab/></text:span><text:span text:style-name="T5">марта</text:span><text:span text:style-name="T4"><text:tab/><text:tab/></text:span> 20<text:span text:style-name="T4"> </text:span><text:span text:style-name="T5">26</text:span><text:span text:style-name="T4"><text:tab/></text:span> г.</text:p>
      <text:p text:style-name="P28">Руководитель <text:span text:style-name="T4"><text:tab/></text:span><text:span text:style-name="T5">доцент каф. ИВК, к.т.н., доцент</text:span><text:span text:style-name="T4"><text:tab/></text:span> <text:s text:c="4"/><text:span text:style-name="T4"><text:tab/><text:tab/> <text:s text:c="3"/></text:span><text:s/>/ <text:span text:style-name="T4"><text:s text:c="9"/></text:span><text:span text:style-name="T5">М. В. Тамьярова</text:span><text:span text:style-name="T4"><text:tab/></text:span> /</text:p>
      <text:p text:style-name="P25" loext:marker-style-name="T6"><text:span text:style-name="T6"><text:tab/><text:tab/><text:tab/> <text:s text:c="3"/>должность, учёная степень, учёное звание<text:tab/><text:tab/>подпись <text:s text:c="28"/>инициалы, фамилия</text:span><text:span text:style-name="T6"/></text:p>
      <text:p text:style-name="P28">Задание принял к исполнению <text:tab/><text:tab/><text:tab/> <text:s text:c="5"/><text:span text:style-name="T4"><text:tab/><text:tab/> <text:s text:c="3"/></text:span><text:s/>/ <text:span text:style-name="T4"><text:s text:c="9"/></text:span><text:span text:style-name="T5">Н. Н. Лашманов</text:span><text:span text:style-name="T4"><text:tab/></text:span> /</text:p>
      <text:p text:style-name="P29"><text:span text:style-name="T6">подпись<text:tab/> <text:s text:c="24"/>инициалы, фамилия</text:span></text:p>
      <text:p text:style-name="P30" loext:marker-style-name="T16"><text:span text:style-name="T16"><text:tab/></text:span><text:span text:style-name="T16"/></text:p>
      <text:p text:style-name="P31" loext:marker-style-name="T16"/>
      <text:p text:style-name="P31" loext:marker-style-name="T16"/>
      <text:p text:style-name="P31" loext:marker-style-name="T16"/>
      <text:p text:style-name="P31" loext:marker-style-name="T16"/>
      <text:p text:style-name="P31" loext:marker-style-name="T16"/>
      <text:p text:style-name="P32" loext:marker-style-name="T17"><text:soft-page-break/><text:span text:style-name="T17">АННОТАЦИЯ</text:span><text:span text:style-name="T17"/></text:p>
      <text:p text:style-name="P33" loext:marker-style-name="T18"><text:span text:style-name="T19">Выпускная квалификационная работа:</text:span><text:span text:style-name="T20"> Лашманова Николая Николавича по теме </text:span><text:span text:style-name="T21">«</text:span><text:span text:style-name="T22">Программное обеспечение для управления камерой и обработки данных в системе инфракрасного мониторинга температуры объекта</text:span><text:span text:style-name="T20">». <text:line-break/>Руководитель Тамьярова Майя Владиславовна. Работа защищена на кафедре «Измерительно-вычислительные комплексы» УлГТУ в 2026 году.</text:span></text:p>
      <text:p text:style-name="P34" loext:marker-style-name="T20"><text:span text:style-name="T19">Пояснительная записка</text:span><text:span text:style-name="T20">: 63 страницы, 6 разделов, 1 приложение, <text:line-break/>9 рисунков, 19 таблиц, 21 источник.</text:span></text:p>
      <text:p text:style-name="P34" loext:marker-style-name="T20"><text:span text:style-name="T19">Ключевые слова</text:span><text:span text:style-name="T20">: измерение температуры, датчики, </text:span><text:span text:style-name="T23">Python</text:span><text:span text:style-name="T20">, </text:span><text:span text:style-name="T23">MySQL</text:span><text:span text:style-name="T20">, микроконтроллеры.</text:span></text:p>
      <text:p text:style-name="_5f_Текст" loext:marker-style-name="T16">Разработанное программное обеспечение предназначено для автоматизации процесса инфракрасного мониторинга температуры электронных компонентов, печатных плат и готовых изделий в лабораторных и цеховых условиях. Подсистема обеспечивает приём данных от модуля ESP32-CAM и от подсистемы управления поворотной платформой с датчиком MLX90614. Выполняется автоматическое наложение на оптическое изображение тепловой карты с визуализацией температурных точек в цветовом градиенте. Результаты измерений сохраняются в реляционную базу данных MySQL, а также экспортируются в форматы CSV и DOCX. Программное обеспечение реализовано на языке Python с использованием библиотек Tkinter, Pillow и SciPy. Система является кроссплатформенной, имеет открытый исходный код и может быть использована в учебных и исследовательских целях, а также для интеграции в комплексные системы теплового контроля.<text:span text:style-name="T16"/></text:p>
      <text:p text:style-name="P35" loext:marker-style-name="T16"/>
      <text:p text:style-name="P35" loext:marker-style-name="T16"/>
      <text:p text:style-name="P35" loext:marker-style-name="T16"/>
      <text:p text:style-name="P35" loext:marker-style-name="T16"/>
      <text:p text:style-name="P35" loext:marker-style-name="T16"/>
      <text:p text:style-name="P36"><text:bookmark-end text:name="_Hlk106069033"/><text:bookmark-start text:name="_Toc106598996"/><text:bookmark-start text:name="_Toc43248641"/><text:span text:style-name="T24">СОДЕРЖАНИЕ</text:span><text:span text:style-name="T25"/></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 loext:marker-style-name="T26"><text:a xlink:type="simple" xlink:href="#_Toc232328845" text:style-name="Index_20_Link" text:visited-style-name="Index_20_Link"><text:span text:style-name="T27">СПИСОК ИСПОЛЬЗОВАННЫХ ОБОЗНАЧЕНИЙ И ТЕРМИНОВ</text:span><text:span text:style-name="T28"><text:tab/></text:span><text:span text:style-name="T28">8</text:span></text:a></text:p>
          <text:p text:style-name="P37" loext:marker-style-name="T26"><text:a xlink:type="simple" xlink:href="#_Toc232328846" text:style-name="Index_20_Link" text:visited-style-name="Index_20_Link"><text:span text:style-name="T27">ВВЕДЕНИЕ</text:span><text:span text:style-name="T28"><text:tab/></text:span><text:span text:style-name="T28">9</text:span></text:a></text:p>
          <text:p text:style-name="P37" loext:marker-style-name="T26"><text:a xlink:type="simple" xlink:href="#_Toc232328847" text:style-name="Index_20_Link" text:visited-style-name="Index_20_Link"><text:span text:style-name="T27">1 ТЕХНИЧЕСКОЕ ЗАДАНИЕ НА СОЗДАНИЕ СИСТЕМЫ</text:span><text:span text:style-name="T28"><text:tab/></text:span><text:span text:style-name="T28">12</text:span></text:a></text:p>
          <text:p text:style-name="P38" loext:marker-style-name="T29"><text:a xlink:type="simple" xlink:href="#_Toc232328848" text:style-name="Index_20_Link" text:visited-style-name="Index_20_Link"><text:span text:style-name="T30">1.1 Назначение системы в целом</text:span><text:span text:style-name="T31"><text:tab/></text:span><text:span text:style-name="T31">12</text:span></text:a></text:p>
          <text:p text:style-name="P38" loext:marker-style-name="T29"><text:a xlink:type="simple" xlink:href="#_Toc232328849" text:style-name="Index_20_Link" text:visited-style-name="Index_20_Link"><text:span text:style-name="T30">1.2 Характеристика объекта автоматизации</text:span><text:span text:style-name="T31"><text:tab/></text:span><text:span text:style-name="T31">13</text:span></text:a></text:p>
          <text:p text:style-name="Contents_20_3" loext:marker-style-name="T32"><text:a xlink:type="simple" xlink:href="#_Toc232328850" text:style-name="Index_20_Link" text:visited-style-name="Index_20_Link">1.2.1 Общее описание<text:span text:style-name="T33"><text:tab/>13</text:span></text:a><text:span text:style-name="T34"/></text:p>
          <text:p text:style-name="P38" loext:marker-style-name="T29"><text:a xlink:type="simple" xlink:href="#_Toc232328851" text:style-name="Index_20_Link" text:visited-style-name="Index_20_Link"><text:span text:style-name="T30">1.3 Общие требования к подсистеме</text:span><text:span text:style-name="T31"><text:tab/></text:span><text:span text:style-name="T31">14</text:span></text:a></text:p>
          <text:p text:style-name="Contents_20_3" loext:marker-style-name="T32"><text:a xlink:type="simple" xlink:href="#_Toc232328852" text:style-name="Index_20_Link" text:visited-style-name="Index_20_Link"><text:span text:style-name="T35">1.3.1 Требования к структуре и функционированию</text:span><text:span text:style-name="T33"><text:tab/>14</text:span></text:a></text:p>
          <text:p text:style-name="Contents_20_3" loext:marker-style-name="T32"><text:a xlink:type="simple" xlink:href="#_Toc232328853" text:style-name="Index_20_Link" text:visited-style-name="Index_20_Link"><text:span text:style-name="T35">1.3.2 Дополнительные требования</text:span><text:span text:style-name="T33"><text:tab/>14</text:span></text:a></text:p>
          <text:p text:style-name="P38" loext:marker-style-name="T29"><text:a xlink:type="simple" xlink:href="#_Toc232328854" text:style-name="Index_20_Link" text:visited-style-name="Index_20_Link"><text:span text:style-name="T30">1.4 Требования к функциям, выполняемым системой</text:span><text:span text:style-name="T31"><text:tab/></text:span><text:span text:style-name="T31">15</text:span></text:a></text:p>
          <text:p text:style-name="Contents_20_3" loext:marker-style-name="T32"><text:a xlink:type="simple" xlink:href="#_Toc232328855" text:style-name="Index_20_Link" text:visited-style-name="Index_20_Link">1.4.1 Функция подключения к камере<text:span text:style-name="T33"><text:tab/>15</text:span></text:a><text:span text:style-name="T34"/></text:p>
          <text:p text:style-name="Contents_20_3" loext:marker-style-name="T32"><text:a xlink:type="simple" xlink:href="#_Toc232328856" text:style-name="Index_20_Link" text:visited-style-name="Index_20_Link"><text:span text:style-name="T35">1.4.2 Функция визуализации данных</text:span><text:span text:style-name="T33"><text:tab/>16</text:span></text:a></text:p>
          <text:p text:style-name="Contents_20_3" loext:marker-style-name="T32"><text:a xlink:type="simple" xlink:href="#_Toc232328857" text:style-name="Index_20_Link" text:visited-style-name="Index_20_Link"><text:span text:style-name="T35">1.4.3 Функция экспорта в CSV</text:span><text:span text:style-name="T33"><text:tab/>16</text:span></text:a></text:p>
          <text:p text:style-name="Contents_20_3" loext:marker-style-name="T32"><text:a xlink:type="simple" xlink:href="#_Toc232328858" text:style-name="Index_20_Link" text:visited-style-name="Index_20_Link"><text:span text:style-name="T35">1.4.4 Функция создания отчета в </text:span><text:span text:style-name="T36">DOCX</text:span><text:span text:style-name="T33"><text:tab/>16</text:span></text:a></text:p>
          <text:p text:style-name="P38" loext:marker-style-name="T29"><text:a xlink:type="simple" xlink:href="#_Toc232328859" text:style-name="Index_20_Link" text:visited-style-name="Index_20_Link"><text:span text:style-name="T30">1.5 Требования к видам обеспечения</text:span><text:span text:style-name="T31"><text:tab/></text:span><text:span text:style-name="T31">17</text:span></text:a></text:p>
          <text:p text:style-name="Contents_20_3" loext:marker-style-name="T32"><text:a xlink:type="simple" xlink:href="#_Toc232328860" text:style-name="Index_20_Link" text:visited-style-name="Index_20_Link"><text:span text:style-name="T35">1.5.1 Требования к информационному обеспечению</text:span><text:span text:style-name="T33"><text:tab/>17</text:span></text:a></text:p>
          <text:p text:style-name="Contents_20_3" loext:marker-style-name="T32"><text:a xlink:type="simple" xlink:href="#_Toc232328861" text:style-name="Index_20_Link" text:visited-style-name="Index_20_Link">1.5.2 Требования к алгоритмическому обеспечению<text:span text:style-name="T33"><text:tab/>17</text:span></text:a><text:span text:style-name="T34"/></text:p>
          <text:p text:style-name="Contents_20_3" loext:marker-style-name="T32"><text:a xlink:type="simple" xlink:href="#_Toc232328862" text:style-name="Index_20_Link" text:visited-style-name="Index_20_Link"><text:span text:style-name="T35">1.5.3 Требования к программному обеспечению</text:span><text:span text:style-name="T33"><text:tab/>17</text:span></text:a></text:p>
          <text:p text:style-name="P38" loext:marker-style-name="T29"><text:a xlink:type="simple" xlink:href="#_Toc232328863" text:style-name="Index_20_Link" text:visited-style-name="Index_20_Link"><text:span text:style-name="T30">1.6 Анализ аналогичных программных продуктов</text:span><text:span text:style-name="T31"><text:tab/></text:span><text:span text:style-name="T31">18</text:span></text:a></text:p>
          <text:p text:style-name="P37" loext:marker-style-name="T26"><text:a xlink:type="simple" xlink:href="#_Toc232328864" text:style-name="Index_20_Link" text:visited-style-name="Index_20_Link"><text:span text:style-name="T27">2 ИНФОРМАЦИОННОЕ ОБЕСПЕЧЕНИЕ ПОДСИСТЕМЫ</text:span><text:span text:style-name="T28"><text:tab/></text:span><text:span text:style-name="T28">20</text:span></text:a></text:p>
          <text:p text:style-name="P38" loext:marker-style-name="T29"><text:a xlink:type="simple" xlink:href="#_Toc232328865" text:style-name="Index_20_Link" text:visited-style-name="Index_20_Link"><text:span text:style-name="T30">2.1 Выбор средств управления данными</text:span><text:span text:style-name="T31"><text:tab/></text:span><text:span text:style-name="T31">20</text:span></text:a></text:p>
          <text:p text:style-name="P38" loext:marker-style-name="T29"><text:a xlink:type="simple" xlink:href="#_Toc232328866" text:style-name="Index_20_Link" text:visited-style-name="Index_20_Link"><text:span text:style-name="T30">2.2 Проектирование базы данных</text:span><text:span text:style-name="T31"><text:tab/></text:span><text:span text:style-name="T31">21</text:span></text:a></text:p>
          <text:p text:style-name="Contents_20_3" loext:marker-style-name="T32"><text:a xlink:type="simple" xlink:href="#_Toc232328867" text:style-name="Index_20_Link" text:visited-style-name="Index_20_Link">2.2.1 Концептуальная схема базы данных<text:span text:style-name="T33"><text:tab/>21</text:span></text:a><text:span text:style-name="T34"/></text:p>
          <text:p text:style-name="Contents_20_3" loext:marker-style-name="T32"><text:a xlink:type="simple" xlink:href="#_Toc232328868" text:style-name="Index_20_Link" text:visited-style-name="Index_20_Link">2.2.2 Внутренняя схема базы данных<text:span text:style-name="T33"><text:tab/>23</text:span></text:a><text:span text:style-name="T34"/></text:p>
          <text:p text:style-name="Contents_20_3" loext:marker-style-name="T32"><text:a xlink:type="simple" xlink:href="#_Toc232328869" text:style-name="Index_20_Link" text:visited-style-name="Index_20_Link">2.3 Проектирование файлов данных<text:span text:style-name="T33"><text:tab/>24</text:span></text:a><text:span text:style-name="T34"/></text:p>
          <text:p text:style-name="Contents_20_3" loext:marker-style-name="T32"><text:a xlink:type="simple" xlink:href="#_Toc232328870" text:style-name="Index_20_Link" text:visited-style-name="Index_20_Link">2.4 Организация сбора, передачи, обработки и выдачи информации<text:span text:style-name="T33"><text:tab/>24</text:span></text:a><text:span text:style-name="T34"/></text:p>
          <text:p text:style-name="P37" loext:marker-style-name="T26"><text:a xlink:type="simple" xlink:href="#_Toc232328871" text:style-name="Index_20_Link" text:visited-style-name="Index_20_Link"><text:soft-page-break/><text:span text:style-name="T27">3 АЛГОРИТМИЧЕСКОЕ ОБЕСПЕЧЕНИЕ ПОДСИСТЕМЫ</text:span><text:span text:style-name="T28"><text:tab/></text:span><text:span text:style-name="T28">26</text:span></text:a></text:p>
          <text:p text:style-name="P38" loext:marker-style-name="T29"><text:a xlink:type="simple" xlink:href="#_Toc232328872" text:style-name="Index_20_Link" text:visited-style-name="Index_20_Link"><text:span text:style-name="T37">3.1 Алгоритм наложения температурной информации на изображение и сохранения в базу данных</text:span><text:span text:style-name="T31"><text:tab/></text:span><text:span text:style-name="T31">26</text:span></text:a></text:p>
          <text:p text:style-name="P38" loext:marker-style-name="T29"><text:a xlink:type="simple" xlink:href="#_Toc232328873" text:style-name="Index_20_Link" text:visited-style-name="Index_20_Link"><text:span text:style-name="T38">3.2 Алгоритм экспорта в файл в формате CSV</text:span><text:span text:style-name="T31"><text:tab/></text:span><text:span text:style-name="T31">26</text:span></text:a></text:p>
          <text:p text:style-name="P38" loext:marker-style-name="T29"><text:a xlink:type="simple" xlink:href="#_Toc232328874" text:style-name="Index_20_Link" text:visited-style-name="Index_20_Link"><text:span text:style-name="T38">3.3 Алгоритм экспорта в файл в формате </text:span><text:span text:style-name="T39">DOCX</text:span><text:span text:style-name="T31"><text:tab/></text:span><text:span text:style-name="T31">26</text:span></text:a></text:p>
          <text:p text:style-name="P37" loext:marker-style-name="T26"><text:a xlink:type="simple" xlink:href="#_Toc232328875" text:style-name="Index_20_Link" text:visited-style-name="Index_20_Link"><text:span text:style-name="T27">4 ПРОГРАММНОЕ ОБЕСПЕЧЕНИЕ ПОДСИСТЕМЫ</text:span><text:span text:style-name="T28"><text:tab/></text:span><text:span text:style-name="T28">31</text:span></text:a></text:p>
          <text:p text:style-name="P38" loext:marker-style-name="T29"><text:a xlink:type="simple" xlink:href="#_Toc232328876" text:style-name="Index_20_Link" text:visited-style-name="Index_20_Link"><text:span text:style-name="T30">4.1 Структура программного обеспечения и функции его компонентов</text:span><text:span text:style-name="T31"><text:tab/></text:span><text:span text:style-name="T31">31</text:span></text:a></text:p>
          <text:p text:style-name="P38" loext:marker-style-name="T29"><text:a xlink:type="simple" xlink:href="#_Toc232328877" text:style-name="Index_20_Link" text:visited-style-name="Index_20_Link"><text:span text:style-name="T37">4.2 Выбор компонентов программного обеспечения</text:span><text:span text:style-name="T31"><text:tab/></text:span><text:span text:style-name="T31">31</text:span></text:a></text:p>
          <text:p text:style-name="Contents_20_3" loext:marker-style-name="T32"><text:a xlink:type="simple" xlink:href="#_Toc232328878" text:style-name="Index_20_Link" text:visited-style-name="Index_20_Link"><text:span text:style-name="T40">4.2.1 Операционная система</text:span><text:span text:style-name="T33"><text:tab/>31</text:span></text:a></text:p>
          <text:p text:style-name="Contents_20_3" loext:marker-style-name="T32"><text:a xlink:type="simple" xlink:href="#_Toc232328879" text:style-name="Index_20_Link" text:visited-style-name="Index_20_Link"><text:span text:style-name="T40">4.2.2 Инструментальное средство разработки и язык программирования</text:span><text:span text:style-name="T33"><text:tab/>32</text:span></text:a></text:p>
          <text:p text:style-name="Contents_20_3" loext:marker-style-name="T32"><text:a xlink:type="simple" xlink:href="#_Toc232328880" text:style-name="Index_20_Link" text:visited-style-name="Index_20_Link"><text:span text:style-name="T40">4.2.3 Вспомогательное программное обеспечение</text:span><text:span text:style-name="T33"><text:tab/>32</text:span></text:a></text:p>
          <text:p text:style-name="P38" loext:marker-style-name="T29"><text:a xlink:type="simple" xlink:href="#_Toc232328881" text:style-name="Index_20_Link" text:visited-style-name="Index_20_Link"><text:span text:style-name="T37">4.3 Разработка прикладного программного обеспечения</text:span><text:span text:style-name="T31"><text:tab/></text:span><text:span text:style-name="T31">33</text:span></text:a></text:p>
          <text:p text:style-name="Contents_20_3" loext:marker-style-name="T32"><text:a xlink:type="simple" xlink:href="#_Toc232328882" text:style-name="Index_20_Link" text:visited-style-name="Index_20_Link"><text:span text:style-name="T40">4.3.1 Структура прикладного программного обеспечения</text:span><text:span text:style-name="T33"><text:tab/>33</text:span></text:a></text:p>
          <text:p text:style-name="P38" loext:marker-style-name="T29"><text:a xlink:type="simple" xlink:href="#_Toc232328883" text:style-name="Index_20_Link" text:visited-style-name="Index_20_Link"><text:span text:style-name="T37">4.4 Особенности реализации, эксплуатации и сопровождения подсистемы</text:span><text:span text:style-name="T31"><text:tab/></text:span><text:span text:style-name="T31">35</text:span></text:a></text:p>
          <text:p text:style-name="P38" loext:marker-style-name="T29"><text:a xlink:type="simple" xlink:href="#_Toc232328884" text:style-name="Index_20_Link" text:visited-style-name="Index_20_Link"><text:span text:style-name="T37">4.5 Руководство пользователя</text:span><text:span text:style-name="T31"><text:tab/></text:span><text:span text:style-name="T31">36</text:span></text:a></text:p>
          <text:p text:style-name="Contents_20_3" loext:marker-style-name="T32"><text:a xlink:type="simple" xlink:href="#_Toc232328885" text:style-name="Index_20_Link" text:visited-style-name="Index_20_Link"><text:span text:style-name="T40">4.5.1 Требования к условиям эксплуатации</text:span><text:span text:style-name="T33"><text:tab/>36</text:span></text:a></text:p>
          <text:p text:style-name="Contents_20_3" loext:marker-style-name="T32"><text:a xlink:type="simple" xlink:href="#_Toc232328886" text:style-name="Index_20_Link" text:visited-style-name="Index_20_Link"><text:span text:style-name="T40">4.5.2 Инсталляция и настройка</text:span><text:span text:style-name="T33"><text:tab/>36</text:span></text:a></text:p>
          <text:p text:style-name="Contents_20_3" loext:marker-style-name="T32"><text:a xlink:type="simple" xlink:href="#_Toc232328887" text:style-name="Index_20_Link" text:visited-style-name="Index_20_Link"><text:span text:style-name="T40">4.5.3 Порядок и особенности работы</text:span><text:span text:style-name="T33"><text:tab/>37</text:span></text:a></text:p>
          <text:p text:style-name="Contents_20_3" loext:marker-style-name="T32"><text:a xlink:type="simple" xlink:href="#_Toc232328888" text:style-name="Index_20_Link" text:visited-style-name="Index_20_Link"><text:span text:style-name="T40">4.5.4 Исключительные ситуации и их обработка</text:span><text:span text:style-name="T33"><text:tab/>40</text:span></text:a></text:p>
          <text:p text:style-name="P37" loext:marker-style-name="T26"><text:a xlink:type="simple" xlink:href="#_Toc232328889" text:style-name="Index_20_Link" text:visited-style-name="Index_20_Link"><text:span text:style-name="T27">5 ТЕСТИРОВАНИЕ СИСТЕМЫ</text:span><text:span text:style-name="T28"><text:tab/></text:span><text:span text:style-name="T28">41</text:span></text:a></text:p>
          <text:p text:style-name="P38" loext:marker-style-name="T29"><text:a xlink:type="simple" xlink:href="#_Toc232328890" text:style-name="Index_20_Link" text:visited-style-name="Index_20_Link"><text:span text:style-name="T41">5.1 Условия и порядок тестирования</text:span><text:span text:style-name="T31"><text:tab/></text:span><text:span text:style-name="T31">41</text:span></text:a></text:p>
          <text:p text:style-name="P38" loext:marker-style-name="T29"><text:a xlink:type="simple" xlink:href="#_Toc232328891" text:style-name="Index_20_Link" text:visited-style-name="Index_20_Link"><text:span text:style-name="T30">5.2 Исходные данные для контрольных примеров</text:span><text:span text:style-name="T31"><text:tab/></text:span><text:span text:style-name="T31">41</text:span></text:a></text:p>
          <text:p text:style-name="Contents_20_3" loext:marker-style-name="T32"><text:a xlink:type="simple" xlink:href="#_Toc232328892" text:style-name="Index_20_Link" text:visited-style-name="Index_20_Link">5.2.1 Описание ситуаций для элементов системы<text:span text:style-name="T33"><text:tab/>41</text:span></text:a><text:span text:style-name="T34"/></text:p>
          <text:p text:style-name="P38" loext:marker-style-name="T29"><text:a xlink:type="simple" xlink:href="#_Toc232328893" text:style-name="Index_20_Link" text:visited-style-name="Index_20_Link"><text:span text:style-name="T30">5.3 Результаты тестирования</text:span><text:span text:style-name="T31"><text:tab/></text:span><text:span text:style-name="T31">41</text:span></text:a></text:p>
          <text:p text:style-name="P37" loext:marker-style-name="T26"><text:a xlink:type="simple" xlink:href="#_Toc232328894" text:style-name="Index_20_Link" text:visited-style-name="Index_20_Link"><text:span text:style-name="T27">6 ЭКОНОМИЧЕСКИЙ РАЗДЕЛ</text:span><text:span text:style-name="T28"><text:tab/></text:span><text:span text:style-name="T28">42</text:span></text:a></text:p>
          <text:p text:style-name="P38" loext:marker-style-name="T29"><text:a xlink:type="simple" xlink:href="#_Toc232328895" text:style-name="Index_20_Link" text:visited-style-name="Index_20_Link"><text:span text:style-name="T30">6.1 Расчёт показателей трудоёмкости для программного продукта</text:span><text:span text:style-name="T31"><text:tab/></text:span><text:span text:style-name="T31">42</text:span></text:a></text:p>
          <text:p text:style-name="P38" loext:marker-style-name="T29"><text:a xlink:type="simple" xlink:href="#_Toc232328896" text:style-name="Index_20_Link" text:visited-style-name="Index_20_Link"><text:span text:style-name="T30">6.2 Расчёт затрат на материальные ресурсы</text:span><text:span text:style-name="T31"><text:tab/></text:span><text:span text:style-name="T31">43</text:span></text:a></text:p>
          <text:p text:style-name="P38" loext:marker-style-name="T29"><text:a xlink:type="simple" xlink:href="#_Toc232328897" text:style-name="Index_20_Link" text:visited-style-name="Index_20_Link"><text:span text:style-name="T30">6.3 </text:span><text:span text:style-name="T41">Расчет затрат на разработку системы</text:span><text:span text:style-name="T31"><text:tab/></text:span><text:span text:style-name="T31">44</text:span></text:a></text:p>
          <text:p text:style-name="P38" loext:marker-style-name="T29"><text:a xlink:type="simple" xlink:href="#_Toc232328898" text:style-name="Index_20_Link" text:visited-style-name="Index_20_Link"><text:span text:style-name="T42">6.4 </text:span><text:span text:style-name="T41">Расчет затрат на оплату труда</text:span><text:span text:style-name="T31"><text:tab/></text:span><text:span text:style-name="T31">44</text:span></text:a></text:p>
          <text:p text:style-name="P38" loext:marker-style-name="T29"><text:a xlink:type="simple" xlink:href="#_Toc232328899" text:style-name="Index_20_Link" text:visited-style-name="Index_20_Link"><text:soft-page-break/><text:span text:style-name="T42">6.5 </text:span><text:span text:style-name="T41">Расчет отчислений на социальные нужды</text:span><text:span text:style-name="T31"><text:tab/></text:span><text:span text:style-name="T31">45</text:span></text:a></text:p>
          <text:p text:style-name="P38" loext:marker-style-name="T29"><text:a xlink:type="simple" xlink:href="#_Toc232328900" text:style-name="Index_20_Link" text:visited-style-name="Index_20_Link"><text:span text:style-name="T30">6.6 Себестоимость проекта</text:span><text:span text:style-name="T31"><text:tab/></text:span><text:span text:style-name="T31">46</text:span></text:a></text:p>
          <text:p text:style-name="P38" loext:marker-style-name="T29"><text:a xlink:type="simple" xlink:href="#_Toc232328901" text:style-name="Index_20_Link" text:visited-style-name="Index_20_Link"><text:span text:style-name="T30">6.7 Расчет плановой прибыли</text:span><text:span text:style-name="T31"><text:tab/></text:span><text:span text:style-name="T31">46</text:span></text:a></text:p>
          <text:p text:style-name="P38" loext:marker-style-name="T29"><text:a xlink:type="simple" xlink:href="#_Toc232328902" text:style-name="Index_20_Link" text:visited-style-name="Index_20_Link"><text:span text:style-name="T42">6.8 </text:span><text:span text:style-name="T41">Определение экономической эффективности проекта</text:span><text:span text:style-name="T31"><text:tab/></text:span><text:span text:style-name="T31">46</text:span></text:a></text:p>
          <text:p text:style-name="P38" loext:marker-style-name="T29"><text:a xlink:type="simple" xlink:href="#_Toc232328903" text:style-name="Index_20_Link" text:visited-style-name="Index_20_Link"><text:span text:style-name="T42">6.9 </text:span><text:span text:style-name="T41">Выводы по технико-экономическому анализу и обоснованию проекта разработки</text:span><text:span text:style-name="T31"><text:tab/></text:span><text:span text:style-name="T31">47</text:span></text:a></text:p>
          <text:p text:style-name="P37" loext:marker-style-name="T26"><text:a xlink:type="simple" xlink:href="#_Toc232328904" text:style-name="Index_20_Link" text:visited-style-name="Index_20_Link"><text:span text:style-name="T27">ЗАКЛЮЧЕНИЕ</text:span><text:span text:style-name="T28"><text:tab/></text:span><text:span text:style-name="T28">48</text:span></text:a></text:p>
          <text:p text:style-name="P37" loext:marker-style-name="T26"><text:a xlink:type="simple" xlink:href="#_Toc232328905" text:style-name="Index_20_Link" text:visited-style-name="Index_20_Link"><text:span text:style-name="T27">СПИСОК ИСПОЛЬЗУЕМЫХ ИСТОЧНИКОВ</text:span><text:span text:style-name="T28"><text:tab/></text:span><text:span text:style-name="T28">50</text:span></text:a></text:p>
          <text:p text:style-name="P37" loext:marker-style-name="T26"><text:a xlink:type="simple" xlink:href="#_Toc232328906" text:style-name="Index_20_Link" text:visited-style-name="Index_20_Link"><text:span text:style-name="T27">ПРИЛОЖЕНИЕ А</text:span><text:span text:style-name="T28"><text:tab/></text:span><text:span text:style-name="T28">52</text:span></text:a></text:p>
        </text:index-body>
      </text:table-of-content>
      <text:p text:style-name="P39" loext:marker-style-name="T43"><text:bookmark-end text:name="_Toc43248641"/><text:bookmark-end text:name="_Toc106598996"/><text:bookmark-start text:name="_Toc127120839"/><text:bookmark-start text:name="_Toc127119685"/><text:bookmark-start text:name="_Toc127111188"/><text:bookmark-start text:name="_Toc127120836"/><text:bookmark-start text:name="_Toc127119682"/><text:bookmark-start text:name="_Toc106237941"/></text:p>
      <text:p text:style-name="P40" loext:marker-style-name="T44"/>
      <text:h text:style-name="P41" text:outline-level="1"><text:bookmark-start text:name="_Toc137554405"/><text:bookmark-start text:name="_Toc232328845"/>СПИСОК ИСПОЛЬЗОВАННЫХ ОБОЗНАЧЕНИЙ И ТЕРМИНОВ<text:bookmark-end text:name="_Toc137554405"/><text:bookmark-end text:name="_Toc232328845"/><text:bookmark-end text:name="_Toc127120836"/><text:bookmark-end text:name="_Toc127119682"/><text:bookmark-end text:name="_Toc106237941"/></text:h>
      <text:p text:style-name="P33" loext:marker-style-name="T18"><text:span text:style-name="T45">БД</text:span><text:span text:style-name="T18"> (база данных) – это упорядоченный набор структурированной информации или данных, которые обычно хранятся в электронном виде в компьютерной системе.</text:span></text:p>
      <text:p text:style-name="P33" loext:marker-style-name="T18"><text:span text:style-name="T45">ГОСТ</text:span><text:span text:style-name="T18"> (государственный стандарт) – это государственный стандарт, который включает в себя требования государства к качеству продукции, его геометрические размеры, отклонения от эталона и т. д.</text:span></text:p>
      <text:p text:style-name="P33" loext:marker-style-name="T18"><text:span text:style-name="T45">РД</text:span><text:span text:style-name="T18"> (руководящий документ) – нормативный документ, содержащий правила, общие принципы, характеристики объектов нормирования, касающиеся определенных видов деятельности или их результатов, доступный широкому кругу потребителей (пользователей) и утвержденный в установленном в отрасли порядке.</text:span></text:p>
      <text:p text:style-name="P33" loext:marker-style-name="T18"><text:span text:style-name="T45">СПО</text:span><text:span text:style-name="T18"> (свободное програмное обеспечение) – программное обеспечение, пользователи которого имеют права на его неограниченную установку, запуск, свободное использование, изучение, распространение и изменение, а также распространение копий и результатов изменения.</text:span></text:p>
      <text:p text:style-name="P42" loext:marker-style-name="T18"><text:bookmark-start text:name="_Toc106237942"/><text:bookmark-start text:name="_Toc127120837"/><text:bookmark-start text:name="_Toc127119683"/></text:p>
      <text:p text:style-name="P43" loext:marker-style-name="T46"/>
      <text:h text:style-name="P41" text:outline-level="1"><text:bookmark-start text:name="_Toc137554406"/><text:bookmark-start text:name="_Toc232328846"/>ВВЕДЕНИЕ<text:bookmark-end text:name="_Toc137554406"/><text:bookmark-end text:name="_Toc232328846"/><text:bookmark-end text:name="_Toc127120837"/><text:bookmark-end text:name="_Toc127119683"/><text:bookmark-end text:name="_Toc106237942"/></text:h>
      <text:p text:style-name="_35_._20_Осн._20_текст">Современное приборостроение и радиоэлектронная промышленность предъявляют высокие требования к качеству и надёжности выпускаемых изделий. Одним из ключевых параметров, влияющих на работоспособность электронных компонентов и печатных плат, является их температурный режим. Перегрев элементов может привести к деградации характеристик, внезапным отказам и сокращению срока службы оборудования. В связи с этим возникает необходимость в оперативном и достоверном тепловом контроле как на этапе производства, так и в процессе испытаний готовых изделий.</text:p>
      <text:p text:style-name="_35_._20_Осн._20_текст">Традиционно для выявления перегретых участков используются ручные тепловизоры или точечные пирометры. Однако такие методы обладают рядом недостатков: они требуют постоянного участия оператора, не позволяют автоматизировать процесс измерения в заданных контрольных точках, а также не предоставляют встроенных средств для хранения и последующего анализа полученных данных. В результате снижается производительность контроля, возрастает вероятность ошибок из-за человеческого фактора, а накопление результатов испытаний затруднено.</text:p>
      <text:p text:style-name="_35_._20_Осн._20_текст">Инфракрасный мониторинг с применением автоматизированной поворотной платформы и недорогих датчиков (например, MLX90614) позволяет решить перечисленные проблемы. Однако для полноценного использования такого оборудования требуется специализированное программное обеспечение, которое обеспечивало бы управление камерой, циклический обход заданных точек, приём и маркировку тепловизионных снимков, сохранение результатов в структурированном виде, а также их экспорт для последующего анализа.</text:p>
      <text:p text:style-name="_35_._20_Осн._20_текст">Целью данной работы является разработка программного обеспечения для управления камерой и обработки данных в системе инфракрасного мониторинга температуры объекта, позволяющего автоматизировать процесс теплового <text:soft-page-break/>контроля электронных компонентов, печатных плат и готовых изделий в лабораторных и цеховых условиях.</text:p>
      <text:p text:style-name="_35_._20_Осн._20_текст">Благодаря внедрению разработанного ПО оператор получает возможность автоматического циклического измерения температуры в заданных точках, сохранения каждого измерения вместе с фотографией, на которой визуально отмечены положение точки и измеренное значение. Формирование отчётов и экспорт в CSV выполняются автоматически, что упрощает документооборот и снижает трудоёмкость контроля.</text:p>
      <text:p text:style-name="_35_._20_Осн._20_текст">Более подробно особенности проекта рассматриваются в основной части пояснительной записки. Техническое задание содержит требования к структуре системы, функциям и видам обеспечения. В информационном обеспечении описываются форматы входных и выходных данных, организация хранения изображений и результатов измерений в файловой системе. Алгоритмическое обеспечение включает описание основных алгоритмов обработки изображений и приёма данных. Программное обеспечение раскрывает структуру приложения, выбор компонентов и руководство пользователя. Результаты тестирования подтверждают соответствие системы заявленным требованиям. В экономическом разделе приведены расчёты затрат и эффективности.</text:p>
      <text:p text:style-name="_35_._20_Осн._20_текст">При написании выпускной квалификационной работы использовались следующие источники:</text:p>
      <text:p text:style-name="_35_._20_Осн._20_текст">Источник [11] – содержит основные методы обработки и наложения графических элементов на изображения, что было применено при реализации подсистемы маркировки кадров.</text:p>
      <text:p text:style-name="_35_._20_Осн._20_текст">Работа с библиотекой Pillow подробно освещена в официальной документации [3], что позволило эффективно реализовать декодирование JPEG, рисование текста и координатных маркеров.</text:p>
      <text:p text:style-name="_35_._20_Осн._20_текст">В источнике [12] рассматриваются основы создания графических интерфейсов на Tkinter, а также работа с файловой системой и CSV-файлами, что легло в основу модуля экспорта и пользовательского интерфейса.</text:p>
      <text:p text:style-name="_35_._20_Осн._20_текст"><text:soft-page-break/>Официальная документация по Python [6] и руководство по работе с сетевыми сокетами использовались для организации приёма данных от внешнего модуля ESP32-CAM по протоколу HTTP.</text:p>
      <text:p text:style-name="Standard"/>
      <text:h text:style-name="P41" text:outline-level="1"><text:bookmark-start text:name="_Toc127111187"/><text:bookmark-start text:name="_Toc232328847"/><text:bookmark-start text:name="_Toc137554407"/><text:bookmark-start text:name="_Toc127120838"/><text:bookmark-start text:name="_Toc127119684"/>1 ТЕХНИЧЕСКОЕ ЗАДАНИЕ НА СОЗДАНИЕ СИСТЕМЫ<text:bookmark-end text:name="_Toc127111187"/><text:bookmark-end text:name="_Toc232328847"/><text:bookmark-end text:name="_Toc137554407"/><text:bookmark-end text:name="_Toc127120838"/><text:bookmark-end text:name="_Toc127119684"/></text:h>
      <text:h text:style-name="Heading_20_2" text:outline-level="2"><text:bookmark-end text:name="_Toc127111188"/><text:bookmark-end text:name="_Toc127120839"/><text:bookmark-end text:name="_Toc127119685"/><text:bookmark-start text:name="_Toc232328848"/>1.1 Назначение системы в целом<text:bookmark-end text:name="_Toc232328848"/></text:h>
      <text:p text:style-name="_5f_Текст">Разрабатываемая система предназначена для автоматизированного бесконтактного теплового контроля электронных компонентов, печатных плат и готовых изделий в лабораторных и цеховых условиях приборостроительного предприятия. Контроль осуществляется с применением инфракрасного датчика температуры MLX90614, закреплённого на двухосевой поворотной платформе.</text:p>
      <text:p text:style-name="_5f_Текст">Система состоит из двух взаимодействующих подсистем, разрабатываемых в рамках двух выпускных квалификационных работ.</text:p>
      <text:p text:style-name="_5f_Текст">Разрабатываемая подсистема предназначена для сбора, сохранения, визуализации и представления данных, полученных с подсистемы в рамках другой работы ВКР и модуля камеры. </text:p>
      <text:p text:style-name="P44" loext:marker-style-name="T47"><text:span text:style-name="T47">Дописать что-нибудь</text:span><text:span text:style-name="T47"/></text:p>
      <text:p text:style-name="P45" loext:marker-style-name="T48"/>
      <text:h text:style-name="P46" text:outline-level="2"><text:bookmark-start text:name="_Toc232328849"/>1.2 Характеристика объекта автоматизации<text:bookmark-end text:name="_Toc232328849"/></text:h>
      <text:h text:style-name="Heading_20_3" text:outline-level="3"><text:bookmark-start text:name="_Toc232328850"/>1.2.1 Общее описание<text:bookmark-end text:name="_Toc232328850"/></text:h>
      <text:p text:style-name="_5f_Текст" loext:marker-style-name="T49">Объектом автоматизации является процесс сбора, анализа и обработки данных, поступающих с установки. <text:span text:style-name="T49">Подсистема принимает температурные показатели, координаты и изображение с </text:span>установки<text:span text:style-name="T49"> для записи в базу данных. </text:span></text:p>
      <text:p text:style-name="_5f_Текст">Система решает следующие задачи:</text:p>
      <text:p text:style-name="_5f_Текст">а) Сбор, хранение и визуализацию результатов измерений: после цикла работы установки, данные измерений записываются в базу данных системы для последующего сохранения, анализа и обработки. Визуализация производится благодаря фотосъёмке с модуля камеры <text:span text:style-name="T50">ESP</text:span>32-<text:span text:style-name="T50">CAM</text:span> и рисованию точек с цветами, зависящими от температуры. Градиент от красного, выражающего температуру выше двойного среднего рассчитанного значения, до тёмно-синего, выражающего температуру ниже нуля. Платы с компонентами одной партии или производства могут иметь одинаковые дефекты, которые можно увидеть на фото.</text:p>
      <text:p text:style-name="_5f_Текст">б) Формирование отчётов и экспорт данных: после сохранения данных система формирует отчёт с полученными значениями для ускоренного анализа результатов испытаний. В отчёт пользователем заносятся название изделия прошедшего испытания, дата и время. Основные точки, на которые следует обратить внимание выделяются и отображаются в отчёте.</text:p>
      <text:p text:style-name="_5f_Текст">в) Выдачу управляющих сигналов для внешних исполнительных устройств (вентилятор, нагреватель, сигнализация) на основе результатов нечёткого анализа: в случае резкого превышения показателями заданных норм, срабатывает сигнализация в виде мигающего красного светодиода. Данное оповещение будет сигнализировать о поломке прибора, превышения тока питания или иных ситуациях, во время которых может резко превышаться температура.</text:p>
      <text:h text:style-name="Heading_20_2" text:outline-level="2"><text:bookmark-start text:name="_Toc232328851"/><text:soft-page-break/>1.3 Общие требования к подсистеме<text:bookmark-end text:name="_Toc232328851"/></text:h>
      <text:h text:style-name="Heading_20_3" text:outline-level="3" loext:marker-style-name="T35"><text:bookmark-start text:name="_Toc232328852"/><text:span text:style-name="T35">1.3.1 Требования к структуре и функционированию</text:span><text:bookmark-end text:name="_Toc232328852"/><text:span text:style-name="T35"/></text:h>
      <text:p text:style-name="_5f_Текст">Подсистема должна представлять собой программно-аппаратный комплекс для визуализации и регистрации температурного состояния объекта с использованием тепловой карты и последующего формирования отчётов.</text:p>
      <text:p text:style-name="_5f_Текст">В состав подсистемы должны входить следующие модули:</text:p>
      <text:list text:style-name="WWNum10">
        <text:list-item>
          <text:p text:style-name="P47">Модуль сбора данных: получает изображение и температурные данные с камеры и взаимодействующей подсистемы в рамках другой ВКР соответственно.</text:p>
        </text:list-item>
        <text:list-item>
          <text:p text:style-name="P47">Модуль визуализации и разметки: накладывает на изображение информацию о температуре в виде точек.</text:p>
        </text:list-item>
        <text:list-item>
          <text:p text:style-name="P47">Модуль хранения: записывает каждое измерение в реляционную базу данных, изображение сохраняется в отдельную папку.</text:p>
        </text:list-item>
        <text:list-item>
          <text:p text:style-name="P47">Модуль экспорта: выгружает выбранный диапазон записей в CSV-файл.</text:p>
        </text:list-item>
        <text:list-item>
          <text:p text:style-name="P47">Модуль создания отчёта: создаёт отчёт на основе полученных данных в документ в формате <text:span text:style-name="T50">DOCX</text:span>.</text:p>
        </text:list-item>
      </text:list>
      <text:p text:style-name="_5f_Текст">Система должна состоять из двух частей: ПК для приёма данных и управления системой и модуль с камерой для получения изображений.</text:p>
      <text:p text:style-name="_5f_Текст">Перспективы развития системы предполагают расширение базового функционала путём добавления дополнительных датчиков.</text:p>
      <text:h text:style-name="Heading_20_3" text:outline-level="3" loext:marker-style-name="T35"><text:bookmark-start text:name="_Toc232328853"/><text:span text:style-name="T35">1.3.2 Дополнительные требования</text:span><text:bookmark-end text:name="_Toc232328853"/><text:span text:style-name="T35"/></text:h>
      <text:h text:style-name="Heading_20_4" text:outline-level="4">1.3.2.1 Требования к персоналу</text:h>
      <text:p text:style-name="_5f_Текст">Система должна быть однопользовательская.</text:p>
      <text:p text:style-name="_5f_Текст">Пользователь должен владеть навыками пользования ПК на базовом уровне: уметь работать с *.<text:span text:style-name="T50">docx</text:span> и *.<text:span text:style-name="T50">csv</text:span> файлами и изображениями.</text:p>
      <text:h text:style-name="Heading_20_4" text:outline-level="4"><text:soft-page-break/>1.3.2.2 Требования к надежности</text:h>
      <text:p text:style-name="_5f_Текст">Система должна сохранять работоспособность и обеспечивать восстановление своих функций при возникновении следующих внештатных ситуаций:</text:p>
      <text:list xml:id="list112909389080214" text:continue-numbering="true" text:style-name="WWNum10">
        <text:list-item>
          <text:p text:style-name="P47">при сбоях в системе электроснабжения аппаратной части, приводящих к перезагрузке ОС, восстановление программы должно происходить после перезапуска ОС и запуска исполняемого файла системы;</text:p>
        </text:list-item>
        <text:list-item>
          <text:p text:style-name="P47">при ошибках в работе аппаратных средств (кроме носителей данных и программ) восстановление функции системы возлагается на ОС;</text:p>
        </text:list-item>
        <text:list-item>
          <text:p text:style-name="P47">при ошибках, связанных с программным обеспечением (ОС и драйверы устройств), восстановление работоспособности возлагается на ОС.</text:p>
        </text:list-item>
      </text:list>
      <text:p text:style-name="_5f_Текст">В системе должна быть обеспечена возможность восстановления данных с внешнего накопителя после восстановления активного накопителя. БД системы необходимо резервировать минимум 1 раз в месяц.</text:p>
      <text:p text:style-name="_5f_Текст">Специальные дополнительные требования по составу и количественным значениям показателей надежности для подсистем модернизируемых модулей и, соответственно, к создаваемой системе в целом не предъявляются.</text:p>
      <text:h text:style-name="Heading_20_2" text:outline-level="2"><text:bookmark-start text:name="_Toc232328854"/>1.4 Требования к функциям, выполняемым системой<text:bookmark-end text:name="_Toc232328854"/></text:h>
      <text:h text:style-name="Heading_20_3" text:outline-level="3"><text:bookmark-start text:name="_Toc232328855"/>1.4.1 Функция подключения к камере<text:bookmark-end text:name="_Toc232328855"/></text:h>
      <text:p text:style-name="_5f_Текст">Данная функция подключается к камере модуля <text:span text:style-name="T50">ESP</text:span>32-<text:span text:style-name="T50">CAM</text:span> и получает данные.</text:p>
      <text:p text:style-name="_5f_Текст">Входные данные: <text:span text:style-name="T50">IP</text:span>-адрес модуля.</text:p>
      <text:p text:style-name="_5f_Текст" loext:marker-style-name="T51"><text:span text:style-name="T51">Выходные данные: статус подключения.</text:span><text:span text:style-name="T51"/></text:p>
      <text:p text:style-name="_5f_Текст">Сроки: первая очередь.</text:p>
      <text:h text:style-name="Heading_20_3" text:outline-level="3" loext:marker-style-name="T35"><text:bookmark-start text:name="_Toc232328856"/><text:soft-page-break/><text:span text:style-name="T35">1.4.2 Функция визуализации данных</text:span><text:bookmark-end text:name="_Toc232328856"/><text:span text:style-name="T35"> </text:span><text:span text:style-name="T35"/></text:h>
      <text:p text:style-name="_5f_Текст">Данная функция откладывает точки с температурными данными на изображении.</text:p>
      <text:p text:style-name="_5f_Текст">Входные данные: изображение, данные о температуре, координаты точек.</text:p>
      <text:p text:style-name="_5f_Текст" loext:marker-style-name="T51"><text:span text:style-name="T51">Выходные данные: промаркированное изображение.</text:span><text:span text:style-name="T51"/></text:p>
      <text:p text:style-name="_5f_Текст" loext:marker-style-name="T51"><text:span text:style-name="T51">Требование: обработка одного кадра (включая декодирование JPEG, рисование, сохранение в буфер) должна занимать не более 0,2 с.</text:span><text:span text:style-name="T51"/></text:p>
      <text:p text:style-name="_5f_Текст" loext:marker-style-name="T51"><text:span text:style-name="T51">Сроки: первая очередь.</text:span><text:span text:style-name="T51"/></text:p>
      <text:h text:style-name="Heading_20_3" text:outline-level="3" loext:marker-style-name="T35"><text:bookmark-start text:name="_Toc232328857"/><text:span text:style-name="T35">1.4.3 Функция экспорта в CSV</text:span><text:bookmark-end text:name="_Toc232328857"/><text:span text:style-name="T35"/></text:h>
      <text:p text:style-name="_5f_Текст">Входные данные: температура, координаты точек, временная метка.</text:p>
      <text:p text:style-name="_5f_Текст">Выходные данные: файл *.<text:span text:style-name="T50">csv</text:span> с данными температуры.</text:p>
      <text:p text:style-name="_5f_Текст">Требование: экспорт 1000 записей должен выполняться не дольше 5 с.</text:p>
      <text:p text:style-name="_5f_Текст">Сроки: вторая очередь.</text:p>
      <text:h text:style-name="Heading_20_3" text:outline-level="3" loext:marker-style-name="T35"><text:bookmark-start text:name="_Toc232328858"/><text:span text:style-name="T35">1.4.4 Функция создания отчета в </text:span><text:span text:style-name="T36">DOCX</text:span><text:bookmark-end text:name="_Toc232328858"/></text:h>
      <text:p text:style-name="_5f_Текст">Входные данные: промаркированное изображение, температурные данные.</text:p>
      <text:p text:style-name="_5f_Текст">Выходные данные: файл *.<text:span text:style-name="T50">docx</text:span> в качестве отчета с промаркированным в результате работы системы изображением, максимальной и минимальной температурой.</text:p>
      <text:p text:style-name="_5f_Текст">Сроки: третья очередь.</text:p>
      <text:h text:style-name="Heading_20_2" text:outline-level="2"><text:bookmark-start text:name="_Toc232328859"/><text:soft-page-break/>1.5 Требования к видам обеспечения<text:bookmark-end text:name="_Toc232328859"/></text:h>
      <text:h text:style-name="Heading_20_3" text:outline-level="3" loext:marker-style-name="T35"><text:bookmark-start text:name="_Toc232328860"/><text:span text:style-name="T35">1.5.1 Требования к информационному обеспечению</text:span><text:bookmark-end text:name="_Toc232328860"/><text:span text:style-name="T35"/></text:h>
      <text:p text:style-name="_5f_Текст">Реляционная СУБД должна использоваться для хранения данных системы. Сбор данных для приложения должен быть автоматизирован. Доступ к данным является однопользовательским. Время выполнения запросов должно обеспечивать достаточное быстродействие для работы приложения.</text:p>
      <text:p text:style-name="_5f_Текст">Время получения изображения не должно превышать 10 секунд.</text:p>
      <text:p text:style-name="_5f_Текст">Необходимо использовать резервное копирование базы данных раз в месяц. </text:p>
      <text:p text:style-name="_5f_Текст">Защита данных не требуется, так как в данном приложении не используется личная информация. </text:p>
      <text:h text:style-name="Heading_20_3" text:outline-level="3"><text:bookmark-start text:name="_Toc232328861"/>1.5.2 Требования к алгоритмическому обеспечению<text:bookmark-end text:name="_Toc232328861"/></text:h>
      <text:p text:style-name="P48" loext:marker-style-name="T48"><text:span text:style-name="T48">Требования к алгоритмическому обеспечению не предъявляются.</text:span><text:span text:style-name="T48"/></text:p>
      <text:h text:style-name="Heading_20_3" text:outline-level="3" loext:marker-style-name="T35"><text:bookmark-start text:name="_Toc232328862"/><text:span text:style-name="T35">1.5.3 Требования к программному обеспечению</text:span><text:bookmark-end text:name="_Toc232328862"/><text:span text:style-name="T35"/></text:h>
      <text:p text:style-name="_5f_Текст">Система должна быть платформонезависимой. Структура ПО должна быть легко расширяема и масштабируема.</text:p>
      <text:p text:style-name="_5f_Текст">При разработке прикладного программного обеспечения необходимо использовать язык программирования <text:span text:style-name="T50">Python</text:span> 3.10. Для удобства разработки также необходимо использовать библиотеку <text:span text:style-name="T50">Pillow</text:span> для редактирования изображений.</text:p>
      <text:p text:style-name="_5f_Текст">Взаимодействие с системой должно осуществляться через графический интерфейс. Интерфейс не должен быть перенасыщен графическими элементами и должен предусматривать быстрое отображение в виде экранной формы. Навигационные элементы должны быть выполнены в удобной для пользователя форме.</text:p>
      <text:h text:style-name="Heading_20_2" text:outline-level="2"><text:bookmark-start text:name="_Toc232328863"/><text:soft-page-break/>1.6 Анализ аналогичных программных продуктов<text:bookmark-end text:name="_Toc232328863"/></text:h>
      <text:p text:style-name="_5f_Текст">Для оценки конкурентных преимуществ разрабатываемого ПО были проанализированы три программных инструмента, используемых в тепловизионной диагностике. В таблице 1.1 приведён сравнительный анализ разрабатываемой системы с конкурентными продуктами.</text:p>
      <text:list text:style-name="WWNum9">
        <text:list-item>
          <text:p text:style-name="P49">Fluke SmartView</text:p>
        </text:list-item>
      </text:list>
      <text:p text:style-name="_5f_Текст">Программа поставляется с тепловизорами Fluke и предназначена для просмотра и базового анализа ИК-изображений. Позволяет накладывать маркеры, изменять палитру, формировать отчёты.</text:p>
      <text:p text:style-name="_5f_Текст">Недостатки: не поддерживает кластеризацию; работа с данными возможна только в проприетарном формате Fluke; отсутствует регрессионный анализ временных рядов; нельзя напрямую импортировать данные от сторонних датчиков.</text:p>
      <text:list text:continue-numbering="true" text:style-name="WWNum9">
        <text:list-item>
          <text:p text:style-name="P49" loext:marker-style-name="T50">FLIR Tools<text:span text:style-name="T50"/></text:p>
        </text:list-item>
      </text:list>
      <text:p text:style-name="_5f_Текст">Аналогичный продукт для устройств FLIR. Помимо просмотра, позволяет корректировать параметры съёмки и готовить простые отчёты.</text:p>
      <text:p text:style-name="_5f_Текст">Недостатки: ориентирован исключительно на работу с камерами FLIR, закрытый формат хранения; аналитические функции ограничены вычислением минимума/максимума/среднего; отсутствуют модули кластеризации и прогнозирования.</text:p>
      <text:list text:continue-numbering="true" text:style-name="WWNum9">
        <text:list-item>
          <text:p text:style-name="P49" loext:marker-style-name="T50">ThermaCAM Researcher (FLIR)<text:span text:style-name="T50"/></text:p>
        </text:list-item>
      </text:list>
      <text:p text:style-name="_5f_Текст">Профессиональное ПО для углублённого анализа тепловизионных последовательностей, поддерживает построение температурных графиков во времени для выбранных точек.</text:p>
      <text:p text:style-name="_5f_Текст">Недостатки: высокая стоимость лицензии, закрытый исходный код, требует формата FLIR; встроенная статистика не включает автоматическую кластеризацию, а прогнозирование ограничено линейной аппроксимацией без расчёта прогноза на заданный горизонт.</text:p>
      <text:p text:style-name="_5f_Текст"><text:soft-page-break/>В таблице 1.1 представлен сравнительный анализ разрабатываемой системы и аналогов.</text:p>
      <text:p text:style-name="P50" loext:marker-style-name="T48"><text:span text:style-name="T48">Таблица 1.1 </text:span><text:span text:style-name="T52"></text:span><text:span text:style-name="T48"> Сравнительный анализ</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51" loext:marker-style-name="T53"><text:span text:style-name="T54">Критерий</text:span><text:span text:style-name="T55"/></text:p>
          </table:table-cell>
          <table:table-cell table:style-name="Таблица3.A1" office:value-type="string">
            <text:p text:style-name="P51" loext:marker-style-name="T53"><text:span text:style-name="T54">Разрабатываемое ПО</text:span><text:span text:style-name="T55"/></text:p>
          </table:table-cell>
          <table:table-cell table:style-name="Таблица3.A1" office:value-type="string">
            <text:p text:style-name="P51" loext:marker-style-name="T53"><text:span text:style-name="T54">Fluke SmartView</text:span><text:span text:style-name="T55"/></text:p>
          </table:table-cell>
          <table:table-cell table:style-name="Таблица3.A1" office:value-type="string">
            <text:p text:style-name="P51" loext:marker-style-name="T53"><text:span text:style-name="T54">FLIR Tools</text:span><text:span text:style-name="T55"/></text:p>
          </table:table-cell>
          <table:table-cell table:style-name="Таблица3.A1" office:value-type="string">
            <text:p text:style-name="P51" loext:marker-style-name="T53"><text:span text:style-name="T54">ThermaCAM Researcher</text:span><text:span text:style-name="T55"/></text:p>
          </table:table-cell>
        </table:table-row>
        <table:table-row table:style-name="Таблица3.1">
          <table:table-cell table:style-name="Таблица3.A1" office:value-type="string">
            <text:p text:style-name="P52" loext:marker-style-name="T21"><text:span text:style-name="T56">Приём данных от сторонних устройств</text:span><text:span text:style-name="T56"/></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row>
        <table:table-row table:style-name="Таблица3.1">
          <table:table-cell table:style-name="Таблица3.A1" office:value-type="string">
            <text:p text:style-name="P52" loext:marker-style-name="T57"><text:span text:style-name="T56">Хранение в открытой БД</text:span><text:span text:style-name="T58"/></text:p>
          </table:table-cell>
          <table:table-cell table:style-name="Таблица3.A1" office:value-type="string">
            <text:p text:style-name="P53" loext:marker-style-name="T21"><text:span text:style-name="T56">+</text:span><text:span text:style-name="T56"/></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row>
        <table:table-row table:style-name="Таблица3.1">
          <table:table-cell table:style-name="Таблица3.A1" office:value-type="string">
            <text:p text:style-name="P52" loext:marker-style-name="T21"><text:span text:style-name="T56">Экспорт в CSV с изображениями</text:span><text:span text:style-name="T56"/></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cell table:style-name="Таблица3.A1" office:value-type="string">
            <text:p text:style-name="P53" loext:marker-style-name="T57"><text:span text:style-name="T56">-</text:span><text:span text:style-name="T58"/></text:p>
          </table:table-cell>
        </table:table-row>
        <table:table-row table:style-name="Таблица3.1">
          <table:table-cell table:style-name="Таблица3.A1" office:value-type="string">
            <text:p text:style-name="P52" loext:marker-style-name="T56"><text:span text:style-name="T56">Создание отчётов в Microsoft W</text:span><text:span text:style-name="T58">ord</text:span></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row>
        <table:table-row table:style-name="Таблица3.1">
          <table:table-cell table:style-name="Таблица3.A1" office:value-type="string">
            <text:p text:style-name="P52" loext:marker-style-name="T56"><text:span text:style-name="T56">Скорость работы ПО</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row>
        <table:table-row table:style-name="Таблица3.1">
          <table:table-cell table:style-name="Таблица3.A1" office:value-type="string">
            <text:p text:style-name="P52" loext:marker-style-name="T56"><text:span text:style-name="T56">Точность измерений</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row>
        <table:table-row table:style-name="Таблица3.1">
          <table:table-cell table:style-name="Таблица3.A1" office:value-type="string">
            <text:p text:style-name="P52" loext:marker-style-name="T56"><text:span text:style-name="T56">Открытый исходный код</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cell table:style-name="Таблица3.A1" office:value-type="string">
            <text:p text:style-name="P53" loext:marker-style-name="T56"><text:span text:style-name="T56">-</text:span><text:span text:style-name="T56"/></text:p>
          </table:table-cell>
        </table:table-row>
      </table:table>
      <text:p text:style-name="P54" loext:marker-style-name="T56"/>
      <text:p text:style-name="_5f_Текст">Разрабатываемое ПО выгодно отличается универсальностью приёма данных и открытостью, что делает его пригодным для учебных и исследовательских задач, а также для интеграции в комплексные системы мониторинга, несмотря на недостатки в виде меньшей скорости работы и точности измерений.</text:p>
      <text:h text:style-name="P55" text:outline-level="1"><text:bookmark-start text:name="_Toc137554455"/><text:bookmark-start text:name="_Toc232328864"/>2 ИНФОРМАЦИОННОЕ ОБЕСПЕЧЕНИЕ ПОДСИСТЕМЫ<text:bookmark-end text:name="_Toc137554455"/><text:bookmark-end text:name="_Toc232328864"/></text:h>
      <text:h text:style-name="Heading_20_2" text:outline-level="2"><text:bookmark-start text:name="_Toc137554456"/><text:bookmark-start text:name="_Toc232328865"/>2.1 Выбор средств управления данными<text:bookmark-end text:name="_Toc137554456"/><text:bookmark-end text:name="_Toc232328865"/></text:h>
      <text:p text:style-name="_5f_Текст"><text:bookmark-start text:name="_Toc137554457"/>Для организации хранения результатов измерений в разрабатываемой подсистеме необходимо выбрать СУБД. Основные требования к хранению данных вытекают из технического задания:</text:p>
      <text:list text:continue-list="list112909389080214" text:style-name="WWNum10">
        <text:list-item>
          <text:p text:style-name="P47">поддержка реляционной модели (данные структурированы, имеют чёткие типы и связи);</text:p>
        </text:list-item>
        <text:list-item>
          <text:p text:style-name="P47">работа в однопользовательском режиме (система разворачивается на одном компьютере оператора);</text:p>
        </text:list-item>
        <text:list-item>
          <text:p text:style-name="P47">высокая скорость выполнения операций вставки (не более 50 мс на запись) и выборки;</text:p>
        </text:list-item>
        <text:list-item>
          <text:p text:style-name="P47">поддержка стандартного языка SQL;</text:p>
        </text:list-item>
        <text:list-item>
          <text:p text:style-name="P47">простота резервного копирования и восстановления.</text:p>
        </text:list-item>
      </text:list>
      <text:p text:style-name="_5f_Текст">Были рассмотрены три варианта: SQLite, MySQL и PostgreSQL.</text:p>
      <text:list xml:id="list112909934679450" text:continue-numbering="true" text:style-name="WWNum10">
        <text:list-item>
          <text:p text:style-name="P47">SQLite – встраиваемая СУБД, не требует отдельного сервера, проста в настройке. Однако её производительность при одновременной записи и чтении может снижаться, а поддержка типов данных и конкурентного доступа ограничена. Для нашего сценария (один процесс записывает данные, другой – анализирует) SQLite подходит, но отсутствие гибких механизмов разграничения доступа и менее развитые средства для работы с большими текстовыми полями делают её менее предпочтительной.</text:p>
        </text:list-item>
        <text:list-item>
          <text:p text:style-name="P47">PostgreSQL – мощная объектно-реляционная СУБД с отличной масштабируемостью. Избыточна для данной задачи, требует дополнительных ресурсов и администрирования, что нецелесообразно для лабораторного/цехового применения.</text:p>
        </text:list-item>
        <text:list-item>
          <text:p text:style-name="P47"><text:soft-page-break/>MySQL – широко распространённая реляционная СУБД, сочетающая производительность, надёжность и простоту администрирования. Поддерживает необходимые типы данных (TEXT, REAL, INTEGER), обеспечивает скорость вставки до 50 мс, имеет удобные средства резервного копирования (mysqldump). При этом MySQL может работать как на том же компьютере, так и на удалённом сервере, что даёт возможность будущего расширения.</text:p>
        </text:list-item>
      </text:list>
      <text:p text:style-name="_5f_Текст">На основании анализа выбран MySQL в качестве СУБД для хранения всех измерений. </text:p>
      <text:h text:style-name="Heading_20_2" text:outline-level="2"><text:bookmark-start text:name="_Toc232328866"/>2.2 Проектирование базы данных<text:bookmark-end text:name="_Toc232328866"/><text:bookmark-end text:name="_Toc137554457"/></text:h>
      <text:h text:style-name="Heading_20_3" text:outline-level="3"><text:bookmark-start text:name="_Toc137554458"/><text:bookmark-start text:name="_Toc232328867"/>2.2.1 Концептуальная схема базы данных<text:bookmark-end text:name="_Toc137554458"/><text:bookmark-end text:name="_Toc232328867"/></text:h>
      <text:p text:style-name="_5f_Текст">Модель «сущность-связь» представлена на рисунке 2.1</text:p>
      <text:p text:style-name="_5f_Текст">В таблице 2.1 представлен список сущностей БД. В таблицах 2.2-2.4 представлены атрибуты сущности БД.</text:p>
      <text:p text:style-name="P56"><draw:frame text:anchor-type="as-char" draw:z-index="0" draw:name="Рисунок 65" draw:style-name="gr1" draw:text-style-name="P57" svg:width="174.79mm" svg:height="25.67mm"><draw:image xlink:href="Pictures/10000000000003A500000089902A4286.png" xlink:type="simple" xlink:show="embed" xlink:actuate="onLoad" draw:mime-type="image/png"><text:p/></draw:image></draw:frame></text:p>
      <text:p text:style-name="P58" loext:marker-style-name="T59">Рисунок 2.1 <text:span text:style-name="T60"></text:span> Модель «сущность-связь»</text:p>
      <text:p text:style-name="Caption">Таблица 2.1 – Сущности модели</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7" loext:marker-style-name="T24"><text:span text:style-name="T24">№</text:span><text:span text:style-name="T24"/></text:p>
          </table:table-cell>
          <table:table-cell table:style-name="Таблица4.A1" office:value-type="string">
            <text:p text:style-name="P17" loext:marker-style-name="T24"><text:span text:style-name="T24">Название сущности</text:span><text:span text:style-name="T24"/></text:p>
          </table:table-cell>
          <table:table-cell table:style-name="Таблица4.A1" office:value-type="string">
            <text:p text:style-name="P17" loext:marker-style-name="T24"><text:span text:style-name="T24">Описание</text:span><text:span text:style-name="T24"/></text:p>
          </table:table-cell>
        </table:table-row>
        <table:table-row table:style-name="Таблица4.2">
          <table:table-cell table:style-name="Таблица4.A1" office:value-type="string">
            <text:p text:style-name="P18" loext:marker-style-name="T43"><text:span text:style-name="T43">1</text:span><text:span text:style-name="T43"/></text:p>
          </table:table-cell>
          <table:table-cell table:style-name="Таблица4.A1" office:value-type="string">
            <text:p text:style-name="P18" loext:marker-style-name="T43"><text:span text:style-name="T43">Сессии</text:span><text:span text:style-name="T43"/></text:p>
          </table:table-cell>
          <table:table-cell table:style-name="Таблица4.A1" office:value-type="string">
            <text:p text:style-name="P18" loext:marker-style-name="T43"><text:span text:style-name="T43">Хранятся временные метки сессий работы программы</text:span><text:span text:style-name="T43"/></text:p>
          </table:table-cell>
        </table:table-row>
        <table:table-row table:style-name="Таблица4.2">
          <table:table-cell table:style-name="Таблица4.A1" office:value-type="string">
            <text:p text:style-name="P18" loext:marker-style-name="T43"><text:span text:style-name="T43">2</text:span><text:span text:style-name="T43"/></text:p>
          </table:table-cell>
          <table:table-cell table:style-name="Таблица4.A1" office:value-type="string">
            <text:p text:style-name="P18" loext:marker-style-name="T43"><text:span text:style-name="T43">Измерения</text:span><text:span text:style-name="T43"/></text:p>
          </table:table-cell>
          <table:table-cell table:style-name="Таблица4.A1" office:value-type="string">
            <text:p text:style-name="P18" loext:marker-style-name="T43"><text:span text:style-name="T43">Данные отдельных измерений</text:span><text:span text:style-name="T43"/></text:p>
          </table:table-cell>
        </table:table-row>
        <table:table-row table:style-name="Таблица4.2">
          <table:table-cell table:style-name="Таблица4.A1" office:value-type="string">
            <text:p text:style-name="P18" loext:marker-style-name="T43"><text:span text:style-name="T43">3</text:span><text:span text:style-name="T43"/></text:p>
          </table:table-cell>
          <table:table-cell table:style-name="Таблица4.A1" office:value-type="string">
            <text:p text:style-name="P18" loext:marker-style-name="T43"><text:span text:style-name="T43">Температурные точки</text:span><text:span text:style-name="T43"/></text:p>
          </table:table-cell>
          <table:table-cell table:style-name="Таблица4.A1" office:value-type="string">
            <text:p text:style-name="P18" loext:marker-style-name="T43"><text:span text:style-name="T43">Данные координат и температур точек измерения</text:span><text:span text:style-name="T43"/></text:p>
          </table:table-cell>
        </table:table-row>
      </table:table>
      <text:p text:style-name="Standard"/>
      <text:p text:style-name="Standard"/>
      <text:p text:style-name="Standard"/>
      <text:p text:style-name="Standard"/>
      <text:p text:style-name="Caption"><text:soft-page-break/>Таблица 2.2 – Атрибуты сущности «Сессии»</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7" loext:marker-style-name="T24"><text:span text:style-name="T24">№</text:span><text:span text:style-name="T24"/></text:p>
          </table:table-cell>
          <table:table-cell table:style-name="Таблица5.A1" office:value-type="string">
            <text:p text:style-name="P17" loext:marker-style-name="T24"><text:span text:style-name="T24">Название атрибута</text:span><text:span text:style-name="T24"/></text:p>
          </table:table-cell>
          <table:table-cell table:style-name="Таблица5.A1" office:value-type="string">
            <text:p text:style-name="P17" loext:marker-style-name="T24"><text:span text:style-name="T24">Тип</text:span><text:span text:style-name="T24"/></text:p>
          </table:table-cell>
          <table:table-cell table:style-name="Таблица5.A1" office:value-type="string">
            <text:p text:style-name="P17" loext:marker-style-name="T24"><text:span text:style-name="T24">Описание</text:span><text:span text:style-name="T24"/></text:p>
          </table:table-cell>
        </table:table-row>
        <table:table-row table:style-name="Таблица5.2">
          <table:table-cell table:style-name="Таблица5.A1" office:value-type="string">
            <text:p text:style-name="P18" loext:marker-style-name="T43"><text:span text:style-name="T43">1</text:span><text:span text:style-name="T43"/></text:p>
          </table:table-cell>
          <table:table-cell table:style-name="Таблица5.A1" office:value-type="string">
            <text:p text:style-name="P18" loext:marker-style-name="T61"><text:span text:style-name="T61">Id</text:span><text:span text:style-name="T61"/></text:p>
          </table:table-cell>
          <table:table-cell table:style-name="Таблица5.A1" office:value-type="string">
            <text:p text:style-name="P18" loext:marker-style-name="T43"><text:span text:style-name="T43">Числовой</text:span><text:span text:style-name="T43"/></text:p>
          </table:table-cell>
          <table:table-cell table:style-name="Таблица5.A1" office:value-type="string">
            <text:p text:style-name="P18" loext:marker-style-name="T43"><text:span text:style-name="T43">Номер сессии</text:span><text:span text:style-name="T43"/></text:p>
          </table:table-cell>
        </table:table-row>
        <table:table-row table:style-name="Таблица5.2">
          <table:table-cell table:style-name="Таблица5.A1" office:value-type="string">
            <text:p text:style-name="P18" loext:marker-style-name="T43"><text:span text:style-name="T43">2</text:span><text:span text:style-name="T43"/></text:p>
          </table:table-cell>
          <table:table-cell table:style-name="Таблица5.A1" office:value-type="string">
            <text:p text:style-name="P18" loext:marker-style-name="T43"><text:span text:style-name="T43">Время создания</text:span><text:span text:style-name="T43"/></text:p>
          </table:table-cell>
          <table:table-cell table:style-name="Таблица5.A1" office:value-type="string">
            <text:p text:style-name="P18" loext:marker-style-name="T43"><text:span text:style-name="T43">Дата/время</text:span><text:span text:style-name="T43"/></text:p>
          </table:table-cell>
          <table:table-cell table:style-name="Таблица5.A1" office:value-type="string">
            <text:p text:style-name="P18" loext:marker-style-name="T43"><text:span text:style-name="T43">Время создания сессии</text:span><text:span text:style-name="T43"/></text:p>
          </table:table-cell>
        </table:table-row>
      </table:table>
      <text:p text:style-name="Caption"/>
      <text:p text:style-name="Caption">Таблица 2.3 – Атрибуты сущности «Измерения»</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7" loext:marker-style-name="T24"><text:span text:style-name="T24">№</text:span><text:span text:style-name="T24"/></text:p>
          </table:table-cell>
          <table:table-cell table:style-name="Таблица6.A1" office:value-type="string">
            <text:p text:style-name="P17" loext:marker-style-name="T24"><text:span text:style-name="T24">Название атрибута</text:span><text:span text:style-name="T24"/></text:p>
          </table:table-cell>
          <table:table-cell table:style-name="Таблица6.A1" office:value-type="string">
            <text:p text:style-name="P17" loext:marker-style-name="T24"><text:span text:style-name="T24">Тип</text:span><text:span text:style-name="T24"/></text:p>
          </table:table-cell>
          <table:table-cell table:style-name="Таблица6.A1" office:value-type="string">
            <text:p text:style-name="P17" loext:marker-style-name="T24"><text:span text:style-name="T24">Описание</text:span><text:span text:style-name="T24"/></text:p>
          </table:table-cell>
        </table:table-row>
        <table:table-row table:style-name="Таблица6.2">
          <table:table-cell table:style-name="Таблица6.A1" office:value-type="string">
            <text:p text:style-name="P18" loext:marker-style-name="T43"><text:span text:style-name="T43">1</text:span><text:span text:style-name="T43"/></text:p>
          </table:table-cell>
          <table:table-cell table:style-name="Таблица6.A1" office:value-type="string">
            <text:p text:style-name="P18" loext:marker-style-name="T43"><text:span text:style-name="T61">Id</text:span><text:span text:style-name="T61"/></text:p>
          </table:table-cell>
          <table:table-cell table:style-name="Таблица6.A1" office:value-type="string">
            <text:p text:style-name="P18" loext:marker-style-name="T43"><text:span text:style-name="T43">Числовой</text:span><text:span text:style-name="T43"/></text:p>
          </table:table-cell>
          <table:table-cell table:style-name="Таблица6.A1" office:value-type="string">
            <text:p text:style-name="P18" loext:marker-style-name="T43"><text:span text:style-name="T43">Номер измерения</text:span><text:span text:style-name="T43"/></text:p>
          </table:table-cell>
        </table:table-row>
        <table:table-row table:style-name="Таблица6.2">
          <table:table-cell table:style-name="Таблица6.A1" office:value-type="string">
            <text:p text:style-name="P18" loext:marker-style-name="T43"><text:span text:style-name="T43">2</text:span><text:span text:style-name="T43"/></text:p>
          </table:table-cell>
          <table:table-cell table:style-name="Таблица6.A1" office:value-type="string">
            <text:p text:style-name="P18" loext:marker-style-name="T43"><text:span text:style-name="T61">Id</text:span><text:span text:style-name="T43"> сессии</text:span></text:p>
          </table:table-cell>
          <table:table-cell table:style-name="Таблица6.A1" office:value-type="string">
            <text:p text:style-name="P18" loext:marker-style-name="T43"><text:span text:style-name="T43">Числовой</text:span><text:span text:style-name="T43"/></text:p>
          </table:table-cell>
          <table:table-cell table:style-name="Таблица6.A1" office:value-type="string">
            <text:p text:style-name="P18" loext:marker-style-name="T43"><text:span text:style-name="T43">Номер сессии, к которой относится измерение</text:span><text:span text:style-name="T43"/></text:p>
          </table:table-cell>
        </table:table-row>
        <table:table-row table:style-name="Таблица6.2">
          <table:table-cell table:style-name="Таблица6.A1" office:value-type="string">
            <text:p text:style-name="P18" loext:marker-style-name="T43"><text:span text:style-name="T43">3</text:span><text:span text:style-name="T43"/></text:p>
          </table:table-cell>
          <table:table-cell table:style-name="Таблица6.A1" office:value-type="string">
            <text:p text:style-name="P18" loext:marker-style-name="T43"><text:span text:style-name="T43">Временная метка</text:span><text:span text:style-name="T43"/></text:p>
          </table:table-cell>
          <table:table-cell table:style-name="Таблица6.A1" office:value-type="string">
            <text:p text:style-name="P18" loext:marker-style-name="T43"><text:span text:style-name="T43">Дата/время</text:span><text:span text:style-name="T43"/></text:p>
          </table:table-cell>
          <table:table-cell table:style-name="Таблица6.A1" office:value-type="string">
            <text:p text:style-name="P18" loext:marker-style-name="T43"><text:span text:style-name="T43">Время создания сеанса измерения</text:span><text:span text:style-name="T43"/></text:p>
          </table:table-cell>
        </table:table-row>
        <table:table-row table:style-name="Таблица6.2">
          <table:table-cell table:style-name="Таблица6.A1" office:value-type="string">
            <text:p text:style-name="P18" loext:marker-style-name="T43"><text:span text:style-name="T43">4</text:span><text:span text:style-name="T43"/></text:p>
          </table:table-cell>
          <table:table-cell table:style-name="Таблица6.A1" office:value-type="string">
            <text:p text:style-name="P18" loext:marker-style-name="T43"><text:span text:style-name="T43">Путь до изображения</text:span><text:span text:style-name="T43"/></text:p>
          </table:table-cell>
          <table:table-cell table:style-name="Таблица6.A1" office:value-type="string">
            <text:p text:style-name="P18" loext:marker-style-name="T43"><text:span text:style-name="T43">Текстовый</text:span><text:span text:style-name="T43"/></text:p>
          </table:table-cell>
          <table:table-cell table:style-name="Таблица6.A1" office:value-type="string">
            <text:p text:style-name="P18" loext:marker-style-name="T43"><text:span text:style-name="T43">Путь до изображения в сеансе измерения</text:span><text:span text:style-name="T43"/></text:p>
          </table:table-cell>
        </table:table-row>
      </table:table>
      <text:p text:style-name="P59" loext:marker-style-name="T43"/>
      <text:p text:style-name="Caption">Таблица 2.4 – Атрибуты сущности «Температурные точки»</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office:value-type="string">
            <text:p text:style-name="P17" loext:marker-style-name="T24"><text:span text:style-name="T24">№</text:span><text:span text:style-name="T24"/></text:p>
          </table:table-cell>
          <table:table-cell table:style-name="Таблица7.A1" office:value-type="string">
            <text:p text:style-name="P17" loext:marker-style-name="T24"><text:span text:style-name="T24">Название атрибута</text:span><text:span text:style-name="T24"/></text:p>
          </table:table-cell>
          <table:table-cell table:style-name="Таблица7.A1" office:value-type="string">
            <text:p text:style-name="P17" loext:marker-style-name="T24"><text:span text:style-name="T24">Тип</text:span><text:span text:style-name="T24"/></text:p>
          </table:table-cell>
          <table:table-cell table:style-name="Таблица7.A1" office:value-type="string">
            <text:p text:style-name="P17" loext:marker-style-name="T24"><text:span text:style-name="T24">Описание</text:span><text:span text:style-name="T24"/></text:p>
          </table:table-cell>
        </table:table-row>
        <table:table-row table:style-name="Таблица7.2">
          <table:table-cell table:style-name="Таблица7.A1" office:value-type="string">
            <text:p text:style-name="P18" loext:marker-style-name="T43"><text:span text:style-name="T43">1</text:span><text:span text:style-name="T43"/></text:p>
          </table:table-cell>
          <table:table-cell table:style-name="Таблица7.A1" office:value-type="string">
            <text:p text:style-name="P18" loext:marker-style-name="T43"><text:span text:style-name="T61">Id</text:span><text:span text:style-name="T61"/></text:p>
          </table:table-cell>
          <table:table-cell table:style-name="Таблица7.A1" office:value-type="string">
            <text:p text:style-name="P18" loext:marker-style-name="T43"><text:span text:style-name="T43">Числовой</text:span><text:span text:style-name="T43"/></text:p>
          </table:table-cell>
          <table:table-cell table:style-name="Таблица7.A1" office:value-type="string">
            <text:p text:style-name="P18" loext:marker-style-name="T43"><text:span text:style-name="T43">Номер точки</text:span><text:span text:style-name="T43"/></text:p>
          </table:table-cell>
        </table:table-row>
        <table:table-row table:style-name="Таблица7.2">
          <table:table-cell table:style-name="Таблица7.A1" office:value-type="string">
            <text:p text:style-name="P18" loext:marker-style-name="T43"><text:span text:style-name="T43">2</text:span><text:span text:style-name="T43"/></text:p>
          </table:table-cell>
          <table:table-cell table:style-name="Таблица7.A1" office:value-type="string">
            <text:p text:style-name="P18" loext:marker-style-name="T43"><text:span text:style-name="T61">Id</text:span><text:span text:style-name="T43"> измерения</text:span></text:p>
          </table:table-cell>
          <table:table-cell table:style-name="Таблица7.A1" office:value-type="string">
            <text:p text:style-name="P18" loext:marker-style-name="T43"><text:span text:style-name="T43">Числовой</text:span><text:span text:style-name="T43"/></text:p>
          </table:table-cell>
          <table:table-cell table:style-name="Таблица7.A1" office:value-type="string">
            <text:p text:style-name="P18" loext:marker-style-name="T43"><text:span text:style-name="T43">Номер сеанса измерения, в котором измерена точка</text:span><text:span text:style-name="T43"/></text:p>
          </table:table-cell>
        </table:table-row>
        <table:table-row table:style-name="Таблица7.2">
          <table:table-cell table:style-name="Таблица7.A1" office:value-type="string">
            <text:p text:style-name="P18" loext:marker-style-name="T43"><text:span text:style-name="T43">3</text:span><text:span text:style-name="T43"/></text:p>
          </table:table-cell>
          <table:table-cell table:style-name="Таблица7.A1" office:value-type="string">
            <text:p text:style-name="P18" loext:marker-style-name="T61"><text:span text:style-name="T43">Позиция по X</text:span><text:span text:style-name="T61"/></text:p>
          </table:table-cell>
          <table:table-cell table:style-name="Таблица7.A1" office:value-type="string">
            <text:p text:style-name="P18" loext:marker-style-name="T43"><text:span text:style-name="T43">Числовой</text:span><text:span text:style-name="T43"/></text:p>
          </table:table-cell>
          <table:table-cell table:style-name="Таблица7.A1" office:value-type="string">
            <text:p text:style-name="P18" loext:marker-style-name="T43"><text:span text:style-name="T43">Координата измеренной точки на фотографии по оси Х</text:span><text:span text:style-name="T43"/></text:p>
          </table:table-cell>
        </table:table-row>
        <table:table-row table:style-name="Таблица7.2">
          <table:table-cell table:style-name="Таблица7.A1" office:value-type="string">
            <text:p text:style-name="P18" loext:marker-style-name="T43"><text:span text:style-name="T43">4</text:span><text:span text:style-name="T43"/></text:p>
          </table:table-cell>
          <table:table-cell table:style-name="Таблица7.A1" office:value-type="string">
            <text:p text:style-name="P18" loext:marker-style-name="T61"><text:span text:style-name="T43">Позиция по Y</text:span><text:span text:style-name="T61"/></text:p>
          </table:table-cell>
          <table:table-cell table:style-name="Таблица7.A1" office:value-type="string">
            <text:p text:style-name="P18" loext:marker-style-name="T43"><text:span text:style-name="T43">Числовой</text:span><text:span text:style-name="T43"/></text:p>
          </table:table-cell>
          <table:table-cell table:style-name="Таблица7.A1" office:value-type="string">
            <text:p text:style-name="P18" loext:marker-style-name="T43"><text:span text:style-name="T43">Координата измеренной точки на фотографии по оси </text:span><text:span text:style-name="T61">Y</text:span></text:p>
          </table:table-cell>
        </table:table-row>
        <table:table-row table:style-name="Таблица7.2">
          <table:table-cell table:style-name="Таблица7.A1" office:value-type="string">
            <text:p text:style-name="P18" loext:marker-style-name="T43"><text:span text:style-name="T43">5</text:span><text:span text:style-name="T43"/></text:p>
          </table:table-cell>
          <table:table-cell table:style-name="Таблица7.A1" office:value-type="string">
            <text:p text:style-name="P18" loext:marker-style-name="T61"><text:span text:style-name="T43">Температура </text:span><text:span text:style-name="T61"/></text:p>
          </table:table-cell>
          <table:table-cell table:style-name="Таблица7.A1" office:value-type="string">
            <text:p text:style-name="P18" loext:marker-style-name="T43"><text:span text:style-name="T43">Числовой</text:span><text:span text:style-name="T43"/></text:p>
          </table:table-cell>
          <table:table-cell table:style-name="Таблица7.A1" office:value-type="string">
            <text:p text:style-name="P18" loext:marker-style-name="T43"><text:span text:style-name="T43">Измеренная температура в точке</text:span><text:span text:style-name="T43"/></text:p>
          </table:table-cell>
        </table:table-row>
      </table:table>
      <text:h text:style-name="Heading_20_3" text:outline-level="3"/>
      <text:p text:style-name="P60" loext:marker-style-name="T62"/>
      <text:h text:style-name="P61" text:outline-level="3"><text:bookmark-start text:name="_Toc232328868"/>2.2.2 Внутренняя схема базы данных<text:bookmark-end text:name="_Toc232328868"/><text:bookmark-start text:name="_Toc137554460"/></text:h>
      <text:p text:style-name="P62" loext:marker-style-name="T63"><text:span text:style-name="T63">В таблицах 2.5-2.7 представлены физические модели БД.</text:span><text:span text:style-name="T63"/></text:p>
      <text:p text:style-name="Caption">Таблица 2.5 <text:span text:style-name="T60"></text:span> Физическая модель <text:span text:style-name="T50">sessions</text:span> [Сессии]</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3" loext:marker-style-name="T64"><text:span text:style-name="T64">№</text:span><text:span text:style-name="T64"/></text:p>
          </table:table-cell>
          <table:table-cell table:style-name="Таблица8.A1" office:value-type="string">
            <text:p text:style-name="P53" loext:marker-style-name="T64"><text:span text:style-name="T64">Название поля</text:span><text:span text:style-name="T64"/></text:p>
          </table:table-cell>
          <table:table-cell table:style-name="Таблица8.A1" office:value-type="string">
            <text:p text:style-name="P53" loext:marker-style-name="T64"><text:span text:style-name="T64">Тип и размер</text:span><text:span text:style-name="T64"/></text:p>
          </table:table-cell>
          <table:table-cell table:style-name="Таблица8.A1" office:value-type="string">
            <text:p text:style-name="P53" loext:marker-style-name="T64"><text:span text:style-name="T64">Значение по умолчанию</text:span><text:span text:style-name="T64"/></text:p>
          </table:table-cell>
          <table:table-cell table:style-name="Таблица8.A1" office:value-type="string">
            <text:p text:style-name="P53" loext:marker-style-name="T64"><text:span text:style-name="T64">Допустимые значения</text:span><text:span text:style-name="T64"/></text:p>
          </table:table-cell>
        </table:table-row>
        <table:table-row table:style-name="Таблица8.2">
          <table:table-cell table:style-name="Таблица8.A1" office:value-type="string">
            <text:p text:style-name="P53" loext:marker-style-name="T65"><text:span text:style-name="T65">1</text:span><text:span text:style-name="T65"/></text:p>
          </table:table-cell>
          <table:table-cell table:style-name="Таблица8.A1" office:value-type="string">
            <text:p text:style-name="P53" loext:marker-style-name="T65"><text:span text:style-name="T61">id [id]</text:span><text:span text:style-name="T58"/></text:p>
          </table:table-cell>
          <table:table-cell table:style-name="Таблица8.A1" office:value-type="string">
            <text:p text:style-name="P53" loext:marker-style-name="T65"><text:span text:style-name="T65">INT</text:span><text:span text:style-name="T65"/></text:p>
          </table:table-cell>
          <table:table-cell table:style-name="Таблица8.A1" office:value-type="string">
            <text:p text:style-name="P53" loext:marker-style-name="T65"><text:span text:style-name="T65">1</text:span><text:span text:style-name="T65"/></text:p>
          </table:table-cell>
          <table:table-cell table:style-name="Таблица8.A1" office:value-type="string">
            <text:p text:style-name="P53" loext:marker-style-name="T65"><text:span text:style-name="T65">1…2147483647</text:span><text:span text:style-name="T65"/></text:p>
          </table:table-cell>
        </table:table-row>
        <table:table-row table:style-name="Таблица8.1">
          <table:table-cell table:style-name="Таблица8.A1" office:value-type="string">
            <text:p text:style-name="P53" loext:marker-style-name="T65"><text:span text:style-name="T65">2</text:span><text:span text:style-name="T65"/></text:p>
          </table:table-cell>
          <table:table-cell table:style-name="Таблица8.A1" office:value-type="string">
            <text:p text:style-name="P53" loext:marker-style-name="T65"><text:span text:style-name="T61">created_at [</text:span><text:span text:style-name="T43">Время создания</text:span><text:span text:style-name="T61">]</text:span></text:p>
          </table:table-cell>
          <table:table-cell table:style-name="Таблица8.A1" office:value-type="string">
            <text:p text:style-name="P53" loext:marker-style-name="T65"><text:span text:style-name="T65">DATETIME</text:span><text:span text:style-name="T65"/></text:p>
          </table:table-cell>
          <table:table-cell table:style-name="Таблица8.A1" office:value-type="string">
            <text:p text:style-name="P53" loext:marker-style-name="T65"><text:span text:style-name="T65">-</text:span><text:span text:style-name="T65"/></text:p>
          </table:table-cell>
          <table:table-cell table:style-name="Таблица8.A1" office:value-type="string">
            <text:p text:style-name="P53" loext:marker-style-name="T65"><text:span text:style-name="T65">00:00:00 12.01.2026</text:span><text:span text:style-name="T65"/></text:p>
          </table:table-cell>
        </table:table-row>
      </table:table>
      <text:p text:style-name="_5f_Текст"/>
      <text:p text:style-name="_5f_Текст">В таблице sessions в качестве индекса используется первичный ключ по полю id, который является уникальным и сортируется по возрастанию.</text:p>
      <text:p text:style-name="_5f_Текст"/>
      <text:p text:style-name="Caption">Таблица 2.6 <text:span text:style-name="T60"></text:span> Физическая модель measurements [Измерения]</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53" loext:marker-style-name="T64"><text:span text:style-name="T64">№</text:span><text:span text:style-name="T64"/></text:p>
          </table:table-cell>
          <table:table-cell table:style-name="Таблица9.A1" office:value-type="string">
            <text:p text:style-name="P53" loext:marker-style-name="T64"><text:span text:style-name="T64">Название поля</text:span><text:span text:style-name="T64"/></text:p>
          </table:table-cell>
          <table:table-cell table:style-name="Таблица9.A1" office:value-type="string">
            <text:p text:style-name="P53" loext:marker-style-name="T64"><text:span text:style-name="T64">Тип и размер</text:span><text:span text:style-name="T64"/></text:p>
          </table:table-cell>
          <table:table-cell table:style-name="Таблица9.A1" office:value-type="string">
            <text:p text:style-name="P53" loext:marker-style-name="T64"><text:span text:style-name="T64">Значение по умолчанию</text:span><text:span text:style-name="T64"/></text:p>
          </table:table-cell>
          <table:table-cell table:style-name="Таблица9.A1" office:value-type="string">
            <text:p text:style-name="P53" loext:marker-style-name="T64"><text:span text:style-name="T64">Допустимые значения</text:span><text:span text:style-name="T64"/></text:p>
          </table:table-cell>
        </table:table-row>
        <table:table-row table:style-name="Таблица9.1">
          <table:table-cell table:style-name="Таблица9.A1" office:value-type="string">
            <text:p text:style-name="P53" loext:marker-style-name="T65"><text:span text:style-name="T65">1</text:span><text:span text:style-name="T65"/></text:p>
          </table:table-cell>
          <table:table-cell table:style-name="Таблица9.A1" office:value-type="string">
            <text:p text:style-name="P53" loext:marker-style-name="T66"><text:span text:style-name="T18">id</text:span><text:span text:style-name="T67"> [id]</text:span></text:p>
          </table:table-cell>
          <table:table-cell table:style-name="Таблица9.A1" office:value-type="string">
            <text:p text:style-name="P53" loext:marker-style-name="T65"><text:span text:style-name="T65">INT</text:span><text:span text:style-name="T65"/></text:p>
          </table:table-cell>
          <table:table-cell table:style-name="Таблица9.A1" office:value-type="string">
            <text:p text:style-name="P53" loext:marker-style-name="T65"><text:span text:style-name="T65">1</text:span><text:span text:style-name="T65"/></text:p>
          </table:table-cell>
          <table:table-cell table:style-name="Таблица9.A1" office:value-type="string">
            <text:p text:style-name="P53" loext:marker-style-name="T65"><text:span text:style-name="T65">1…2147483647</text:span><text:span text:style-name="T65"/></text:p>
          </table:table-cell>
        </table:table-row>
        <table:table-row table:style-name="Таблица9.1">
          <table:table-cell table:style-name="Таблица9.A1" office:value-type="string">
            <text:p text:style-name="P53" loext:marker-style-name="T65"><text:span text:style-name="T65">2</text:span><text:span text:style-name="T65"/></text:p>
          </table:table-cell>
          <table:table-cell table:style-name="Таблица9.A1" office:value-type="string">
            <text:p text:style-name="P53" loext:marker-style-name="T65"><text:span text:style-name="T67">session_id [</text:span><text:span text:style-name="T61">Id</text:span><text:span text:style-name="T43"> сессии</text:span><text:span text:style-name="T67">]</text:span></text:p>
          </table:table-cell>
          <table:table-cell table:style-name="Таблица9.A1" office:value-type="string">
            <text:p text:style-name="P53" loext:marker-style-name="T65"><text:span text:style-name="T65">INT</text:span><text:span text:style-name="T65"/></text:p>
          </table:table-cell>
          <table:table-cell table:style-name="Таблица9.A1" office:value-type="string">
            <text:p text:style-name="P53" loext:marker-style-name="T65"><text:span text:style-name="T65">1</text:span><text:span text:style-name="T65"/></text:p>
          </table:table-cell>
          <table:table-cell table:style-name="Таблица9.A1" office:value-type="string">
            <text:p text:style-name="P53" loext:marker-style-name="T65"><text:span text:style-name="T65">1…2147483647</text:span><text:span text:style-name="T65"/></text:p>
          </table:table-cell>
        </table:table-row>
        <table:table-row table:style-name="Таблица9.1">
          <table:table-cell table:style-name="Таблица9.A1" office:value-type="string">
            <text:p text:style-name="P53" loext:marker-style-name="T65"><text:span text:style-name="T65">3</text:span><text:span text:style-name="T65"/></text:p>
          </table:table-cell>
          <table:table-cell table:style-name="Таблица9.A1" office:value-type="string">
            <text:p text:style-name="P53" loext:marker-style-name="T65"><text:span text:style-name="T66">timestamp [</text:span><text:span text:style-name="T43">Временная метка</text:span><text:span text:style-name="T66">]</text:span></text:p>
          </table:table-cell>
          <table:table-cell table:style-name="Таблица9.A1" office:value-type="string">
            <text:p text:style-name="P53" loext:marker-style-name="T65"><text:span text:style-name="T65">DATETIME</text:span><text:span text:style-name="T65"/></text:p>
          </table:table-cell>
          <table:table-cell table:style-name="Таблица9.A1" office:value-type="string">
            <text:p text:style-name="P53" loext:marker-style-name="T65"><text:span text:style-name="T65">-</text:span><text:span text:style-name="T65"/></text:p>
          </table:table-cell>
          <table:table-cell table:style-name="Таблица9.A1" office:value-type="string">
            <text:p text:style-name="P53" loext:marker-style-name="T65"><text:span text:style-name="T65">00:00:00 12.01.2026</text:span><text:span text:style-name="T65"/></text:p>
          </table:table-cell>
        </table:table-row>
        <table:table-row table:style-name="Таблица9.1">
          <table:table-cell table:style-name="Таблица9.A1" office:value-type="string">
            <text:p text:style-name="P53" loext:marker-style-name="T65"><text:span text:style-name="T65">4</text:span><text:span text:style-name="T65"/></text:p>
          </table:table-cell>
          <table:table-cell table:style-name="Таблица9.A1" office:value-type="string">
            <text:p text:style-name="P53" loext:marker-style-name="T65"><text:span text:style-name="T65">image_</text:span><text:span text:style-name="T66">path</text:span><text:span text:style-name="T65"> [</text:span><text:span text:style-name="T43">Путь до изображения</text:span><text:span text:style-name="T65">]</text:span></text:p>
          </table:table-cell>
          <table:table-cell table:style-name="Таблица9.A1" office:value-type="string">
            <text:p text:style-name="P53" loext:marker-style-name="T66"><text:span text:style-name="T66">VARCHAR(255)</text:span><text:span text:style-name="T66"/></text:p>
          </table:table-cell>
          <table:table-cell table:style-name="Таблица9.A1" office:value-type="string">
            <text:p text:style-name="P53" loext:marker-style-name="T66"><text:span text:style-name="T65">-</text:span><text:span text:style-name="T66"/></text:p>
          </table:table-cell>
          <table:table-cell table:style-name="Таблица9.A1" office:value-type="string">
            <text:p text:style-name="P53" loext:marker-style-name="T65"><text:span text:style-name="T65">Без ограничений</text:span><text:span text:style-name="T65"/></text:p>
          </table:table-cell>
        </table:table-row>
      </table:table>
      <text:p text:style-name="_5f_Текст"/>
      <text:p text:style-name="_5f_Текст">В таблице <text:span text:style-name="T50">measurements</text:span> в качестве индекса используется первичный ключ по полю id, который является уникальным и сортируется по возрастанию.</text:p>
      <text:p text:style-name="P54" loext:marker-style-name="T56"/>
      <text:p text:style-name="P63">Таблица 2.7 <text:span text:style-name="T60"></text:span> Физическая модель <text:span text:style-name="T50">temperature</text:span>_<text:span text:style-name="T50">points</text:span> [Температурные точ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53" loext:marker-style-name="T64"><text:span text:style-name="T64">№</text:span><text:span text:style-name="T64"/></text:p>
          </table:table-cell>
          <table:table-cell table:style-name="Таблица10.A1" office:value-type="string">
            <text:p text:style-name="P53" loext:marker-style-name="T64"><text:span text:style-name="T64">Название поля</text:span><text:span text:style-name="T64"/></text:p>
          </table:table-cell>
          <table:table-cell table:style-name="Таблица10.A1" office:value-type="string">
            <text:p text:style-name="P53" loext:marker-style-name="T64"><text:span text:style-name="T64">Тип и размер</text:span><text:span text:style-name="T64"/></text:p>
          </table:table-cell>
          <table:table-cell table:style-name="Таблица10.A1" office:value-type="string">
            <text:p text:style-name="P53" loext:marker-style-name="T64"><text:span text:style-name="T64">Значение по умолчанию</text:span><text:span text:style-name="T64"/></text:p>
          </table:table-cell>
          <table:table-cell table:style-name="Таблица10.A1" office:value-type="string">
            <text:p text:style-name="P53" loext:marker-style-name="T64"><text:span text:style-name="T64">Допустимые значения</text:span><text:span text:style-name="T64"/></text:p>
          </table:table-cell>
        </table:table-row>
        <table:table-row table:style-name="Таблица10.1">
          <table:table-cell table:style-name="Таблица10.A1" office:value-type="string">
            <text:p text:style-name="P53" loext:marker-style-name="T65"><text:span text:style-name="T65">1</text:span><text:span text:style-name="T65"/></text:p>
          </table:table-cell>
          <table:table-cell table:style-name="Таблица10.A1" office:value-type="string">
            <text:p text:style-name="P53" loext:marker-style-name="T65"><text:span text:style-name="T18">id</text:span><text:span text:style-name="T67"> [id]</text:span></text:p>
          </table:table-cell>
          <table:table-cell table:style-name="Таблица10.A1" office:value-type="string">
            <text:p text:style-name="P53" loext:marker-style-name="T65"><text:span text:style-name="T65">INT</text:span><text:span text:style-name="T65"/></text:p>
          </table:table-cell>
          <table:table-cell table:style-name="Таблица10.A1" office:value-type="string">
            <text:p text:style-name="P53" loext:marker-style-name="T65"><text:span text:style-name="T65">1</text:span><text:span text:style-name="T65"/></text:p>
          </table:table-cell>
          <table:table-cell table:style-name="Таблица10.A1" office:value-type="string">
            <text:p text:style-name="P53" loext:marker-style-name="T65"><text:span text:style-name="T65">1…2147483647</text:span><text:span text:style-name="T65"/></text:p>
          </table:table-cell>
        </table:table-row>
        <table:table-row table:style-name="Таблица10.1">
          <table:table-cell table:style-name="Таблица10.A1" office:value-type="string">
            <text:p text:style-name="P53" loext:marker-style-name="T65"><text:span text:style-name="T65">2</text:span><text:span text:style-name="T65"/></text:p>
          </table:table-cell>
          <table:table-cell table:style-name="Таблица10.A1" office:value-type="string">
            <text:p text:style-name="P53" loext:marker-style-name="T65"><text:span text:style-name="T67">measurement_id [</text:span><text:span text:style-name="T61">Id</text:span><text:span text:style-name="T43"> измерения</text:span><text:span text:style-name="T67">]</text:span></text:p>
          </table:table-cell>
          <table:table-cell table:style-name="Таблица10.A1" office:value-type="string">
            <text:p text:style-name="P53" loext:marker-style-name="T65"><text:span text:style-name="T65">INT</text:span><text:span text:style-name="T65"/></text:p>
          </table:table-cell>
          <table:table-cell table:style-name="Таблица10.A1" office:value-type="string">
            <text:p text:style-name="P53" loext:marker-style-name="T65"><text:span text:style-name="T65">1</text:span><text:span text:style-name="T65"/></text:p>
          </table:table-cell>
          <table:table-cell table:style-name="Таблица10.A1" office:value-type="string">
            <text:p text:style-name="P53" loext:marker-style-name="T65"><text:span text:style-name="T65">1…2147483647</text:span><text:span text:style-name="T65"/></text:p>
          </table:table-cell>
        </table:table-row>
        <table:table-row table:style-name="Таблица10.1">
          <table:table-cell table:style-name="Таблица10.A1" office:value-type="string">
            <text:p text:style-name="P53" loext:marker-style-name="T65"><text:span text:style-name="T65">3</text:span><text:span text:style-name="T65"/></text:p>
          </table:table-cell>
          <table:table-cell table:style-name="Таблица10.A1" office:value-type="string">
            <text:p text:style-name="P53" loext:marker-style-name="T65"><text:span text:style-name="T66">pos</text:span><text:span text:style-name="T65">_</text:span><text:span text:style-name="T66">x</text:span><text:span text:style-name="T65"> [</text:span><text:span text:style-name="T43">Позиция по X</text:span><text:span text:style-name="T65">]</text:span></text:p>
          </table:table-cell>
          <table:table-cell table:style-name="Таблица10.A1" office:value-type="string">
            <text:p text:style-name="P53" loext:marker-style-name="T65"><text:span text:style-name="T65">INT</text:span><text:span text:style-name="T65"/></text:p>
          </table:table-cell>
          <table:table-cell table:style-name="Таблица10.A1" office:value-type="string">
            <text:p text:style-name="P53" loext:marker-style-name="T65"><text:span text:style-name="T65">-</text:span><text:span text:style-name="T65"/></text:p>
          </table:table-cell>
          <table:table-cell table:style-name="Таблица10.A1" office:value-type="string">
            <text:p text:style-name="P53" loext:marker-style-name="T66"><text:span text:style-name="T65">1…</text:span><text:span text:style-name="T66">1600</text:span></text:p>
          </table:table-cell>
        </table:table-row>
        <table:table-row table:style-name="Таблица10.1">
          <table:table-cell table:style-name="Таблица10.A1" office:value-type="string">
            <text:p text:style-name="P53" loext:marker-style-name="T65"><text:span text:style-name="T65">4</text:span><text:span text:style-name="T65"/></text:p>
          </table:table-cell>
          <table:table-cell table:style-name="Таблица10.A1" office:value-type="string">
            <text:p text:style-name="P53" loext:marker-style-name="T65"><text:span text:style-name="T65">pos_y [</text:span><text:span text:style-name="T43">Позиция по Y</text:span><text:span text:style-name="T65">]</text:span></text:p>
          </table:table-cell>
          <table:table-cell table:style-name="Таблица10.A1" office:value-type="string">
            <text:p text:style-name="P53" loext:marker-style-name="T65"><text:span text:style-name="T65">INT</text:span><text:span text:style-name="T65"/></text:p>
          </table:table-cell>
          <table:table-cell table:style-name="Таблица10.A1" office:value-type="string">
            <text:p text:style-name="P53" loext:marker-style-name="T66"><text:span text:style-name="T65">-</text:span><text:span text:style-name="T66"/></text:p>
          </table:table-cell>
          <table:table-cell table:style-name="Таблица10.A1" office:value-type="string">
            <text:p text:style-name="P53" loext:marker-style-name="T66"><text:span text:style-name="T65">1…</text:span><text:span text:style-name="T66">1200</text:span></text:p>
          </table:table-cell>
        </table:table-row>
        <table:table-row table:style-name="Таблица10.1">
          <table:table-cell table:style-name="Таблица10.A1" office:value-type="string">
            <text:p text:style-name="P53" loext:marker-style-name="T65"><text:span text:style-name="T65">5</text:span><text:span text:style-name="T65"/></text:p>
          </table:table-cell>
          <table:table-cell table:style-name="Таблица10.A1" office:value-type="string">
            <text:p text:style-name="P53" loext:marker-style-name="T65"><text:span text:style-name="T66">temperature [</text:span><text:span text:style-name="T43">Температура</text:span><text:span text:style-name="T66">]</text:span></text:p>
          </table:table-cell>
          <table:table-cell table:style-name="Таблица10.A1" office:value-type="string">
            <text:p text:style-name="P53" loext:marker-style-name="T66"><text:span text:style-name="T66">DECIMAL(6,2)</text:span><text:span text:style-name="T66"/></text:p>
          </table:table-cell>
          <table:table-cell table:style-name="Таблица10.A1" office:value-type="string">
            <text:p text:style-name="P53" loext:marker-style-name="T66"><text:span text:style-name="T66">-</text:span><text:span text:style-name="T66"/></text:p>
          </table:table-cell>
          <table:table-cell table:style-name="Таблица10.A1" office:value-type="string">
            <text:p text:style-name="P53" loext:marker-style-name="T66"><text:span text:style-name="T66">-9999,99…9999,99</text:span><text:span text:style-name="T66"/></text:p>
          </table:table-cell>
        </table:table-row>
      </table:table>
      <text:p text:style-name="_5f_Текст"/>
      <text:p text:style-name="_5f_Текст">В таблице measurements в качестве индекса используется первичный ключ по полю id, который является уникальным и сортируется по возрастанию.</text:p>
      <text:h text:style-name="Heading_20_3" text:outline-level="3"><text:bookmark-start text:name="_Toc232328869"/>2.3 Проектирование файлов данных<text:bookmark-end text:name="_Toc232328869"/></text:h>
      <text:p text:style-name="_5f_Текст">Результатом работы экспорта должен быть файл в формате *.<text:span text:style-name="T50">csv</text:span> и *.<text:span text:style-name="T50">docx</text:span>. Во время работы системы создаются дополнительные файлы, которые сохраняются в оперативную память.</text:p>
      <text:p text:style-name="_5f_Текст">В файлах формата *.<text:span text:style-name="T50">csv</text:span> хранятся данные измерения температуры, взятые с базы данных.</text:p>
      <text:p text:style-name="_5f_Текст">Файлы формата *.<text:span text:style-name="T50">docx</text:span> являются отчётами с маркированными изображениями, самой высокой и самой низкой зафиксированной температурой.</text:p>
      <text:h text:style-name="Heading_20_3" text:outline-level="3"><text:bookmark-start text:name="_Toc232328870"/>2.4 Организация сбора, передачи, обработки и выдачи информации<text:bookmark-end text:name="_Toc232328870"/><text:bookmark-end text:name="_Toc137554460"/></text:h>
      <text:p text:style-name="_5f_Текст">Сбор исходной информации выполняется автоматически. Программное обеспечение отправляет HTTP <text:span text:style-name="T50">GET</text:span>-запрос на модуль <text:span text:style-name="T50">ESP</text:span>32-<text:span text:style-name="T50">CAM</text:span> для получения изображения. Данные о температуре получаются с подсистемы в рамках другой ВКР.</text:p>
      <text:p text:style-name="_5f_Текст"><text:soft-page-break/>Передача изображений с камеры осуществляется по Wi‑Fi. Точка доступа создаётся модулем <text:span text:style-name="T50">ESP</text:span>32-<text:span text:style-name="T50">CAM</text:span>.</text:p>
      <text:p text:style-name="_5f_Текст">Выдача информации осуществляется на экран монитора, а также в формате *.<text:span text:style-name="T50">docx</text:span> и *.<text:span text:style-name="T50">csv</text:span>.</text:p>
      <text:list text:style-name="WWNum8">
        <text:list-item>
          <text:p text:style-name="P64" loext:marker-style-name="T63"/>
        </text:list-item>
      </text:list>
      <text:list text:style-name="WWNum4">
        <text:list-item>
          <text:h text:style-name="P65" text:outline-level="1"><text:bookmark-start text:name="_Toc137554461"/><text:bookmark-start text:name="_Toc232328871"/>АЛГОРИТМИЧЕСКОЕ ОБЕСПЕЧЕНИЕ ПОДСИСТЕМЫ<text:bookmark-end text:name="_Toc137554461"/><text:bookmark-end text:name="_Toc232328871"/></text:h>
        </text:list-item>
      </text:list>
      <text:h text:style-name="P66" text:outline-level="2" loext:marker-style-name="T68"><text:bookmark-start text:name="_Toc232328872"/><text:span text:style-name="T68">3.1 Алгоритм наложения температурной информации на изображение и сохранения в базу данных</text:span><text:bookmark-end text:name="_Toc232328872"/><text:span text:style-name="T68"/></text:h>
      <text:p text:style-name="_5f_Текст" loext:marker-style-name="T69"><text:span text:style-name="T69">Общая характеристика: автоматическое наложение на оптическое изображение тепловой карты исходя из координат точек с измеренной температурой, а также последующее сохранение модифицированного пути до изображения в базе данных в виде строки. </text:span><text:span text:style-name="T69"/></text:p>
      <text:p text:style-name="_5f_Текст" loext:marker-style-name="T69"><text:span text:style-name="T69">Используемые данные: изображение с камеры, температура, координаты точки измерения.</text:span><text:span text:style-name="T69"/></text:p>
      <text:p text:style-name="_5f_Текст" loext:marker-style-name="T69"><text:span text:style-name="T69">Математическое описание: отсутствует.</text:span><text:span text:style-name="T69"/></text:p>
      <text:p text:style-name="_5f_Текст" loext:marker-style-name="T69"><text:span text:style-name="T69">Результаты выполнения: промаркированное изображение.</text:span><text:span text:style-name="T69"/></text:p>
      <text:p text:style-name="_5f_Текст" loext:marker-style-name="T69"><text:span text:style-name="T69">Блок-схема алгоритма представлена на рисунке 3.1.</text:span><text:span text:style-name="T69"/></text:p>
      <text:h text:style-name="P66" text:outline-level="2" loext:marker-style-name="T69"><text:bookmark-start text:name="_Toc232328873"/><text:span text:style-name="T69">3.2 Алгоритм экспорта в файл в формате CSV</text:span><text:bookmark-end text:name="_Toc232328873"/><text:span text:style-name="T69"/></text:h>
      <text:p text:style-name="_5f_Текст" loext:marker-style-name="T69"><text:span text:style-name="T69">Общая характеристика: создание файла *.</text:span><text:span text:style-name="T70">csv</text:span><text:span text:style-name="T69"> с данными по сессии с сортировкой по номеру измерения.</text:span></text:p>
      <text:p text:style-name="_5f_Текст" loext:marker-style-name="T69"><text:span text:style-name="T69">Используемые данные: данные из БД.</text:span><text:span text:style-name="T69"/></text:p>
      <text:p text:style-name="_5f_Текст" loext:marker-style-name="T69"><text:span text:style-name="T69">Результаты выполнения: файл *.</text:span><text:span text:style-name="T70">csv</text:span><text:span text:style-name="T69">.</text:span></text:p>
      <text:p text:style-name="_5f_Текст" loext:marker-style-name="T69"><text:span text:style-name="T69">Математическое описание: отсутствует.</text:span><text:span text:style-name="T69"/></text:p>
      <text:p text:style-name="_5f_Текст" loext:marker-style-name="T69"><text:span text:style-name="T69">Блок-схема алгоритма представлена на рисунке 3.2.</text:span><text:span text:style-name="T69"/></text:p>
      <text:h text:style-name="P66" text:outline-level="2" loext:marker-style-name="T71"><text:bookmark-start text:name="_Toc232328874"/><text:span text:style-name="T69">3.3 Алгоритм экспорта в файл в формате </text:span><text:span text:style-name="T70">DOCX</text:span><text:bookmark-end text:name="_Toc232328874"/></text:h>
      <text:p text:style-name="_5f_Текст" loext:marker-style-name="T69"><text:span text:style-name="T69">Общая характеристика: создание файла *.</text:span><text:span text:style-name="T70">docx</text:span><text:span text:style-name="T69"> с максимальной, минимальной измеренными температурами и изображением с тепловой картой.</text:span></text:p>
      <text:p text:style-name="_5f_Текст" loext:marker-style-name="T69"><text:span text:style-name="T69">Используемые данные: данные из БД, маркированное изображение.</text:span><text:span text:style-name="T69"/></text:p>
      <text:p text:style-name="P67" loext:marker-style-name="T72"/>
      <text:p text:style-name="P68" loext:marker-style-name="T69"><text:span text:style-name="T69">Результаты выполнения: файл *.</text:span><text:span text:style-name="T70">docx</text:span><text:span text:style-name="T69">.</text:span></text:p>
      <text:p text:style-name="_5f_Текст" loext:marker-style-name="T69"><text:span text:style-name="T69">Математическое описание: отсутствует.</text:span><text:span text:style-name="T69"/></text:p>
      <text:p text:style-name="_5f_Текст" loext:marker-style-name="T69"><text:span text:style-name="T69">Блок-схема алгоритма представлена на рисунке 3.3.</text:span><text:span text:style-name="T69"/></text:p>
      <text:p text:style-name="P69" loext:marker-style-name="T69"/>
      <text:p text:style-name="P70" loext:marker-style-name="T73"><text:soft-page-break/><draw:frame draw:style-name="fr1" draw:name="Рисунок 69" text:anchor-type="as-char" svg:width="116.03mm" svg:height="232.04mm" draw:z-index="1"><draw:image xlink:href="Pictures/10000000000003F4000007E81DBAE21E.jpg" xlink:type="simple" xlink:show="embed" xlink:actuate="onLoad" draw:mime-type="image/jpeg"/></draw:frame></text:p>
      <text:p text:style-name="P71" loext:marker-style-name="T74"><text:span text:style-name="T74">Рисунок 3.1 – Блок-схема алгоритма наложения температурной информации на изображение и сохранения в базу данных</text:span><text:span text:style-name="T74"/></text:p>
      <text:p text:style-name="P72" loext:marker-style-name="T50"><text:soft-page-break/><draw:frame draw:style-name="fr1" draw:name="Рисунок 72" text:anchor-type="as-char" svg:width="116.15mm" svg:height="232.57mm" draw:z-index="2"><draw:image xlink:href="Pictures/10000000000003F0000007E1C2B4F1A4.jpg" xlink:type="simple" xlink:show="embed" xlink:actuate="onLoad" draw:mime-type="image/jpeg"/></draw:frame></text:p>
      <text:p text:style-name="_5f_Текст">Рисунок 3.2 – Блок-схема алгоритма <text:span text:style-name="T71">экспорта в файл в формате </text:span><text:span text:style-name="T75">CSV</text:span></text:p>
      <text:p text:style-name="P73"><text:soft-page-break/><draw:frame draw:style-name="fr1" draw:name="Рисунок 5" text:anchor-type="as-char" svg:width="85.64mm" svg:height="240.77mm" draw:z-index="3"><draw:image xlink:href="Pictures/10000001000001490000039D5787A3FB.png" xlink:type="simple" xlink:show="embed" xlink:actuate="onLoad" draw:mime-type="image/png"/></draw:frame></text:p>
      <text:p text:style-name="_5f_Текст" loext:marker-style-name="T71">Рисунок 3.3 – Блок-схема алгоритма экспорта <text:span text:style-name="T69">в файл в формате </text:span><text:span text:style-name="T70">DOCX</text:span><text:span text:style-name="T71"> </text:span></text:p>
      <text:list text:style-name="WWNum3">
        <text:list-item>
          <text:h text:style-name="P74" text:outline-level="1"><text:bookmark-start text:name="_Toc137554465"/><text:bookmark-start text:name="_Toc232328875"/>ПРОГРАММНОЕ ОБЕСПЕЧЕНИЕ ПОДСИСТЕМЫ<text:bookmark-end text:name="_Toc137554465"/><text:bookmark-end text:name="_Toc232328875"/></text:h>
          <text:list>
            <text:list-item>
              <text:h text:style-name="P75" text:outline-level="2"><text:bookmark-start text:name="_Toc137554466"/><text:bookmark-start text:name="_Toc232328876"/>Структура программного обеспечения и функции его компонентов<text:bookmark-end text:name="_Toc137554466"/><text:bookmark-end text:name="_Toc232328876"/></text:h>
            </text:list-item>
          </text:list>
        </text:list-item>
      </text:list>
      <text:p text:style-name="_5f_Текст">ОС – <text:span text:style-name="T50">Windows</text:span> 10.</text:p>
      <text:p text:style-name="_5f_Текст">Инструментальное средство разработки – <text:span text:style-name="T50">Visual</text:span> <text:span text:style-name="T50">Studio</text:span> <text:span text:style-name="T50">Code</text:span> (<text:span text:style-name="T50">VSCode</text:span>).</text:p>
      <text:p text:style-name="_5f_Текст">Язык программирования – <text:span text:style-name="T50">Python</text:span> 3.10.</text:p>
      <text:h text:style-name="Heading_20_2" text:outline-level="2" loext:marker-style-name="T68"><text:bookmark-start text:name="_Toc232328877"/><text:span text:style-name="T68">4.2 Выбор компонентов программного обеспечения</text:span><text:bookmark-end text:name="_Toc232328877"/><text:span text:style-name="T68"/></text:h>
      <text:h text:style-name="Heading_20_3" text:outline-level="3" loext:marker-style-name="T40"><text:bookmark-start text:name="_Toc232328878"/><text:span text:style-name="T40">4.2.1 Операционная система</text:span><text:bookmark-end text:name="_Toc232328878"/><text:span text:style-name="T40"/></text:h>
      <text:p text:style-name="_5f_Текст"><text:span text:style-name="T69">Согласно техническому заданию, подсистема должна быть </text:span>платформонезависимой. Таким образом, для работы АС подходит большинство современных операционных сред, в том числе бесплатных.</text:p>
      <text:p text:style-name="_5f_Текст" loext:marker-style-name="T69"><text:span text:style-name="T69">Рассмотрим ОС Ubuntu 16.04 и ОС Windows 10. Обе операционные системы позволяют работать с языком </text:span><text:span text:style-name="T70">Python</text:span><text:span text:style-name="T69">, также позволяют установить систему управления базами данных для корректной работы программного обеспечения. Однако с точки зрения разработки целесообразнее использовать операционную систему Windows 10 из-за следующих факторов: </text:span></text:p>
      <text:list text:continue-list="list112909934679450" text:style-name="WWNum10">
        <text:list-item>
          <text:p text:style-name="P47">наличие мощных инструментальных средств разработки и отладки; </text:p>
        </text:list-item>
        <text:list-item>
          <text:p text:style-name="P47">наличие опыта разработки программ на данной операционной системе; </text:p>
        </text:list-item>
        <text:list-item>
          <text:p text:style-name="P47">наличие удобных средств администрирования баз данных.</text:p>
        </text:list-item>
      </text:list>
      <text:h text:style-name="Heading_20_3" text:outline-level="3" loext:marker-style-name="T40"><text:bookmark-start text:name="_Toc232328879"/><text:soft-page-break/><text:span text:style-name="T40">4.2.2 Инструментальное средство разработки и язык программирования</text:span><text:bookmark-end text:name="_Toc232328879"/><text:span text:style-name="T40"/></text:h>
      <text:p text:style-name="_5f_Текст" loext:marker-style-name="T69"><text:span text:style-name="T69">В качестве языка программирования выбран Python 3.10+ по следующим причинам:</text:span><text:span text:style-name="T69"/></text:p>
      <text:list text:continue-numbering="true" text:style-name="WWNum10">
        <text:list-item>
          <text:p text:style-name="P47">широкая экосистема библиотек для обработки изображений;</text:p>
        </text:list-item>
        <text:list-item>
          <text:p text:style-name="P47">кроссплатформенность;</text:p>
        </text:list-item>
        <text:list-item>
          <text:p text:style-name="P47">простота и скорость разработки;</text:p>
        </text:list-item>
        <text:list-item>
          <text:p text:style-name="P47">открытость и бесплатность.</text:p>
        </text:list-item>
      </text:list>
      <text:p text:style-name="_5f_Текст" loext:marker-style-name="T69"><text:span text:style-name="T69">Для разработки графического интерфейса использована библиотека Tkinter, которая входит в стандартную установку Python. Альтернативы (PyQt) более сложны в лицензировании и требуют дополнительных зависимостей, однако при необходимости могут быть применены. В данной работе Tkinter достаточен для реализации требуемого функционала: отображение изображений, кнопок управления.</text:span><text:span text:style-name="T69"/></text:p>
      <text:p text:style-name="_5f_Текст" loext:marker-style-name="T69"><text:span text:style-name="T69">В качестве инструментального средства разработки выбрана среда Visual Studio Code (VSCode) </text:span><text:span text:style-name="T76"></text:span><text:span text:style-name="T69"> бесплатный, кроссплатформенный редактор с поддержкой Python, отладкой, интеграцией с Git и большим количеством расширений. Альтернативы (Python IDLE, Notepad++) уступают в функциональности.</text:span></text:p>
      <text:h text:style-name="Heading_20_3" text:outline-level="3" loext:marker-style-name="T40"><text:bookmark-start text:name="_Toc232328880"/><text:span text:style-name="T40">4.2.3 Вспомогательное программное обеспечение</text:span><text:bookmark-end text:name="_Toc232328880"/><text:span text:style-name="T40"/></text:h>
      <text:p text:style-name="_5f_Текст" loext:marker-style-name="T69"><text:span text:style-name="T69">Для функционирования системы необходимо СУБД MySQL (версия 8.0) – может быть установлена на той же машине, что и основное приложение, либо на отдельном сервере.</text:span><text:span text:style-name="T69"/></text:p>
      <text:p text:style-name="_5f_Текст" loext:marker-style-name="T69"><text:span text:style-name="T69">Установка всех зависимостей автоматизирована через файл requirements.txt.</text:span><text:span text:style-name="T69"/></text:p>
      <text:h text:style-name="Heading_20_2" text:outline-level="2" loext:marker-style-name="T68"><text:bookmark-start text:name="_Toc232328881"/><text:soft-page-break/><text:span text:style-name="T68">4.3 Разработка прикладного программного обеспечения</text:span><text:bookmark-end text:name="_Toc232328881"/><text:span text:style-name="T68"/></text:h>
      <text:h text:style-name="Heading_20_3" text:outline-level="3" loext:marker-style-name="T40"><text:bookmark-start text:name="_Toc232328882"/><text:span text:style-name="T40">4.3.1 Структура прикладного программного обеспечения</text:span><text:bookmark-end text:name="_Toc232328882"/><text:span text:style-name="T40"/></text:h>
      <text:p text:style-name="_5f_Текст" loext:marker-style-name="T69"><text:span text:style-name="T69">Подсистема имеет следующую структуру, представленную в таблице 4.1.</text:span><text:span text:style-name="T69"/></text:p>
      <text:p text:style-name="Caption">Таблица 4.1 – Структура разработанной подсистемы</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76" loext:marker-style-name="T77"><text:span text:style-name="T77">№</text:span><text:span text:style-name="T77"/></text:p>
          </table:table-cell>
          <table:table-cell table:style-name="Таблица11.A1" office:value-type="string">
            <text:p text:style-name="P76" loext:marker-style-name="T77"><text:span text:style-name="T77">Название модуля</text:span><text:span text:style-name="T77"/></text:p>
          </table:table-cell>
          <table:table-cell table:style-name="Таблица11.A1" office:value-type="string">
            <text:p text:style-name="P76" loext:marker-style-name="T77"><text:span text:style-name="T77">Описание</text:span><text:span text:style-name="T77"/></text:p>
          </table:table-cell>
        </table:table-row>
        <table:table-row table:style-name="Таблица11.1">
          <table:table-cell table:style-name="Таблица11.A1" office:value-type="string">
            <text:p text:style-name="P77" loext:marker-style-name="T69"><text:span text:style-name="T69">1</text:span><text:span text:style-name="T69"/></text:p>
          </table:table-cell>
          <table:table-cell table:style-name="Таблица11.A1" office:value-type="string">
            <text:p text:style-name="P77" loext:marker-style-name="T69"><text:span text:style-name="T69">Модуль сбора данных</text:span><text:span text:style-name="T69"/></text:p>
          </table:table-cell>
          <table:table-cell table:style-name="Таблица11.A1" office:value-type="string">
            <text:p text:style-name="P77" loext:marker-style-name="T69"><text:span text:style-name="T69">Предназначен для получения данных с подсистемы в рамках второй работы ВКР и изображений с модуля </text:span><text:span text:style-name="T70">ESP</text:span><text:span text:style-name="T69">32-</text:span><text:span text:style-name="T70">CAM</text:span></text:p>
          </table:table-cell>
        </table:table-row>
        <table:table-row table:style-name="Таблица11.1">
          <table:table-cell table:style-name="Таблица11.A1" office:value-type="string">
            <text:p text:style-name="P77" loext:marker-style-name="T69"><text:span text:style-name="T69">2</text:span><text:span text:style-name="T69"/></text:p>
          </table:table-cell>
          <table:table-cell table:style-name="Таблица11.A1" office:value-type="string">
            <text:p text:style-name="P77" loext:marker-style-name="T69"><text:span text:style-name="T69">Модуль визуализации и разметки</text:span><text:span text:style-name="T69"/></text:p>
          </table:table-cell>
          <table:table-cell table:style-name="Таблица11.A1" office:value-type="string">
            <text:p text:style-name="P77" loext:marker-style-name="T69"><text:span text:style-name="T69">Предназначен для наложения тепловой карты на полученное изображение</text:span><text:span text:style-name="T69"/></text:p>
          </table:table-cell>
        </table:table-row>
        <table:table-row table:style-name="Таблица11.1">
          <table:table-cell table:style-name="Таблица11.A1" office:value-type="string">
            <text:p text:style-name="P77" loext:marker-style-name="T69"><text:span text:style-name="T69">3</text:span><text:span text:style-name="T69"/></text:p>
          </table:table-cell>
          <table:table-cell table:style-name="Таблица11.A1" office:value-type="string">
            <text:p text:style-name="P77" loext:marker-style-name="T69"><text:span text:style-name="T69">Модуль экспорта</text:span><text:span text:style-name="T69"/></text:p>
          </table:table-cell>
          <table:table-cell table:style-name="Таблица11.A1" office:value-type="string">
            <text:p text:style-name="P77" loext:marker-style-name="T69"><text:span text:style-name="T69">Предназначен для создания файлов формата *.</text:span><text:span text:style-name="T70">csv</text:span><text:span text:style-name="T69"> с данными сессии</text:span></text:p>
          </table:table-cell>
        </table:table-row>
        <table:table-row table:style-name="Таблица11.1">
          <table:table-cell table:style-name="Таблица11.A1" office:value-type="string">
            <text:p text:style-name="P77" loext:marker-style-name="T69"><text:span text:style-name="T69">4</text:span><text:span text:style-name="T69"/></text:p>
          </table:table-cell>
          <table:table-cell table:style-name="Таблица11.A1" office:value-type="string">
            <text:p text:style-name="P77" loext:marker-style-name="T69"><text:span text:style-name="T69">Модуль создания отчёта</text:span><text:span text:style-name="T69"/></text:p>
          </table:table-cell>
          <table:table-cell table:style-name="Таблица11.A1" office:value-type="string">
            <text:p text:style-name="P77" loext:marker-style-name="T69"><text:span text:style-name="T69">Предназначен для формирования отчёта с изображением и данными измерения</text:span><text:span text:style-name="T69"/></text:p>
          </table:table-cell>
        </table:table-row>
      </table:table>
      <text:h text:style-name="Heading_20_4" text:outline-level="4">4.3.1.1 Модуль сбора данных</text:h>
      <text:p text:style-name="_5f_Текст" loext:marker-style-name="T69"><text:span text:style-name="T69">Спецификация модуля представлена в таблице 4.2. </text:span><text:span text:style-name="T69"/></text:p>
      <text:p text:style-name="Caption"><text:span text:style-name="T69">Таблица 4.2 – Спецификация модуля сбора данных</text:span></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78" loext:marker-style-name="T77"><text:span text:style-name="T77">№</text:span><text:span text:style-name="T77"/></text:p>
          </table:table-cell>
          <table:table-cell table:style-name="Таблица12.A1" office:value-type="string">
            <text:p text:style-name="P78" loext:marker-style-name="T77"><text:span text:style-name="T77">Название</text:span><text:span text:style-name="T77"/></text:p>
          </table:table-cell>
          <table:table-cell table:style-name="Таблица12.A1" office:value-type="string">
            <text:p text:style-name="P78" loext:marker-style-name="T77"><text:span text:style-name="T77">Описание</text:span><text:span text:style-name="T77"/></text:p>
          </table:table-cell>
        </table:table-row>
        <table:table-row table:style-name="Таблица12.1">
          <table:table-cell table:style-name="Таблица12.A1" table:number-columns-spanned="3" office:value-type="string">
            <text:p text:style-name="P76" loext:marker-style-name="T77"><text:span text:style-name="T77">Классы</text:span><text:span text:style-name="T77"/></text:p>
          </table:table-cell>
          <table:covered-table-cell/>
          <table:covered-table-cell/>
        </table:table-row>
        <table:table-row table:style-name="Таблица12.1">
          <table:table-cell table:style-name="Таблица12.A1" office:value-type="string">
            <text:p text:style-name="P77" loext:marker-style-name="T69"><text:span text:style-name="T69">1</text:span><text:span text:style-name="T69"/></text:p>
          </table:table-cell>
          <table:table-cell table:style-name="Таблица12.A1" office:value-type="string">
            <text:p text:style-name="P77" loext:marker-style-name="T70"><text:span text:style-name="T70">class ESP32Client</text:span><text:span text:style-name="T70"/></text:p>
          </table:table-cell>
          <table:table-cell table:style-name="Таблица12.A1" office:value-type="string">
            <text:p text:style-name="P77" loext:marker-style-name="T69"><text:span text:style-name="T69">Содержит методы для подключения подсистемы к </text:span><text:span text:style-name="T70">ESP</text:span><text:span text:style-name="T69">32-</text:span><text:span text:style-name="T70">CAM</text:span></text:p>
          </table:table-cell>
        </table:table-row>
        <table:table-row table:style-name="Таблица12.1">
          <table:table-cell table:style-name="Таблица12.A1" office:value-type="string">
            <text:p text:style-name="P77" loext:marker-style-name="T70"><text:span text:style-name="T70">2</text:span><text:span text:style-name="T70"/></text:p>
          </table:table-cell>
          <table:table-cell table:style-name="Таблица12.A1" office:value-type="string">
            <text:p text:style-name="P77" loext:marker-style-name="T70"><text:span text:style-name="T70">class ImageProcessor</text:span><text:span text:style-name="T70"/></text:p>
          </table:table-cell>
          <table:table-cell table:style-name="Таблица12.A1" office:value-type="string">
            <text:p text:style-name="P77" loext:marker-style-name="T69"><text:span text:style-name="T69">Содержит метод для преобразования изображения для дальнейшей работы</text:span><text:span text:style-name="T69"/></text:p>
          </table:table-cell>
        </table:table-row>
      </table:table>
      <text:h text:style-name="Heading_20_4" text:outline-level="4"/>
      <text:p text:style-name="P79" loext:marker-style-name="T78"/>
      <text:h text:style-name="P80" text:outline-level="4">4.3.1.2 Модуль визуализации и разметки</text:h>
      <text:p text:style-name="_5f_Текст" loext:marker-style-name="T69"><text:span text:style-name="T69">Спецификация модуля представлена в таблице 4.3. </text:span><text:span text:style-name="T69"/></text:p>
      <text:p text:style-name="Caption"><text:span text:style-name="T69">Таблица 4.3 – Спецификация модуля визуализации и разметки</text:span></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78" loext:marker-style-name="T77"><text:span text:style-name="T77">№</text:span><text:span text:style-name="T77"/></text:p>
          </table:table-cell>
          <table:table-cell table:style-name="Таблица13.A1" office:value-type="string">
            <text:p text:style-name="P78" loext:marker-style-name="T77"><text:span text:style-name="T77">Название</text:span><text:span text:style-name="T77"/></text:p>
          </table:table-cell>
          <table:table-cell table:style-name="Таблица13.A1" office:value-type="string">
            <text:p text:style-name="P78" loext:marker-style-name="T77"><text:span text:style-name="T77">Описание</text:span><text:span text:style-name="T77"/></text:p>
          </table:table-cell>
        </table:table-row>
        <table:table-row table:style-name="Таблица13.1">
          <table:table-cell table:style-name="Таблица13.A1" table:number-columns-spanned="3" office:value-type="string">
            <text:p text:style-name="P76" loext:marker-style-name="T77"><text:span text:style-name="T77">Классы</text:span><text:span text:style-name="T77"/></text:p>
          </table:table-cell>
          <table:covered-table-cell/>
          <table:covered-table-cell/>
        </table:table-row>
        <table:table-row table:style-name="Таблица13.1">
          <table:table-cell table:style-name="Таблица13.A1" office:value-type="string">
            <text:p text:style-name="P77" loext:marker-style-name="T69"><text:span text:style-name="T69">1</text:span><text:span text:style-name="T69"/></text:p>
          </table:table-cell>
          <table:table-cell table:style-name="Таблица13.A1" office:value-type="string">
            <text:p text:style-name="P77" loext:marker-style-name="T70"><text:span text:style-name="T70">class MonitoringThread</text:span><text:span text:style-name="T70"/></text:p>
          </table:table-cell>
          <table:table-cell table:style-name="Таблица13.A1" office:value-type="string">
            <text:p text:style-name="P77" loext:marker-style-name="T69"><text:span text:style-name="T69">Содержит методы для наложения тепловой карты на изображение</text:span><text:span text:style-name="T69"/></text:p>
          </table:table-cell>
        </table:table-row>
        <table:table-row table:style-name="Таблица13.1">
          <table:table-cell table:style-name="Таблица13.A1" office:value-type="string">
            <text:p text:style-name="P77" loext:marker-style-name="T70"><text:span text:style-name="T70">2</text:span><text:span text:style-name="T70"/></text:p>
          </table:table-cell>
          <table:table-cell table:style-name="Таблица13.A1" office:value-type="string">
            <text:p text:style-name="P77" loext:marker-style-name="T70"><text:span text:style-name="T70">class HeatMapBuilder</text:span><text:span text:style-name="T70"/></text:p>
          </table:table-cell>
          <table:table-cell table:style-name="Таблица13.A1" office:value-type="string">
            <text:p text:style-name="P77" loext:marker-style-name="T69"><text:span text:style-name="T69">Содержит методы для создания и визуализации тепловой карты исходя из входных данных</text:span><text:span text:style-name="T69"/></text:p>
          </table:table-cell>
        </table:table-row>
        <table:table-row table:style-name="Таблица13.1">
          <table:table-cell table:style-name="Таблица13.A1" office:value-type="string">
            <text:p text:style-name="P77" loext:marker-style-name="T69"><text:span text:style-name="T69">3</text:span><text:span text:style-name="T69"/></text:p>
          </table:table-cell>
          <table:table-cell table:style-name="Таблица13.A1" office:value-type="string">
            <text:p text:style-name="P77" loext:marker-style-name="T70"><text:span text:style-name="T70">class ThermalMonitorApp</text:span><text:span text:style-name="T70"/></text:p>
          </table:table-cell>
          <table:table-cell table:style-name="Таблица13.A1" office:value-type="string">
            <text:p text:style-name="P77" loext:marker-style-name="T69"><text:span text:style-name="T69">Содержит методы для отрисовки графического интерфейса внутри сессии и кнопок на нём</text:span><text:span text:style-name="T69"/></text:p>
          </table:table-cell>
        </table:table-row>
        <table:table-row table:style-name="Таблица13.1">
          <table:table-cell table:style-name="Таблица13.A1" office:value-type="string">
            <text:p text:style-name="P77" loext:marker-style-name="T69"><text:span text:style-name="T69">4</text:span><text:span text:style-name="T69"/></text:p>
          </table:table-cell>
          <table:table-cell table:style-name="Таблица13.A1" office:value-type="string">
            <text:p text:style-name="P77" loext:marker-style-name="T70"><text:span text:style-name="T70">class SessionSelector</text:span><text:span text:style-name="T70"/></text:p>
          </table:table-cell>
          <table:table-cell table:style-name="Таблица13.A1" office:value-type="string">
            <text:p text:style-name="P77" loext:marker-style-name="T69"><text:span text:style-name="T69">Содержит методы для отрисовки графического интерфейса с выбором о создании или уже существующей сессии</text:span><text:span text:style-name="T69"/></text:p>
          </table:table-cell>
        </table:table-row>
      </table:table>
      <text:h text:style-name="Heading_20_4" text:outline-level="4">4.3.1.3 Модуль экспорта</text:h>
      <text:p text:style-name="_5f_Текст" loext:marker-style-name="T69"><text:span text:style-name="T69">Спецификация модуля представлена в таблице 4.4. </text:span><text:span text:style-name="T69"/></text:p>
      <text:p text:style-name="Caption"><text:span text:style-name="T69">Таблица 4.4 – Спецификация модуля экспорта</text:span></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78" loext:marker-style-name="T77"><text:span text:style-name="T77">№</text:span><text:span text:style-name="T77"/></text:p>
          </table:table-cell>
          <table:table-cell table:style-name="Таблица14.A1" office:value-type="string">
            <text:p text:style-name="P78" loext:marker-style-name="T77"><text:span text:style-name="T77">Название</text:span><text:span text:style-name="T77"/></text:p>
          </table:table-cell>
          <table:table-cell table:style-name="Таблица14.A1" office:value-type="string">
            <text:p text:style-name="P78" loext:marker-style-name="T77"><text:span text:style-name="T77">Описание</text:span><text:span text:style-name="T77"/></text:p>
          </table:table-cell>
        </table:table-row>
        <table:table-row table:style-name="Таблица14.1">
          <table:table-cell table:style-name="Таблица14.A1" table:number-columns-spanned="3" office:value-type="string">
            <text:p text:style-name="P76" loext:marker-style-name="T77"><text:span text:style-name="T77">Классы</text:span><text:span text:style-name="T77"/></text:p>
          </table:table-cell>
          <table:covered-table-cell/>
          <table:covered-table-cell/>
        </table:table-row>
        <table:table-row table:style-name="Таблица14.1">
          <table:table-cell table:style-name="Таблица14.A1" office:value-type="string">
            <text:p text:style-name="P77" loext:marker-style-name="T69"><text:span text:style-name="T69">1</text:span><text:span text:style-name="T69"/></text:p>
          </table:table-cell>
          <table:table-cell table:style-name="Таблица14.A1" office:value-type="string">
            <text:p text:style-name="P77" loext:marker-style-name="T69"><text:span text:style-name="T70">class CSVExporter</text:span><text:span text:style-name="T70"/></text:p>
          </table:table-cell>
          <table:table-cell table:style-name="Таблица14.A1" office:value-type="string">
            <text:p text:style-name="P77" loext:marker-style-name="T69"><text:span text:style-name="T69">Содержит метод для создания файла *.</text:span><text:span text:style-name="T70">csv</text:span><text:span text:style-name="T69"> с данными сессии измерения</text:span></text:p>
          </table:table-cell>
        </table:table-row>
      </table:table>
      <text:h text:style-name="Heading_20_4" text:outline-level="4"/>
      <text:p text:style-name="P79" loext:marker-style-name="T78"/>
      <text:h text:style-name="P80" text:outline-level="4">4.3.1.4 Модуль создания отчётов</text:h>
      <text:p text:style-name="_5f_Текст" loext:marker-style-name="T69"><text:span text:style-name="T69">Спецификация модуля представлена в таблице 4.5. </text:span><text:span text:style-name="T69"/></text:p>
      <text:p text:style-name="Caption"><text:span text:style-name="T69">Таблица 4.5 – Спецификация модуля создания отчётов</text:span></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78" loext:marker-style-name="T77"><text:span text:style-name="T77">№</text:span><text:span text:style-name="T77"/></text:p>
          </table:table-cell>
          <table:table-cell table:style-name="Таблица15.A1" office:value-type="string">
            <text:p text:style-name="P78" loext:marker-style-name="T77"><text:span text:style-name="T77">Название</text:span><text:span text:style-name="T77"/></text:p>
          </table:table-cell>
          <table:table-cell table:style-name="Таблица15.A1" office:value-type="string">
            <text:p text:style-name="P78" loext:marker-style-name="T77"><text:span text:style-name="T77">Описание</text:span><text:span text:style-name="T77"/></text:p>
          </table:table-cell>
        </table:table-row>
        <table:table-row table:style-name="Таблица15.1">
          <table:table-cell table:style-name="Таблица15.A1" table:number-columns-spanned="3" office:value-type="string">
            <text:p text:style-name="P76" loext:marker-style-name="T77"><text:span text:style-name="T77">Классы</text:span><text:span text:style-name="T77"/></text:p>
          </table:table-cell>
          <table:covered-table-cell/>
          <table:covered-table-cell/>
        </table:table-row>
        <table:table-row table:style-name="Таблица15.1">
          <table:table-cell table:style-name="Таблица15.A1" office:value-type="string">
            <text:p text:style-name="P77" loext:marker-style-name="T69"><text:span text:style-name="T69">1</text:span><text:span text:style-name="T69"/></text:p>
          </table:table-cell>
          <table:table-cell table:style-name="Таблица15.A1" office:value-type="string">
            <text:p text:style-name="P77" loext:marker-style-name="T69"><text:span text:style-name="T70">class ReportGenerator</text:span><text:span text:style-name="T70"/></text:p>
          </table:table-cell>
          <table:table-cell table:style-name="Таблица15.A1" office:value-type="string">
            <text:p text:style-name="P77" loext:marker-style-name="T69"><text:span text:style-name="T69">Содержит метод для создания отчёта в формате *.</text:span><text:span text:style-name="T70">docx</text:span><text:span text:style-name="T69"> с изображением, средней, максимальной и минимальной температурой за сеанс измерения</text:span></text:p>
          </table:table-cell>
        </table:table-row>
      </table:table>
      <text:h text:style-name="Heading_20_2" text:outline-level="2" loext:marker-style-name="T68"><text:bookmark-start text:name="_Toc232328883"/><text:span text:style-name="T68">4.4 Особенности реализации, эксплуатации и сопровождения подсистемы</text:span><text:bookmark-end text:name="_Toc232328883"/><text:span text:style-name="T68"/></text:h>
      <text:p text:style-name="_5f_Текст" loext:marker-style-name="T69"><text:span text:style-name="T69">Особенности реализации:</text:span><text:span text:style-name="T69"/></text:p>
      <text:list text:continue-numbering="true" text:style-name="WWNum10">
        <text:list-item>
          <text:p text:style-name="P47">Все настройки (адрес БД, порт и т.д.) вынесены в конфигурационный файл <text:span text:style-name="T50">settings</text:span>.<text:span text:style-name="T50">json</text:span>, что упрощает перенос системы на другое оборудование.</text:p>
        </text:list-item>
        <text:list-item>
          <text:p text:style-name="P47">Логирование ошибок и информационных сообщений ведётся как в файл (logs/<text:span text:style-name="T50">app</text:span>.log), так и выводится в консоль (при отладке). Формат лога: [YYYY-MM-DD HH:MM:SS] УРОВЕНЬ: сообщение.</text:p>
        </text:list-item>
        <text:list-item>
          <text:p text:style-name="P47">Для обеспечения лицензионной чистоты используются только библиотеки с открытыми лицензиями (MIT, BSD, PSF).</text:p>
        </text:list-item>
      </text:list>
      <text:p text:style-name="_5f_Текст" loext:marker-style-name="T69"><text:span text:style-name="T69">Эксплуатация:</text:span><text:span text:style-name="T69"/></text:p>
      <text:list text:continue-numbering="true" text:style-name="WWNum10">
        <text:list-item>
          <text:p text:style-name="P47">Система рассчитана на работу в лабораторных и цеховых условиях при температуре окружающей среды от +10 до +35 °C. Компьютер оператора должен быть защищён от пыли и влаги.</text:p>
        </text:list-item>
        <text:list-item>
          <text:p text:style-name="P47">В случае потери связи с модулем <text:span text:style-name="T50">ESP</text:span>32-<text:span text:style-name="T50">CAM</text:span> подсистема продолжает работу, ожидая новые запросы. При восстановлении связи приём данных возобновляется автоматически.</text:p>
        </text:list-item>
      </text:list>
      <text:p text:style-name="P81" loext:marker-style-name="T79"/>
      <text:p text:style-name="P68" loext:marker-style-name="T69"><text:span text:style-name="T69">Сопровождение:</text:span><text:span text:style-name="T69"/></text:p>
      <text:list text:continue-numbering="true" text:style-name="WWNum10">
        <text:list-item>
          <text:p text:style-name="P47">Исходный код полностью открыт, документирован и может быть модифицирован силами штатного программиста предприятия.</text:p>
        </text:list-item>
        <text:list-item>
          <text:p text:style-name="P47">Для обновления системы достаточно заменить файлы приложения и при необходимости выполнить миграцию БД (при изменении структуры таблиц). </text:p>
        </text:list-item>
      </text:list>
      <text:h text:style-name="Heading_20_2" text:outline-level="2" loext:marker-style-name="T68"><text:bookmark-start text:name="_Toc232328884"/><text:span text:style-name="T68">4.5 Руководство пользователя</text:span><text:bookmark-end text:name="_Toc232328884"/><text:span text:style-name="T68"/></text:h>
      <text:h text:style-name="Heading_20_3" text:outline-level="3" loext:marker-style-name="T40"><text:bookmark-start text:name="_Toc232328885"/><text:span text:style-name="T40">4.5.1 Требования к условиям эксплуатации</text:span><text:bookmark-end text:name="_Toc232328885"/><text:span text:style-name="T40"/></text:h>
      <text:list xml:id="list112909833693529" text:continue-numbering="true" text:style-name="WWNum10">
        <text:list-item>
          <text:p text:style-name="P47">Аппаратные требования: процессор Intel Core i3 или аналогичный, 4 ГБ ОЗУ, от 1 ГБ свободного места на жёстком диске, сетевой адаптер Wi-Fi, дисплей с разрешением не менее 1280×720.</text:p>
        </text:list-item>
        <text:list-item>
          <text:p text:style-name="P47">Программные требования: ОС Windows 10/11 или Linux (Ubuntu 22.04+, ALT Linux), установленный Python 3.10+, MySQL 8.0, браузер (для просмотра справки, опционально).</text:p>
        </text:list-item>
        <text:list-item>
          <text:p text:style-name="P47">Навыки пользователя: базовое владение ПК, умение запускать приложения, работать с файловой системой.</text:p>
        </text:list-item>
      </text:list>
      <text:h text:style-name="P82" text:outline-level="3" loext:marker-style-name="T40"><text:bookmark-start text:name="_Toc232328886"/><text:span text:style-name="T40">4.5.2 Инсталляция и настройка</text:span><text:bookmark-end text:name="_Toc232328886"/><text:span text:style-name="T40"/></text:h>
      <text:list text:style-name="WWNum11">
        <text:list-item>
          <text:p text:style-name="P83">Установить MySQL, создать базу данных thermal_monitor и пользователя с правами на создание таблиц, запись и чтение.</text:p>
        </text:list-item>
        <text:list-item>
          <text:p text:style-name="P83">Выполнить скрипт создания таблиц, который прилагается вместе с файлами подсистемы.</text:p>
        </text:list-item>
        <text:list-item>
          <text:p text:style-name="P83">Установить Python 3.10 и все зависимости командой pip install -r requirements.txt.</text:p>
        </text:list-item>
        <text:list-item>
          <text:p text:style-name="P83">Запустить приложение python main.py. При первом запуске автоматически создаётся конфигурационный файл settings.json, который необходимо отредактировать, указав параметры подключения к БД (хост, порт, пользователь, пароль).</text:p>
        </text:list-item>
      </text:list>
      <text:h text:style-name="Heading_20_3" text:outline-level="3" loext:marker-style-name="T40"><text:bookmark-start text:name="_Toc232328887"/><text:soft-page-break/><text:span text:style-name="T40">4.5.3 Порядок и особенности работы</text:span><text:bookmark-end text:name="_Toc232328887"/><text:span text:style-name="T40"/></text:h>
      <text:p text:style-name="_5f_Текст" loext:marker-style-name="T69"><text:span text:style-name="T69">Запуск системы: после запуска main.py открывается окно «Выбор сессии» с кнопками «Создать новую сессию» и «Открыть» (рисунок 4.1). После создания новой сессии, открывается окно с температурой и кнопками «Подключиться», «Старт», «Стоп», «Экспорт в </text:span><text:span text:style-name="T70">CSV</text:span><text:span text:style-name="T69">», «Создать отчёт </text:span><text:span text:style-name="T70">DOCX</text:span><text:span text:style-name="T69">» и «Назад» (рисунок 4.2). Подсистема принимает изображения после нажатия кнопки «Старт»; принятые кадры автоматически обрабатываются и сохраняются. Пользователь может наблюдать последнее изображение </text:span><text:span text:style-name="T70">c</text:span><text:span text:style-name="T69"> наложенной тепловой картой (рисунок 4.3).</text:span></text:p>
      <text:p text:style-name="_5f_Текст" loext:marker-style-name="T69"><text:span text:style-name="T69">Экспорт данных: нажать кнопку «Экспорт в CSV». Система сформирует CSV-файл в папке </text:span><text:span text:style-name="T70">exports</text:span><text:span text:style-name="T69">. Выводится сообщение с папкой и названием файла (рисунок 4.4).</text:span></text:p>
      <text:p text:style-name="_5f_Текст" loext:marker-style-name="T69"><text:span text:style-name="T69">Создание отчета: нажать кнопку «Создать отчёт </text:span><text:span text:style-name="T70">DOCX</text:span><text:span text:style-name="T69">». Система сформирует отчет в папке </text:span><text:span text:style-name="T70">reports</text:span><text:span text:style-name="T69">. Выводится сообщение с папкой и названием файла (рисунок 4.5).</text:span></text:p>
      <text:p text:style-name="_5f_Текст" loext:marker-style-name="T69"><text:span text:style-name="T69">Остановка системы: остановить измерения кнопкой «Стоп», закрыть главное окно GUI – приложение завершит работу, корректно закрыв соединение с БД и остановив соединение с модулем </text:span><text:span text:style-name="T70">ESP</text:span><text:span text:style-name="T69">32-</text:span><text:span text:style-name="T70">CAM</text:span><text:span text:style-name="T69">.</text:span></text:p>
      <text:p text:style-name="P84"><text:soft-page-break/><draw:frame draw:style-name="fr1" draw:name="Рисунок 1" text:anchor-type="as-char" svg:width="130.26mm" svg:height="98.21mm" draw:z-index="4"><draw:image xlink:href="Pictures/10000001000002BF00000212D3C95399.png" xlink:type="simple" xlink:show="embed" xlink:actuate="onLoad" draw:mime-type="image/png"/></draw:frame></text:p>
      <text:p text:style-name="P58">Рисунок 4.1 – Окно «Выбор сессии»</text:p>
      <text:p text:style-name="P85"><draw:frame draw:style-name="fr1" draw:name="Изображение2" text:anchor-type="as-char" svg:width="160.62mm" svg:height="134.21mm" draw:z-index="5"><draw:image xlink:href="Pictures/10000001000004AE000003E95BDD973F.png" xlink:type="simple" xlink:show="embed" xlink:actuate="onLoad" draw:mime-type="image/png"/></draw:frame></text:p>
      <text:p text:style-name="P58">Рисунок 4.2 – Созданная новая сессия</text:p>
      <text:p text:style-name="P85"><text:soft-page-break/><draw:frame draw:style-name="fr1" draw:name="Изображение3" text:anchor-type="as-char" svg:width="164.68mm" svg:height="137.35mm" draw:z-index="6"><draw:image xlink:href="Pictures/10000001000004AF000003E8DEAAB704.png" xlink:type="simple" xlink:show="embed" xlink:actuate="onLoad" draw:mime-type="image/png"/></draw:frame></text:p>
      <text:p text:style-name="P58">Рисунок 4.3 – Сессия с наложенной тепловой картой</text:p>
      <text:p text:style-name="P85"><draw:frame draw:style-name="fr1" draw:name="Изображение4" text:anchor-type="as-char" svg:width="87.31mm" svg:height="40.48mm" draw:z-index="7"><draw:image xlink:href="Pictures/100000010000014A000000992A370071.png" xlink:type="simple" xlink:show="embed" xlink:actuate="onLoad" draw:mime-type="image/png"/></draw:frame></text:p>
      <text:p text:style-name="P58">Рисунок 4.4 – Успешный экспорт</text:p>
      <text:p text:style-name="P85"><draw:frame draw:style-name="fr1" draw:name="Изображение5" text:anchor-type="as-char" svg:width="88.11mm" svg:height="37.02mm" draw:z-index="8"><draw:image xlink:href="Pictures/100000010000016C0000009959E50271.png" xlink:type="simple" xlink:show="embed" xlink:actuate="onLoad" draw:mime-type="image/png"/></draw:frame></text:p>
      <text:p text:style-name="P58">Рисунок 4.5 – Успешное создание отчета</text:p>
      <text:p text:style-name="P86" loext:marker-style-name="T69"/>
      <text:h text:style-name="P61" text:outline-level="3" loext:marker-style-name="T40"><text:bookmark-start text:name="_Toc232328888"/><text:span text:style-name="T40">4.5.4 Исключительные ситуации и их обработка</text:span><text:bookmark-end text:name="_Toc232328888"/><text:span text:style-name="T40"/></text:h>
      <text:p text:style-name="Caption">Таблица 4.6 – Исключительные ситуации</text:p>
      <table:table table:name="Таблица16" table:style-name="Таблица16">
        <table:table-column table:style-name="Таблица16.A" table:number-columns-repeated="2"/>
        <table:table-column table:style-name="Таблица16.C"/>
        <table:table-row table:style-name="Таблица16.1">
          <table:table-cell table:style-name="Таблица16.A1" office:value-type="string">
            <text:p text:style-name="P87" loext:marker-style-name="T80"><text:span text:style-name="T80">Ситуация</text:span><text:span text:style-name="T80"/></text:p>
          </table:table-cell>
          <table:table-cell table:style-name="Таблица16.A1" office:value-type="string">
            <text:p text:style-name="P87" loext:marker-style-name="T80"><text:span text:style-name="T80">Сообщение пользователю</text:span><text:span text:style-name="T80"/></text:p>
          </table:table-cell>
          <table:table-cell table:style-name="Таблица16.A1" office:value-type="string">
            <text:p text:style-name="P87" loext:marker-style-name="T80"><text:span text:style-name="T80">Действие системы</text:span><text:span text:style-name="T80"/></text:p>
          </table:table-cell>
        </table:table-row>
        <table:table-row table:style-name="Таблица16.1">
          <table:table-cell table:style-name="Таблица16.A1" office:value-type="string">
            <text:p text:style-name="P87" loext:marker-style-name="T81"><text:span text:style-name="T81">Отсутствие соединения с БД при запуске</text:span><text:span text:style-name="T81"/></text:p>
          </table:table-cell>
          <table:table-cell table:style-name="Таблица16.A1" office:value-type="string">
            <text:p text:style-name="P87" loext:marker-style-name="T81"><text:span text:style-name="T81">«Ошибка подключения к базе данных! Проверьте запущен ли у вас MySQL или файл настроек settings.json!»</text:span><text:span text:style-name="T81"/></text:p>
          </table:table-cell>
          <table:table-cell table:style-name="Таблица16.A1" office:value-type="string">
            <text:p text:style-name="P87" loext:marker-style-name="T81"><text:span text:style-name="T81">Приложение завершает работу с кодом ошибки</text:span><text:span text:style-name="T81"/></text:p>
          </table:table-cell>
        </table:table-row>
        <table:table-row table:style-name="Таблица16.1">
          <table:table-cell table:style-name="Таблица16.A1" office:value-type="string">
            <text:p text:style-name="P87" loext:marker-style-name="T81"><text:span text:style-name="T81">Потеря соединения с БД во время работы</text:span><text:span text:style-name="T81"/></text:p>
          </table:table-cell>
          <table:table-cell table:style-name="Таблица16.A1" office:value-type="string">
            <text:p text:style-name="P87" loext:marker-style-name="T81"><text:span text:style-name="T81">«Потеряно соединение с БД, попытка переподключения...»</text:span><text:span text:style-name="T81"/></text:p>
          </table:table-cell>
          <table:table-cell table:style-name="Таблица16.A1" office:value-type="string">
            <text:p text:style-name="P87" loext:marker-style-name="T81"><text:span text:style-name="T81">Система пытается переподключиться каждые 30 с; если успешно – продолжает работу</text:span><text:span text:style-name="T81"/></text:p>
          </table:table-cell>
        </table:table-row>
        <table:table-row table:style-name="Таблица16.1">
          <table:table-cell table:style-name="Таблица16.A1" office:value-type="string">
            <text:p text:style-name="P87" loext:marker-style-name="T81"><text:span text:style-name="T81">Некорректный </text:span><text:span text:style-name="T82">GET</text:span><text:span text:style-name="T81">-запрос (нет изображения)</text:span></text:p>
          </table:table-cell>
          <table:table-cell table:style-name="Таблица16.A1" office:value-type="string">
            <text:p text:style-name="P87" loext:marker-style-name="T81"><text:span text:style-name="T81">Лог «Некорректный запрос: отсутствует поле image»</text:span><text:span text:style-name="T81"/></text:p>
          </table:table-cell>
          <table:table-cell table:style-name="Таблица16.A1" office:value-type="string">
            <text:p text:style-name="P87" loext:marker-style-name="T81"><text:span text:style-name="T81">Возврат HTTP 400, кадр не сохраняется</text:span><text:span text:style-name="T81"/></text:p>
          </table:table-cell>
        </table:table-row>
        <table:table-row table:style-name="Таблица16.1">
          <table:table-cell table:style-name="Таблица16.A1" office:value-type="string">
            <text:p text:style-name="P87" loext:marker-style-name="T81"><text:span text:style-name="T81">Повреждённое изображение (Pillow не может декодировать)</text:span><text:span text:style-name="T81"/></text:p>
          </table:table-cell>
          <table:table-cell table:style-name="Таблица16.A1" office:value-type="string">
            <text:p text:style-name="P87" loext:marker-style-name="T81"><text:span text:style-name="T81">Лог «Ошибка декодирования JPEG»</text:span><text:span text:style-name="T81"/></text:p>
          </table:table-cell>
          <table:table-cell table:style-name="Таблица16.A1" office:value-type="string">
            <text:p text:style-name="P87" loext:marker-style-name="T81"><text:span text:style-name="T81">Кадр пропускается, система продолжает работу</text:span><text:span text:style-name="T81"/></text:p>
          </table:table-cell>
        </table:table-row>
        <table:table-row table:style-name="Таблица16.1">
          <table:table-cell table:style-name="Таблица16.A1" office:value-type="string">
            <text:p text:style-name="P87" loext:marker-style-name="T81"><text:span text:style-name="T81">Ошибка вставки в БД (например, дубликат первичного ключа, но такого не может быть)</text:span><text:span text:style-name="T81"/></text:p>
          </table:table-cell>
          <table:table-cell table:style-name="Таблица16.A1" office:value-type="string">
            <text:p text:style-name="P87" loext:marker-style-name="T81"><text:span text:style-name="T81">Лог «Ошибка вставки записи: &lt;текст ошибки&gt;»</text:span><text:span text:style-name="T81"/></text:p>
          </table:table-cell>
          <table:table-cell table:style-name="Таблица16.A1" office:value-type="string">
            <text:p text:style-name="P87" loext:marker-style-name="T81"><text:span text:style-name="T81">Кадр не сохраняется, запись в лог</text:span><text:span text:style-name="T81"/></text:p>
          </table:table-cell>
        </table:table-row>
        <table:table-row table:style-name="Таблица16.1">
          <table:table-cell table:style-name="Таблица16.A1" office:value-type="string">
            <text:p text:style-name="P87" loext:marker-style-name="T81"><text:span text:style-name="T81">Выход за пределы допустимых значений температуры или координат</text:span><text:span text:style-name="T81"/></text:p>
          </table:table-cell>
          <table:table-cell table:style-name="Таблица16.A1" office:value-type="string">
            <text:p text:style-name="P87" loext:marker-style-name="T81"><text:span text:style-name="T81">Предупреждение в лог</text:span><text:span text:style-name="T81"/></text:p>
          </table:table-cell>
          <table:table-cell table:style-name="Таблица16.A1" office:value-type="string">
            <text:p text:style-name="P87" loext:marker-style-name="T81"><text:span text:style-name="T81">Значения всё равно сохраняются, но пользователь может увидеть нештатные данные</text:span><text:span text:style-name="T81"/></text:p>
          </table:table-cell>
        </table:table-row>
      </table:table>
      <text:p text:style-name="_5f_Текст" loext:marker-style-name="T69"><text:span text:style-name="T69">Все критические ошибки выводятся в лог-файл и в специальное окно уведомлений (всплывающее сообщение в GUI). Система спроектирована таким образом, что отказ одного кадра не влияет на общую работоспособность.</text:span><text:span text:style-name="T69"/></text:p>
      <text:p text:style-name="P88" loext:marker-style-name="T18"/>
      <text:list xml:id="list3912350799" text:style-name="WWNum5">
        <text:list-item>
          <text:h text:style-name="P89" text:outline-level="1"><text:bookmark-start text:name="_Toc137554482"/><text:bookmark-start text:name="_Toc232328889"/>ТЕСТИРОВАНИЕ СИСТЕМЫ<text:bookmark-end text:name="_Toc137554482"/><text:bookmark-end text:name="_Toc232328889"/></text:h>
          <text:list>
            <text:list-item>
              <text:h text:style-name="P90" text:outline-level="2" loext:marker-style-name="T83"><text:bookmark-start text:name="_Toc137554483"/><text:bookmark-start text:name="_Toc232328890"/><text:span text:style-name="T83">Условия и порядок тестирования</text:span><text:bookmark-end text:name="_Toc137554483"/><text:bookmark-end text:name="_Toc232328890"/><text:span text:style-name="T83"/></text:h>
            </text:list-item>
          </text:list>
        </text:list-item>
      </text:list>
      <text:p text:style-name="_5f_Текст">Объектом тестирования является прикладное программное обеспечение – десктопное приложение, предназначенное для приёма, обработки, хранения и экспорта инфракрасного мониторинга температуры объекта.</text:p>
      <text:p text:style-name="_5f_Текст">Методом тестирования была выбрана модель черного ящика.</text:p>
      <text:p text:style-name="_5f_Текст">Общий порядок тестирования:</text:p>
      <text:list text:continue-list="list112909833693529" text:style-name="WWNum10">
        <text:list-item>
          <text:p text:style-name="P47">снимаются входные данные;</text:p>
        </text:list-item>
        <text:list-item>
          <text:p text:style-name="P47">снимаются выходные данные.</text:p>
        </text:list-item>
      </text:list>
      <text:list text:continue-list="list3912350799" text:style-name="WWNum5">
        <text:list-item>
          <text:list>
            <text:list-item>
              <text:h text:style-name="P90" text:outline-level="2"><text:bookmark-start text:name="_Toc232328891"/>Исходные данные для контрольных примеров<text:bookmark-end text:name="_Toc232328891"/></text:h>
              <text:list>
                <text:list-item>
                  <text:h text:style-name="P91" text:outline-level="3"><text:bookmark-start text:name="_Toc232328892"/>Описание ситуаций для элементов системы<text:bookmark-end text:name="_Toc232328892"/></text:h>
                </text:list-item>
              </text:list>
            </text:list-item>
          </text:list>
        </text:list-item>
      </text:list>
      <text:p text:style-name="_5f_Текст">Для тестирования корректности наложения тепловой карты сгенерируем случайную тепловую карту с температурами с предельными значениями датчика <text:span text:style-name="T50">MLX</text:span>90614. Для тестирования работоспособности авторизации в базу данных пробуем изменить <text:span text:style-name="T50">settings</text:span>.<text:span text:style-name="T50">json</text:span> с полями mysql_user на случайную строку (неправильный), а потом на <text:span text:style-name="T50">root</text:span> (правильный). Для тестирования работоспособности модуля экспорта вручную запишем в базу данных случайный набор точек, температур и временных меток.</text:p>
      <text:h text:style-name="Heading_20_2" text:outline-level="2"><text:bookmark-start text:name="_Toc232328893"/>5.3 Результаты тестирования<text:bookmark-end text:name="_Toc232328893"/></text:h>
      <text:p text:style-name="_5f_Текст">Корректная работа описанных выше исходных данных представлена в п.4.5.3 Руководства пользователя. Соответственно в остальных случаях обращаться к п.4.5.4.</text:p>
      <text:list text:continue-numbering="true" text:style-name="WWNum5">
        <text:list-item>
          <text:h text:style-name="P92" text:outline-level="1"><text:bookmark-start text:name="_Toc137554492"/><text:bookmark-start text:name="_Toc232328894"/><text:soft-page-break/>ЭКОНОМИЧЕСКИЙ РАЗДЕЛ<text:bookmark-end text:name="_Toc137554492"/><text:bookmark-end text:name="_Toc232328894"/></text:h>
        </text:list-item>
      </text:list>
      <text:h text:style-name="Heading_20_2" text:outline-level="2"><text:bookmark-start text:name="_Toc232328895"/>6.1 Расчёт показателей трудоёмкости для программного продукта<text:bookmark-end text:name="_Toc232328895"/></text:h>
      <text:p text:style-name="_5f_Текст">Величина параметра трудоёмкости для разрабатываемого программного продукта состоит из суммы значений трудоёмкости для каждого этапа разработки и рассчитывается по формуле:</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78"/>
          </table:table-cell>
          <table:table-cell table:style-name="Таблица17.A1" office:value-type="string">
            <text:p text:style-name="P76"><draw:frame draw:style-name="fr2" draw:name="Объект1" text:anchor-type="as-char" svg:width="18.42mm" svg:height="11.5mm" draw:z-index="569"><draw:object xlink:href="./Object 1" xlink:type="simple" xlink:show="embed" xlink:actuate="onLoad"/><draw:image xlink:href="./ObjectReplacements/Object 1" xlink:type="simple" xlink:show="embed" xlink:actuate="onLoad"/></draw:frame></text:p>
          </table:table-cell>
          <table:table-cell table:style-name="Таблица17.C1" office:value-type="string">
            <text:p text:style-name="P78">(1)</text:p>
          </table:table-cell>
        </table:table-row>
      </table:table>
      <text:p text:style-name="P93" loext:marker-style-name="T43"><text:span text:style-name="T43">где </text:span><draw:frame draw:style-name="fr2" draw:name="Объект2" text:anchor-type="as-char" svg:width="5.63mm" svg:height="5.34mm" draw:z-index="565"><draw:object xlink:href="./Object 2" xlink:type="simple" xlink:show="embed" xlink:actuate="onLoad"/><draw:image xlink:href="./ObjectReplacements/Object 2" xlink:type="simple" xlink:show="embed" xlink:actuate="onLoad"/></draw:frame><text:span text:style-name="T7"><text:s/></text:span><text:span text:style-name="T43">– общая трудоёмкость разработки программного продукта; </text:span></text:p>
      <text:p text:style-name="P93" loext:marker-style-name="T43"><draw:frame draw:style-name="fr2" draw:name="Объект3" text:anchor-type="as-char" svg:width="3.25mm" svg:height="4.71mm" draw:z-index="566"><draw:object xlink:href="./Object 3" xlink:type="simple" xlink:show="embed" xlink:actuate="onLoad"/><draw:image xlink:href="./ObjectReplacements/Object 3" xlink:type="simple" xlink:show="embed" xlink:actuate="onLoad"/></draw:frame><text:span text:style-name="T7"><text:s/></text:span><text:span text:style-name="T43">– трудоёмкость работ на </text:span><text:span text:style-name="T61">i</text:span><text:span text:style-name="T43">-й стадии разработки; </text:span></text:p>
      <text:p text:style-name="P93" loext:marker-style-name="T43"><draw:frame draw:style-name="fr2" draw:name="Объект4" text:anchor-type="as-char" svg:width="3.95mm" svg:height="4.71mm" draw:z-index="567"><draw:object xlink:href="./Object 4" xlink:type="simple" xlink:show="embed" xlink:actuate="onLoad"/><draw:image xlink:href="./ObjectReplacements/Object 4" xlink:type="simple" xlink:show="embed" xlink:actuate="onLoad"/></draw:frame><text:span text:style-name="T43">– общее количество этапов разработки. </text:span></text:p>
      <text:p text:style-name="Caption" loext:marker-style-name="T13">Таблица 6.1 <text:span text:style-name="T60"></text:span> Поэтапная и общая оценка трудоёмкости</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94" loext:marker-style-name="T61"><text:span text:style-name="T43">Этап работы</text:span><text:span text:style-name="T61"/></text:p>
          </table:table-cell>
          <table:table-cell table:style-name="Таблица18.A1" office:value-type="string">
            <text:p text:style-name="P94" loext:marker-style-name="T61"><text:span text:style-name="T43">Вид работы</text:span><text:span text:style-name="T61"/></text:p>
          </table:table-cell>
          <table:table-cell table:style-name="Таблица18.A1" office:value-type="string">
            <text:p text:style-name="P94" loext:marker-style-name="T43"><text:span text:style-name="T43">Трудоёмкость<text:line-break/> (чел. * час)</text:span><text:span text:style-name="T43"/></text:p>
          </table:table-cell>
        </table:table-row>
        <table:table-row table:style-name="Таблица18.1">
          <table:table-cell table:style-name="Таблица18.A1" office:value-type="string">
            <text:p text:style-name="P95" loext:marker-style-name="T84"><text:span text:style-name="T84">Формирование требований к системе</text:span><text:span text:style-name="T84"/></text:p>
          </table:table-cell>
          <table:table-cell table:style-name="Таблица18.A1" office:value-type="string">
            <text:p text:style-name="P95" loext:marker-style-name="T84"><text:span text:style-name="T84">Исследование объекта предметной области</text:span><text:span text:style-name="T84"/></text:p>
            <text:p text:style-name="P95" loext:marker-style-name="T84"><text:span text:style-name="T84">Обоснование необходимости создания системы</text:span><text:span text:style-name="T84"/></text:p>
            <text:p text:style-name="P95" loext:marker-style-name="T84"><text:span text:style-name="T84">Анализ требований к системе</text:span><text:span text:style-name="T84"/></text:p>
          </table:table-cell>
          <table:table-cell table:style-name="Таблица18.A1" office:value-type="string">
            <text:p text:style-name="P95" loext:marker-style-name="T84"><text:span text:style-name="T84">20</text:span><text:span text:style-name="T84"/></text:p>
          </table:table-cell>
        </table:table-row>
        <table:table-row table:style-name="Таблица18.1">
          <table:table-cell table:style-name="Таблица18.A1" office:value-type="string">
            <text:p text:style-name="P95" loext:marker-style-name="T84"><text:span text:style-name="T84">Техническое задание</text:span><text:span text:style-name="T84"/></text:p>
          </table:table-cell>
          <table:table-cell table:style-name="Таблица18.A1" office:value-type="string">
            <text:p text:style-name="P95" loext:marker-style-name="T84"><text:span text:style-name="T84">Разработка и утверждение технического задания на систему</text:span><text:span text:style-name="T84"/></text:p>
          </table:table-cell>
          <table:table-cell table:style-name="Таблица18.A1" office:value-type="string">
            <text:p text:style-name="P95" loext:marker-style-name="T84"><text:span text:style-name="T84">30</text:span><text:span text:style-name="T84"/></text:p>
          </table:table-cell>
        </table:table-row>
        <table:table-row table:style-name="Таблица18.1">
          <table:table-cell table:style-name="Таблица18.A1" office:value-type="string">
            <text:p text:style-name="P95" loext:marker-style-name="T84"><text:span text:style-name="T84">Разработка системы</text:span><text:span text:style-name="T84"/></text:p>
          </table:table-cell>
          <table:table-cell table:style-name="Таблица18.A1" office:value-type="string">
            <text:p text:style-name="P95" loext:marker-style-name="T84"><text:span text:style-name="T84">Разработка системы на языке программирования</text:span><text:span text:style-name="T84"/></text:p>
          </table:table-cell>
          <table:table-cell table:style-name="Таблица18.A1" office:value-type="string">
            <text:p text:style-name="P95" loext:marker-style-name="T84"><text:span text:style-name="T84">260</text:span><text:span text:style-name="T84"/></text:p>
          </table:table-cell>
        </table:table-row>
        <table:table-row table:style-name="Таблица18.1">
          <table:table-cell table:style-name="Таблица18.A1" office:value-type="string">
            <text:p text:style-name="P95" loext:marker-style-name="T84"><text:span text:style-name="T84">Тестирование системы</text:span><text:span text:style-name="T84"/></text:p>
          </table:table-cell>
          <table:table-cell table:style-name="Таблица18.A1" office:value-type="string">
            <text:p text:style-name="P95" loext:marker-style-name="T84"><text:span text:style-name="T84">Проведение тестирования разработанной системы на тестовых данных<text:line-break/>Устранение ошибок</text:span><text:span text:style-name="T84"/></text:p>
          </table:table-cell>
          <table:table-cell table:style-name="Таблица18.A1" office:value-type="string">
            <text:p text:style-name="P95" loext:marker-style-name="T84"><text:span text:style-name="T84">80</text:span><text:span text:style-name="T84"/></text:p>
          </table:table-cell>
        </table:table-row>
        <table:table-row table:style-name="Таблица18.1">
          <table:table-cell table:style-name="Таблица18.A1" office:value-type="string">
            <text:p text:style-name="P95" loext:marker-style-name="T84"><text:span text:style-name="T84">Рабочая документация</text:span><text:span text:style-name="T84"/></text:p>
          </table:table-cell>
          <table:table-cell table:style-name="Таблица18.A1" office:value-type="string">
            <text:p text:style-name="P95" loext:marker-style-name="T84"><text:span text:style-name="T84">Разработка рабочей документации на систему</text:span><text:span text:style-name="T84"/></text:p>
          </table:table-cell>
          <table:table-cell table:style-name="Таблица18.A1" office:value-type="string">
            <text:p text:style-name="P95" loext:marker-style-name="T84"><text:span text:style-name="T84">50</text:span><text:span text:style-name="T84"/></text:p>
          </table:table-cell>
        </table:table-row>
        <table:table-row table:style-name="Таблица18.1">
          <table:table-cell table:style-name="Таблица18.A1" table:number-columns-spanned="2" office:value-type="string">
            <text:p text:style-name="P94" loext:marker-style-name="T18"><text:span text:style-name="T18">Общая нагрузка</text:span><text:span text:style-name="T18"/></text:p>
          </table:table-cell>
          <table:covered-table-cell/>
          <table:table-cell table:style-name="Таблица18.A1" office:value-type="string">
            <text:p text:style-name="P94" loext:marker-style-name="T18"><text:span text:style-name="T18">440</text:span><text:span text:style-name="T18"/></text:p>
          </table:table-cell>
        </table:table-row>
      </table:table>
      <text:p text:style-name="P96" loext:marker-style-name="T43"/>
      <text:p text:style-name="P96" loext:marker-style-name="T43"/>
      <text:h text:style-name="Heading_20_2" text:outline-level="2"><text:bookmark-start text:name="_Toc232328896"/><text:soft-page-break/>6.2 Расчёт затрат на материальные ресурсы<text:bookmark-end text:name="_Toc232328896"/></text:h>
      <text:p text:style-name="P33" loext:marker-style-name="T85"><text:span text:style-name="T86">Расчёт затрат на материальные ресурсы </text:span><draw:frame draw:style-name="fr2" draw:name="Объект5" text:anchor-type="as-char" svg:width="4.37mm" svg:height="5.34mm" draw:z-index="568"><draw:object xlink:href="./Object 5" xlink:type="simple" xlink:show="embed" xlink:actuate="onLoad"/><draw:image xlink:href="./ObjectReplacements/Object 5" xlink:type="simple" xlink:show="embed" xlink:actuate="onLoad"/></draw:frame><text:span text:style-name="T85"><text:s/>производится по формуле:</text:span></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78"/>
          </table:table-cell>
          <table:table-cell table:style-name="Таблица19.A1" office:value-type="string">
            <text:p text:style-name="P76"><draw:frame draw:style-name="fr2" draw:name="Объект6" text:anchor-type="as-char" svg:width="23.55mm" svg:height="11.5mm" draw:z-index="576"><draw:object xlink:href="./Object 6" xlink:type="simple" xlink:show="embed" xlink:actuate="onLoad"/><draw:image xlink:href="./ObjectReplacements/Object 6" xlink:type="simple" xlink:show="embed" xlink:actuate="onLoad"/></draw:frame></text:p>
          </table:table-cell>
          <table:table-cell table:style-name="Таблица19.C1" office:value-type="string">
            <text:p text:style-name="P78">(2)</text:p>
          </table:table-cell>
        </table:table-row>
      </table:table>
      <text:p text:style-name="P97" loext:marker-style-name="T85"><text:span text:style-name="T86">где </text:span><draw:frame draw:style-name="fr2" draw:name="Объект7" text:anchor-type="as-char" svg:width="3.74mm" svg:height="5.34mm" draw:z-index="570"><draw:object xlink:href="./Object 7" xlink:type="simple" xlink:show="embed" xlink:actuate="onLoad"/><draw:image xlink:href="./ObjectReplacements/Object 7" xlink:type="simple" xlink:show="embed" xlink:actuate="onLoad"/></draw:frame><text:span text:style-name="T85"><text:s/></text:span><text:span text:style-name="T87"></text:span><text:span text:style-name="T85"> расход </text:span><text:span text:style-name="T88">i</text:span><text:span text:style-name="T85">-го вида материального ресурса, натуральные единицы;</text:span></text:p>
      <text:p text:style-name="P97" loext:marker-style-name="T85"><draw:frame draw:style-name="fr2" draw:name="Объект8" text:anchor-type="as-char" svg:width="4.53mm" svg:height="5.34mm" draw:z-index="571"><draw:object xlink:href="./Object 8" xlink:type="simple" xlink:show="embed" xlink:actuate="onLoad"/><draw:image xlink:href="./ObjectReplacements/Object 8" xlink:type="simple" xlink:show="embed" xlink:actuate="onLoad"/></draw:frame><text:span text:style-name="T85"><text:s/></text:span><text:span text:style-name="T87"></text:span><text:span text:style-name="T85"> цена за единицу </text:span><text:span text:style-name="T88">i</text:span><text:span text:style-name="T85">-го вида материального ресурса;</text:span></text:p>
      <text:p text:style-name="P97" loext:marker-style-name="T85"><text:span text:style-name="T88">i</text:span><text:span text:style-name="T85"> </text:span><text:span text:style-name="T87"></text:span><text:span text:style-name="T85"> вид материального ресурса;</text:span></text:p>
      <text:p text:style-name="P97" loext:marker-style-name="T85"><text:span text:style-name="T88">n</text:span><text:span text:style-name="T85"> </text:span><text:span text:style-name="T89"></text:span><text:span text:style-name="T85"> общее количество всех видов материальных ресурсов.</text:span></text:p>
      <text:p text:style-name="P33" loext:marker-style-name="T85"><text:span text:style-name="T85">Результаты расчетов затрат на материальные ресурсы приведены в таблице 6.2.</text:span><text:span text:style-name="T85"/></text:p>
      <text:p text:style-name="Caption" loext:marker-style-name="T13">Таблица 6.2 <text:span text:style-name="T60"></text:span> Затраты на материальные ресурсы</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row table:style-name="Таблица20.1">
          <table:table-cell table:style-name="Таблица20.A1" office:value-type="string">
            <text:p text:style-name="P94" loext:marker-style-name="T61"><text:span text:style-name="T43">Наименование</text:span><text:span text:style-name="T61"/></text:p>
          </table:table-cell>
          <table:table-cell table:style-name="Таблица20.A1" office:value-type="string">
            <text:p text:style-name="P94" loext:marker-style-name="T61"><text:span text:style-name="T43">Единица измерения</text:span><text:span text:style-name="T61"/></text:p>
          </table:table-cell>
          <table:table-cell table:style-name="Таблица20.A1" office:value-type="string">
            <text:p text:style-name="P94" loext:marker-style-name="T43"><text:span text:style-name="T43">Количество израсходованного материала</text:span><text:span text:style-name="T43"/></text:p>
          </table:table-cell>
          <table:table-cell table:style-name="Таблица20.A1" office:value-type="string">
            <text:p text:style-name="P94" loext:marker-style-name="T43"><text:span text:style-name="T43">Цена за единицу, руб.</text:span><text:span text:style-name="T43"/></text:p>
          </table:table-cell>
          <table:table-cell table:style-name="Таблица20.A1" office:value-type="string">
            <text:p text:style-name="P94" loext:marker-style-name="T43"><text:span text:style-name="T43">Сумма, руб.</text:span><text:span text:style-name="T43"/></text:p>
          </table:table-cell>
        </table:table-row>
        <table:table-row table:style-name="Таблица20.1">
          <table:table-cell table:style-name="Таблица20.A1" office:value-type="string">
            <text:p text:style-name="P95" loext:marker-style-name="T84"><text:span text:style-name="T84">Компьютер</text:span><text:span text:style-name="T84"/></text:p>
          </table:table-cell>
          <table:table-cell table:style-name="Таблица20.A1" office:value-type="string">
            <text:p text:style-name="P95" loext:marker-style-name="T84"><text:span text:style-name="T84">шт</text:span><text:span text:style-name="T84"/></text:p>
          </table:table-cell>
          <table:table-cell table:style-name="Таблица20.A1" office:value-type="string">
            <text:p text:style-name="P95" loext:marker-style-name="T84"><text:span text:style-name="T84">1</text:span><text:span text:style-name="T84"/></text:p>
          </table:table-cell>
          <table:table-cell table:style-name="Таблица20.A1" office:value-type="string">
            <text:p text:style-name="P95" loext:marker-style-name="T84"><text:span text:style-name="T84">100 000</text:span><text:span text:style-name="T84"/></text:p>
          </table:table-cell>
          <table:table-cell table:style-name="Таблица20.A1" office:value-type="string">
            <text:p text:style-name="P95" loext:marker-style-name="T84"><text:span text:style-name="T84">100 000</text:span><text:span text:style-name="T84"/></text:p>
          </table:table-cell>
        </table:table-row>
        <table:table-row table:style-name="Таблица20.1">
          <table:table-cell table:style-name="Таблица20.A1" office:value-type="string">
            <text:p text:style-name="P95" loext:marker-style-name="T84"><text:span text:style-name="T84">Монитор</text:span><text:span text:style-name="T84"/></text:p>
          </table:table-cell>
          <table:table-cell table:style-name="Таблица20.A1" office:value-type="string">
            <text:p text:style-name="P95" loext:marker-style-name="T84"><text:span text:style-name="T84">шт</text:span><text:span text:style-name="T84"/></text:p>
          </table:table-cell>
          <table:table-cell table:style-name="Таблица20.A1" office:value-type="string">
            <text:p text:style-name="P95" loext:marker-style-name="T84"><text:span text:style-name="T84">1</text:span><text:span text:style-name="T84"/></text:p>
          </table:table-cell>
          <table:table-cell table:style-name="Таблица20.A1" office:value-type="string">
            <text:p text:style-name="P95" loext:marker-style-name="T84"><text:span text:style-name="T84">10 000</text:span><text:span text:style-name="T84"/></text:p>
          </table:table-cell>
          <table:table-cell table:style-name="Таблица20.A1" office:value-type="string">
            <text:p text:style-name="P95" loext:marker-style-name="T84"><text:span text:style-name="T84">10 000</text:span><text:span text:style-name="T84"/></text:p>
          </table:table-cell>
        </table:table-row>
        <table:table-row table:style-name="Таблица20.1">
          <table:table-cell table:style-name="Таблица20.A1" office:value-type="string">
            <text:p text:style-name="P95" loext:marker-style-name="T84"><text:span text:style-name="T84">Модуль </text:span><text:span text:style-name="T90">ESP</text:span><text:span text:style-name="T84">32-</text:span><text:span text:style-name="T90">CAM</text:span><text:span text:style-name="T84"> с камерой </text:span><text:span text:style-name="T90">OV</text:span><text:span text:style-name="T84">3660</text:span></text:p>
          </table:table-cell>
          <table:table-cell table:style-name="Таблица20.A1" office:value-type="string">
            <text:p text:style-name="P95" loext:marker-style-name="T84"><text:span text:style-name="T84">шт</text:span><text:span text:style-name="T84"/></text:p>
          </table:table-cell>
          <table:table-cell table:style-name="Таблица20.A1" office:value-type="string">
            <text:p text:style-name="P95" loext:marker-style-name="T84"><text:span text:style-name="T84">1</text:span><text:span text:style-name="T84"/></text:p>
          </table:table-cell>
          <table:table-cell table:style-name="Таблица20.A1" office:value-type="string">
            <text:p text:style-name="P95" loext:marker-style-name="T84"><text:span text:style-name="T84">797</text:span><text:span text:style-name="T84"/></text:p>
          </table:table-cell>
          <table:table-cell table:style-name="Таблица20.A1" office:value-type="string">
            <text:p text:style-name="P95" loext:marker-style-name="T84"><text:span text:style-name="T84">797</text:span><text:span text:style-name="T84"/></text:p>
          </table:table-cell>
        </table:table-row>
        <table:table-row table:style-name="Таблица20.1">
          <table:table-cell table:style-name="Таблица20.A1" office:value-type="string">
            <text:p text:style-name="P95" loext:marker-style-name="T84"><text:span text:style-name="T91">Кабель </text:span><text:span text:style-name="T92">Micro-USB</text:span></text:p>
          </table:table-cell>
          <table:table-cell table:style-name="Таблица20.A1" office:value-type="string">
            <text:p text:style-name="P95" loext:marker-style-name="T84"><text:span text:style-name="T84">шт</text:span><text:span text:style-name="T84"/></text:p>
          </table:table-cell>
          <table:table-cell table:style-name="Таблица20.A1" office:value-type="string">
            <text:p text:style-name="P95" loext:marker-style-name="T84"><text:span text:style-name="T84">1</text:span><text:span text:style-name="T84"/></text:p>
          </table:table-cell>
          <table:table-cell table:style-name="Таблица20.A1" office:value-type="string">
            <text:p text:style-name="P95" loext:marker-style-name="T84"><text:span text:style-name="T84">391</text:span><text:span text:style-name="T84"/></text:p>
          </table:table-cell>
          <table:table-cell table:style-name="Таблица20.A1" office:value-type="string">
            <text:p text:style-name="P95" loext:marker-style-name="T84"><text:span text:style-name="T84">391</text:span><text:span text:style-name="T84"/></text:p>
          </table:table-cell>
        </table:table-row>
        <table:table-row table:style-name="Таблица20.1">
          <table:table-cell table:style-name="Таблица20.A1" table:number-columns-spanned="4" office:value-type="string">
            <text:p text:style-name="P94" loext:marker-style-name="T18"><text:span text:style-name="T18">Итого</text:span><text:span text:style-name="T18"/></text:p>
          </table:table-cell>
          <table:covered-table-cell/>
          <table:covered-table-cell/>
          <table:covered-table-cell/>
          <table:table-cell table:style-name="Таблица20.A1" office:value-type="string">
            <text:p text:style-name="P94" loext:marker-style-name="T18"><text:span text:style-name="T18">111 188</text:span><text:span text:style-name="T18"/></text:p>
          </table:table-cell>
        </table:table-row>
      </table:table>
      <text:p text:style-name="P98" loext:marker-style-name="T86"/>
      <text:p text:style-name="P33" loext:marker-style-name="T86"><text:span text:style-name="T86">При разработке системы не возникло необходимости в использовании расходных материалов.</text:span><text:span text:style-name="T86"/></text:p>
      <text:p text:style-name="P33" loext:marker-style-name="T85"><text:span text:style-name="T86">Общая сумма затрат на электроэнергию </text:span><draw:frame draw:style-name="fr2" draw:name="Объект9" text:anchor-type="as-char" svg:width="3.76mm" svg:height="5.34mm" draw:z-index="572"><draw:object xlink:href="./Object 9" xlink:type="simple" xlink:show="embed" xlink:actuate="onLoad"/><draw:image xlink:href="./ObjectReplacements/Object 9" xlink:type="simple" xlink:show="embed" xlink:actuate="onLoad"/></draw:frame><text:span text:style-name="T85"><text:s/>рассчитывается по формуле:</text:span></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78"/>
          </table:table-cell>
          <table:table-cell table:style-name="Таблица21.A1" office:value-type="string">
            <text:p text:style-name="P76"><draw:frame draw:style-name="fr2" draw:name="Объект10" text:anchor-type="as-char" svg:width="27.45mm" svg:height="11.5mm" draw:z-index="577"><draw:object xlink:href="./Object 10" xlink:type="simple" xlink:show="embed" xlink:actuate="onLoad"/><draw:image xlink:href="./ObjectReplacements/Object 10" xlink:type="simple" xlink:show="embed" xlink:actuate="onLoad"/></draw:frame></text:p>
          </table:table-cell>
          <table:table-cell table:style-name="Таблица21.C1" office:value-type="string">
            <text:p text:style-name="P78">(3)</text:p>
          </table:table-cell>
        </table:table-row>
      </table:table>
      <text:p text:style-name="P97" loext:marker-style-name="T85"><text:span text:style-name="T86">где </text:span><draw:frame draw:style-name="fr2" draw:name="Объект11" text:anchor-type="as-char" svg:width="4.99mm" svg:height="5.34mm" draw:z-index="573"><draw:object xlink:href="./Object 11" xlink:type="simple" xlink:show="embed" xlink:actuate="onLoad"/><draw:image xlink:href="./ObjectReplacements/Object 11" xlink:type="simple" xlink:show="embed" xlink:actuate="onLoad"/></draw:frame><text:span text:style-name="T85"><text:s/></text:span><text:span text:style-name="T87"></text:span><text:span text:style-name="T85"> паспортная мощность </text:span><text:span text:style-name="T88">i</text:span><text:span text:style-name="T85">-го электрооборудования, кВт;</text:span></text:p>
      <text:p text:style-name="P97" loext:marker-style-name="T85"><text:soft-page-break/><draw:frame draw:style-name="fr2" draw:name="Объект12" text:anchor-type="as-char" svg:width="3.62mm" svg:height="5.34mm" draw:z-index="574"><draw:object xlink:href="./Object 12" xlink:type="simple" xlink:show="embed" xlink:actuate="onLoad"/><draw:image xlink:href="./ObjectReplacements/Object 12" xlink:type="simple" xlink:show="embed" xlink:actuate="onLoad"/></draw:frame><text:span text:style-name="T85"><text:s/></text:span><text:span text:style-name="T87"></text:span><text:span text:style-name="T85"> время работы </text:span><text:span text:style-name="T88">i</text:span><text:span text:style-name="T85">-го оборудования за весь период разработки, ч;</text:span></text:p>
      <text:p text:style-name="P97" loext:marker-style-name="T85"><text:span text:style-name="T85">Ц </text:span><text:span text:style-name="T87"></text:span><text:span text:style-name="T85"> тариф электроэнергии, руб./кВт</text:span><text:span text:style-name="T87"></text:span><text:span text:style-name="T85">ч;</text:span></text:p>
      <text:p text:style-name="P97" loext:marker-style-name="T85"><text:span text:style-name="T88">i</text:span><text:span text:style-name="T85"> </text:span><text:span text:style-name="T87"></text:span><text:span text:style-name="T85"> вид электрооборудования;</text:span></text:p>
      <text:p text:style-name="P97" loext:marker-style-name="T85"><text:span text:style-name="T88">n</text:span><text:span text:style-name="T85"> </text:span><text:span text:style-name="T89"></text:span><text:span text:style-name="T85"> количество электрооборудования.</text:span></text:p>
      <text:p text:style-name="P33" loext:marker-style-name="T85"><text:span text:style-name="T85">Необходимые расчёты затрат на электроэнергию приведены в таблице 6.3.</text:span><text:span text:style-name="T85"/></text:p>
      <text:p text:style-name="Caption" loext:marker-style-name="T13">Таблица 6.3 <text:span text:style-name="T60"></text:span> Затраты на электроэнергию</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column table:style-name="Таблица22.E"/>
        <table:table-row table:style-name="Таблица22.1">
          <table:table-cell table:style-name="Таблица22.A1" office:value-type="string">
            <text:p text:style-name="P94" loext:marker-style-name="T61"><text:span text:style-name="T43">Наименование</text:span><text:span text:style-name="T61"/></text:p>
          </table:table-cell>
          <table:table-cell table:style-name="Таблица22.A1" office:value-type="string">
            <text:p text:style-name="P94" loext:marker-style-name="T61"><text:span text:style-name="T43">Паспортная мощность, кВт</text:span><text:span text:style-name="T61"/></text:p>
          </table:table-cell>
          <table:table-cell table:style-name="Таблица22.A1" office:value-type="string">
            <text:p text:style-name="P94" loext:marker-style-name="T43"><text:span text:style-name="T43">Время работы оборудования</text:span><text:span text:style-name="T43"/></text:p>
          </table:table-cell>
          <table:table-cell table:style-name="Таблица22.A1" office:value-type="string">
            <text:p text:style-name="P94" loext:marker-style-name="T43"><text:span text:style-name="T85">Тариф электроэнергии, руб./кВт</text:span><text:span text:style-name="T87"></text:span><text:span text:style-name="T85">ч</text:span></text:p>
          </table:table-cell>
          <table:table-cell table:style-name="Таблица22.A1" office:value-type="string">
            <text:p text:style-name="P94" loext:marker-style-name="T43"><text:span text:style-name="T43">Сумма, руб.</text:span><text:span text:style-name="T43"/></text:p>
          </table:table-cell>
        </table:table-row>
        <table:table-row table:style-name="Таблица22.1">
          <table:table-cell table:style-name="Таблица22.A1" office:value-type="string">
            <text:p text:style-name="P95" loext:marker-style-name="T84"><text:span text:style-name="T84">Компьютер</text:span><text:span text:style-name="T84"/></text:p>
          </table:table-cell>
          <table:table-cell table:style-name="Таблица22.A1" office:value-type="string">
            <text:p text:style-name="P95" loext:marker-style-name="T84"><text:span text:style-name="T84">0,7</text:span><text:span text:style-name="T84"/></text:p>
          </table:table-cell>
          <table:table-cell table:style-name="Таблица22.A1" office:value-type="string">
            <text:p text:style-name="P95" loext:marker-style-name="T84"><text:span text:style-name="T84">440</text:span><text:span text:style-name="T84"/></text:p>
          </table:table-cell>
          <table:table-cell table:style-name="Таблица22.A1" office:value-type="string">
            <text:p text:style-name="P95" loext:marker-style-name="T84"><text:span text:style-name="T84">5,64</text:span><text:span text:style-name="T84"/></text:p>
          </table:table-cell>
          <table:table-cell table:style-name="Таблица22.A1" office:value-type="string">
            <text:p text:style-name="P95" loext:marker-style-name="T84"><text:span text:style-name="T84">2 481,6</text:span><text:span text:style-name="T84"/></text:p>
          </table:table-cell>
        </table:table-row>
        <table:table-row table:style-name="Таблица22.1">
          <table:table-cell table:style-name="Таблица22.A1" office:value-type="string">
            <text:p text:style-name="P95" loext:marker-style-name="T84"><text:span text:style-name="T84">Монитор</text:span><text:span text:style-name="T84"/></text:p>
          </table:table-cell>
          <table:table-cell table:style-name="Таблица22.A1" office:value-type="string">
            <text:p text:style-name="P95" loext:marker-style-name="T84"><text:span text:style-name="T84">0,2</text:span><text:span text:style-name="T84"/></text:p>
          </table:table-cell>
          <table:table-cell table:style-name="Таблица22.A1" office:value-type="string">
            <text:p text:style-name="P95" loext:marker-style-name="T84"><text:span text:style-name="T84">440</text:span><text:span text:style-name="T84"/></text:p>
          </table:table-cell>
          <table:table-cell table:style-name="Таблица22.A1" office:value-type="string">
            <text:p text:style-name="P95" loext:marker-style-name="T84"><text:span text:style-name="T84">5,64</text:span><text:span text:style-name="T84"/></text:p>
          </table:table-cell>
          <table:table-cell table:style-name="Таблица22.A1" office:value-type="string">
            <text:p text:style-name="P95" loext:marker-style-name="T84"><text:span text:style-name="T84">2 481,6</text:span><text:span text:style-name="T84"/></text:p>
          </table:table-cell>
        </table:table-row>
        <table:table-row table:style-name="Таблица22.1">
          <table:table-cell table:style-name="Таблица22.A1" office:value-type="string">
            <text:p text:style-name="P95" loext:marker-style-name="T84"><text:span text:style-name="T84">Освещение</text:span><text:span text:style-name="T84"/></text:p>
          </table:table-cell>
          <table:table-cell table:style-name="Таблица22.A1" office:value-type="string">
            <text:p text:style-name="P95" loext:marker-style-name="T84"><text:span text:style-name="T84">0,04</text:span><text:span text:style-name="T84"/></text:p>
          </table:table-cell>
          <table:table-cell table:style-name="Таблица22.A1" office:value-type="string">
            <text:p text:style-name="P95" loext:marker-style-name="T84"><text:span text:style-name="T84">200</text:span><text:span text:style-name="T84"/></text:p>
          </table:table-cell>
          <table:table-cell table:style-name="Таблица22.A1" office:value-type="string">
            <text:p text:style-name="P95" loext:marker-style-name="T84"><text:span text:style-name="T84">5,64</text:span><text:span text:style-name="T84"/></text:p>
          </table:table-cell>
          <table:table-cell table:style-name="Таблица22.A1" office:value-type="string">
            <text:p text:style-name="P95" loext:marker-style-name="T84"><text:span text:style-name="T84">1 128</text:span><text:span text:style-name="T84"/></text:p>
          </table:table-cell>
        </table:table-row>
        <table:table-row table:style-name="Таблица22.1">
          <table:table-cell table:style-name="Таблица22.A1" table:number-columns-spanned="4" office:value-type="string">
            <text:p text:style-name="P94" loext:marker-style-name="T18"><text:span text:style-name="T18">Итого</text:span><text:span text:style-name="T18"/></text:p>
          </table:table-cell>
          <table:covered-table-cell/>
          <table:covered-table-cell/>
          <table:covered-table-cell/>
          <table:table-cell table:style-name="Таблица22.A1" office:value-type="string">
            <text:p text:style-name="P94" loext:marker-style-name="T18"><text:span text:style-name="T18">6 091,2</text:span><text:span text:style-name="T18"/></text:p>
          </table:table-cell>
        </table:table-row>
      </table:table>
      <text:h text:style-name="P99" text:outline-level="2"><text:bookmark-start text:name="_Toc232328897"/>6.3 <text:span text:style-name="_5f_Текст_20_Знак">Расчет затрат на разработку системы</text:span><text:bookmark-end text:name="_Toc232328897"/></text:h>
      <text:p text:style-name="ГОСТ_20_Обычный_20_текст">Определение затрат на разработку производится путем составления соответствующей сметы, которая включает следующие статьи:</text:p>
      <text:list text:style-name="WWNum7">
        <text:list-item>
          <text:p text:style-name="P100">затраты на оплату труда;</text:p>
        </text:list-item>
        <text:list-item>
          <text:p text:style-name="P100">отчисления на социальные нужды;</text:p>
        </text:list-item>
        <text:list-item>
          <text:p text:style-name="P100">амортизация основных фондов.</text:p>
        </text:list-item>
      </text:list>
      <text:h text:style-name="Heading_20_2" text:outline-level="2" loext:marker-style-name="T93"><text:bookmark-start text:name="_Toc232328898"/><text:span text:style-name="T93">6.4 </text:span><text:span text:style-name="_5f_Текст_20_Знак">Расчет затрат на оплату труда</text:span><text:bookmark-end text:name="_Toc232328898"/></text:h>
      <text:p text:style-name="ГОСТ_20_Обычный_20_текст"><text:span text:style-name="T35">Общая сумма затрат на оплату труда </text:span><draw:frame draw:style-name="fr2" draw:name="Объект13" text:anchor-type="as-char" svg:width="5.66mm" svg:height="5.34mm" draw:z-index="575"><draw:object xlink:href="./Object 13" xlink:type="simple" xlink:show="embed" xlink:actuate="onLoad"/><draw:image xlink:href="./ObjectReplacements/Object 13" xlink:type="simple" xlink:show="embed" xlink:actuate="onLoad"/></draw:frame><text:s/>определяется по формуле:</text:p>
      <table:table table:name="Таблица23" table:style-name="Таблица23">
        <table:table-column table:style-name="Таблица23.A"/>
        <table:table-column table:style-name="Таблица23.B"/>
        <table:table-column table:style-name="Таблица23.C"/>
        <table:table-row table:style-name="Таблица23.1">
          <table:table-cell table:style-name="Таблица23.A1" office:value-type="string">
            <text:p text:style-name="P78"/>
          </table:table-cell>
          <table:table-cell table:style-name="Таблица23.A1" office:value-type="string">
            <text:p text:style-name="P76"><draw:frame draw:style-name="fr2" draw:name="Объект14" text:anchor-type="as-char" svg:width="52.93mm" svg:height="11.5mm" draw:z-index="581"><draw:object xlink:href="./Object 14" xlink:type="simple" xlink:show="embed" xlink:actuate="onLoad"/><draw:image xlink:href="./ObjectReplacements/Object 14" xlink:type="simple" xlink:show="embed" xlink:actuate="onLoad"/></draw:frame></text:p>
          </table:table-cell>
          <table:table-cell table:style-name="Таблица23.C1" office:value-type="string">
            <text:p text:style-name="P78">(4)</text:p>
          </table:table-cell>
        </table:table-row>
      </table:table>
      <text:p text:style-name="P101" loext:marker-style-name="T93">где <draw:frame draw:style-name="fr2" draw:name="Объект15" text:anchor-type="as-char" svg:width="6.79mm" svg:height="5.34mm" draw:z-index="578"><draw:object xlink:href="./Object 15" xlink:type="simple" xlink:show="embed" xlink:actuate="onLoad"/><draw:image xlink:href="./ObjectReplacements/Object 15" xlink:type="simple" xlink:show="embed" xlink:actuate="onLoad"/></draw:frame><text:span text:style-name="T93"><text:s/></text:span><text:span text:style-name="T60"></text:span><text:span text:style-name="T93"> часовая ставка </text:span><text:span text:style-name="T94">i</text:span><text:span text:style-name="T93">-го работника, руб.;</text:span></text:p>
      <text:p text:style-name="P97" loext:marker-style-name="T85"><draw:frame draw:style-name="fr2" draw:name="Объект16" text:anchor-type="as-char" svg:width="3.62mm" svg:height="5.34mm" draw:z-index="579"><draw:object xlink:href="./Object 16" xlink:type="simple" xlink:show="embed" xlink:actuate="onLoad"/><draw:image xlink:href="./ObjectReplacements/Object 16" xlink:type="simple" xlink:show="embed" xlink:actuate="onLoad"/></draw:frame><text:span text:style-name="T85"><text:s/></text:span><text:span text:style-name="T87"></text:span><text:span text:style-name="T85"> время на разработку системы, ч;</text:span></text:p>
      <text:p text:style-name="P97" loext:marker-style-name="T85"><text:span text:style-name="T88">i</text:span><text:span text:style-name="T85"> </text:span><text:span text:style-name="T87"></text:span><text:span text:style-name="T85"> порядковый номер работника;</text:span></text:p>
      <text:p text:style-name="P97" loext:marker-style-name="T85"><text:soft-page-break/><text:span text:style-name="T88">n</text:span><text:span text:style-name="T85"> </text:span><text:span text:style-name="T89"></text:span><text:span text:style-name="T85"> количество работников.</text:span></text:p>
      <text:p text:style-name="P102" loext:marker-style-name="T85"/>
      <text:p text:style-name="ГОСТ_20_Обычный_20_текст"><text:span text:style-name="T35">Общая сумма затрат на оплату труда </text:span><draw:frame draw:style-name="fr2" draw:name="Объект17" text:anchor-type="as-char" svg:width="5.66mm" svg:height="5.34mm" draw:z-index="580"><draw:object xlink:href="./Object 17" xlink:type="simple" xlink:show="embed" xlink:actuate="onLoad"/><draw:image xlink:href="./ObjectReplacements/Object 17" xlink:type="simple" xlink:show="embed" xlink:actuate="onLoad"/></draw:frame><text:s/>определяется по формуле:</text:p>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78"/>
          </table:table-cell>
          <table:table-cell table:style-name="Таблица24.A1" office:value-type="string">
            <text:p text:style-name="P76"><draw:frame draw:style-name="fr2" draw:name="Объект18" text:anchor-type="as-char" svg:width="21.98mm" svg:height="11.32mm" draw:z-index="585"><draw:object xlink:href="./Object 18" xlink:type="simple" xlink:show="embed" xlink:actuate="onLoad"/><draw:image xlink:href="./ObjectReplacements/Object 18" xlink:type="simple" xlink:show="embed" xlink:actuate="onLoad"/></draw:frame></text:p>
          </table:table-cell>
          <table:table-cell table:style-name="Таблица24.C1" office:value-type="string">
            <text:p text:style-name="P78">(5)</text:p>
          </table:table-cell>
        </table:table-row>
      </table:table>
      <text:p text:style-name="P101" loext:marker-style-name="T93">где <draw:frame draw:style-name="fr2" draw:name="Объект19" text:anchor-type="as-char" svg:width="6.58mm" svg:height="5.34mm" draw:z-index="582"><draw:object xlink:href="./Object 19" xlink:type="simple" xlink:show="embed" xlink:actuate="onLoad"/><draw:image xlink:href="./ObjectReplacements/Object 19" xlink:type="simple" xlink:show="embed" xlink:actuate="onLoad"/></draw:frame><text:span text:style-name="T93"><text:s/></text:span><text:span text:style-name="T60"></text:span><text:span text:style-name="T93"> среднемесячная заработная плата разработчика системы, руб.;</text:span></text:p>
      <text:p text:style-name="P97" loext:marker-style-name="T85"><draw:frame draw:style-name="fr2" draw:name="Объект20" text:anchor-type="as-char" svg:width="9.49mm" svg:height="5.34mm" draw:z-index="583"><draw:object xlink:href="./Object 20" xlink:type="simple" xlink:show="embed" xlink:actuate="onLoad"/><draw:image xlink:href="./ObjectReplacements/Object 20" xlink:type="simple" xlink:show="embed" xlink:actuate="onLoad"/></draw:frame><text:span text:style-name="T85"><text:s/></text:span><text:span text:style-name="T87"></text:span><text:span text:style-name="T85"> среднемесячный фонд рабочего времени.</text:span></text:p>
      <text:p text:style-name="P103" loext:marker-style-name="T85"><text:span text:style-name="T85">Стоимость одного часа программиста равна 300 руб.</text:span><text:span text:style-name="T85"/></text:p>
      <text:p text:style-name="P103" loext:marker-style-name="T85"><text:span text:style-name="T85">Общая сумма затрат на оплату труда равна:</text:span><text:span text:style-name="T85"/></text:p>
      <text:p text:style-name="P103" loext:marker-style-name="T95"><text:span text:style-name="T85">440 ч. </text:span><draw:frame draw:style-name="fr2" draw:name="Объект21" text:anchor-type="as-char" svg:width="35.28mm" svg:height="4.71mm" draw:z-index="584"><draw:object xlink:href="./Object 21" xlink:type="simple" xlink:show="embed" xlink:actuate="onLoad"/><draw:image xlink:href="./ObjectReplacements/Object 21" xlink:type="simple" xlink:show="embed" xlink:actuate="onLoad"/></draw:frame><text:span text:style-name="T95"><text:s/>300 руб. = 132 000 руб.</text:span></text:p>
      <text:h text:style-name="Heading_20_2" text:outline-level="2" loext:marker-style-name="T93"><text:bookmark-start text:name="_Toc232328899"/><text:span text:style-name="T93">6.5 </text:span><text:span text:style-name="_5f_Текст_20_Знак">Расчет отчислений на социальные нужды</text:span><text:bookmark-end text:name="_Toc232328899"/></text:h>
      <text:p text:style-name="ГОСТ_20_Обычный_20_текст" loext:marker-style-name="T35"><text:span text:style-name="T35">Данные об отчислениях на социальные нужды представлены в таблице 6.4.</text:span><text:span text:style-name="T35"/></text:p>
      <text:p text:style-name="Caption" loext:marker-style-name="T13">Таблица 6.4 <text:span text:style-name="T60"></text:span> Отчисления на социальные нужды</text:p>
      <table:table table:name="Таблица25" table:style-name="Таблица25">
        <table:table-column table:style-name="Таблица25.A"/>
        <table:table-column table:style-name="Таблица25.B"/>
        <table:table-column table:style-name="Таблица25.C"/>
        <table:table-column table:style-name="Таблица25.D"/>
        <table:table-row table:style-name="Таблица25.1">
          <table:table-cell table:style-name="Таблица25.A1" office:value-type="string">
            <text:p text:style-name="P94" loext:marker-style-name="T61"><text:span text:style-name="T43">Вид</text:span><text:span text:style-name="T61"/></text:p>
          </table:table-cell>
          <table:table-cell table:style-name="Таблица25.A1" office:value-type="string">
            <text:p text:style-name="P94" loext:marker-style-name="T61"><text:span text:style-name="T43">Начислено заработной платы, руб.</text:span><text:span text:style-name="T61"/></text:p>
          </table:table-cell>
          <table:table-cell table:style-name="Таблица25.A1" office:value-type="string">
            <text:p text:style-name="P94" loext:marker-style-name="T43"><text:span text:style-name="T43">Отчисления %</text:span><text:span text:style-name="T43"/></text:p>
          </table:table-cell>
          <table:table-cell table:style-name="Таблица25.A1" office:value-type="string">
            <text:p text:style-name="P94" loext:marker-style-name="T43"><text:span text:style-name="T43">Сумма, руб.</text:span><text:span text:style-name="T43"/></text:p>
          </table:table-cell>
        </table:table-row>
        <table:table-row table:style-name="Таблица25.1">
          <table:table-cell table:style-name="Таблица25.A1" office:value-type="string">
            <text:p text:style-name="P95" loext:marker-style-name="T84"><text:span text:style-name="T84">Фонд социального страхования РФ</text:span><text:span text:style-name="T84"/></text:p>
          </table:table-cell>
          <table:table-cell table:style-name="Таблица25.A1" table:number-rows-spanned="3" office:value-type="string">
            <text:p text:style-name="P95" loext:marker-style-name="T84"><text:span text:style-name="T84">132 000</text:span><text:span text:style-name="T84"/></text:p>
          </table:table-cell>
          <table:table-cell table:style-name="Таблица25.A1" office:value-type="string">
            <text:p text:style-name="P95" loext:marker-style-name="T84"><text:span text:style-name="T84">2,9</text:span><text:span text:style-name="T84"/></text:p>
          </table:table-cell>
          <table:table-cell table:style-name="Таблица25.A1" office:value-type="string">
            <text:p text:style-name="P95" loext:marker-style-name="T84"><text:span text:style-name="T84">3828</text:span><text:span text:style-name="T84"/></text:p>
          </table:table-cell>
        </table:table-row>
        <table:table-row table:style-name="Таблица25.1">
          <table:table-cell table:style-name="Таблица25.A1" office:value-type="string">
            <text:p text:style-name="P95" loext:marker-style-name="T96"><text:span text:style-name="T43">Фонд обязательного медицинского страхования</text:span><text:span text:style-name="T96"/></text:p>
          </table:table-cell>
          <table:covered-table-cell table:style-name="Таблица25.A1"/>
          <table:table-cell table:style-name="Таблица25.A1" office:value-type="string">
            <text:p text:style-name="P95" loext:marker-style-name="T84"><text:span text:style-name="T84">5,1</text:span><text:span text:style-name="T84"/></text:p>
          </table:table-cell>
          <table:table-cell table:style-name="Таблица25.A1" office:value-type="string">
            <text:p text:style-name="P95" loext:marker-style-name="T84"><text:span text:style-name="T84">6732</text:span><text:span text:style-name="T84"/></text:p>
          </table:table-cell>
        </table:table-row>
        <table:table-row table:style-name="Таблица25.1">
          <table:table-cell table:style-name="Таблица25.A1" office:value-type="string">
            <text:p text:style-name="P95" loext:marker-style-name="T84"><text:span text:style-name="T84">Пенсионный фонд РФ</text:span><text:span text:style-name="T84"/></text:p>
          </table:table-cell>
          <table:covered-table-cell table:style-name="Таблица25.A1"/>
          <table:table-cell table:style-name="Таблица25.A1" office:value-type="string">
            <text:p text:style-name="P95" loext:marker-style-name="T84"><text:span text:style-name="T84">22</text:span><text:span text:style-name="T84"/></text:p>
          </table:table-cell>
          <table:table-cell table:style-name="Таблица25.A1" office:value-type="string">
            <text:p text:style-name="P95" loext:marker-style-name="T84"><text:span text:style-name="T84">29040</text:span><text:span text:style-name="T84"/></text:p>
          </table:table-cell>
        </table:table-row>
        <table:table-row table:style-name="Таблица25.1">
          <table:table-cell table:style-name="Таблица25.A1" table:number-columns-spanned="3" office:value-type="string">
            <text:p text:style-name="P94" loext:marker-style-name="T18"><text:span text:style-name="T18">Итого</text:span><text:span text:style-name="T18"/></text:p>
          </table:table-cell>
          <table:covered-table-cell/>
          <table:covered-table-cell/>
          <table:table-cell table:style-name="Таблица25.A1" office:value-type="string">
            <text:p text:style-name="P94" loext:marker-style-name="T18"><text:span text:style-name="T18">39600</text:span><text:span text:style-name="T18"/></text:p>
          </table:table-cell>
        </table:table-row>
      </table:table>
      <text:h text:style-name="Heading_20_2" text:outline-level="2"/>
      <text:p text:style-name="P104" loext:marker-style-name="T97"/>
      <text:h text:style-name="P46" text:outline-level="2"><text:bookmark-start text:name="_Toc232328900"/>6.6 <text:span text:style-name="_5f_Текст_20_Знак"><text:span text:style-name="T98">Себестоимость проекта</text:span></text:span><text:bookmark-end text:name="_Toc232328900"/></text:h>
      <text:p text:style-name="P103" loext:marker-style-name="T85"><text:span text:style-name="T85">В таблице 6.5 представлен расчет себестоимости проекта.</text:span><text:span text:style-name="T85"/></text:p>
      <text:p text:style-name="Caption" loext:marker-style-name="T13">Таблица 6.5 <text:span text:style-name="T60"></text:span> Себестоимость проекта</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94" loext:marker-style-name="T43"><text:span text:style-name="T43">Статьи затрат</text:span><text:span text:style-name="T43"/></text:p>
          </table:table-cell>
          <table:table-cell table:style-name="Таблица26.A1" office:value-type="string">
            <text:p text:style-name="P94" loext:marker-style-name="T43"><text:span text:style-name="T43">Сумма, руб.</text:span><text:span text:style-name="T43"/></text:p>
          </table:table-cell>
        </table:table-row>
        <table:table-row table:style-name="Таблица26.1">
          <table:table-cell table:style-name="Таблица26.A1" office:value-type="string">
            <text:p text:style-name="P95" loext:marker-style-name="T84"><text:span text:style-name="T84">Затраты на материальные ресурсы</text:span><text:span text:style-name="T84"/></text:p>
          </table:table-cell>
          <table:table-cell table:style-name="Таблица26.A1" office:value-type="string">
            <text:p text:style-name="P95" loext:marker-style-name="T84"><text:span text:style-name="T18">111 188</text:span><text:span text:style-name="T84"/></text:p>
          </table:table-cell>
        </table:table-row>
        <table:table-row table:style-name="Таблица26.1">
          <table:table-cell table:style-name="Таблица26.A1" office:value-type="string">
            <text:p text:style-name="P95" loext:marker-style-name="T84"><text:span text:style-name="T43">Затраты на оплату труда</text:span><text:span text:style-name="T84"/></text:p>
          </table:table-cell>
          <table:table-cell table:style-name="Таблица26.A1" office:value-type="string">
            <text:p text:style-name="P95" loext:marker-style-name="T84"><text:span text:style-name="T95">132 000</text:span><text:span text:style-name="T99"/></text:p>
          </table:table-cell>
        </table:table-row>
        <table:table-row table:style-name="Таблица26.1">
          <table:table-cell table:style-name="Таблица26.A1" office:value-type="string">
            <text:p text:style-name="P95" loext:marker-style-name="T84"><text:span text:style-name="T84">Отчисление на социальные нужды</text:span><text:span text:style-name="T84"/></text:p>
          </table:table-cell>
          <table:table-cell table:style-name="Таблица26.A1" office:value-type="string">
            <text:p text:style-name="P95" loext:marker-style-name="T84"><text:span text:style-name="T18">39 600</text:span><text:span text:style-name="T84"/></text:p>
          </table:table-cell>
        </table:table-row>
        <table:table-row table:style-name="Таблица26.1">
          <table:table-cell table:style-name="Таблица26.A1" office:value-type="string">
            <text:p text:style-name="P94" loext:marker-style-name="T18"><text:span text:style-name="T18">Итого по смете</text:span><text:span text:style-name="T18"/></text:p>
          </table:table-cell>
          <table:table-cell table:style-name="Таблица26.A1" office:value-type="string">
            <text:p text:style-name="P94" loext:marker-style-name="T18"><text:span text:style-name="T18">282 788</text:span><text:span text:style-name="T18"/></text:p>
          </table:table-cell>
        </table:table-row>
      </table:table>
      <text:h text:style-name="Heading_20_2" text:outline-level="2"><text:bookmark-start text:name="_Toc232328901"/>6.7 <text:span text:style-name="_5f_Текст_20_Знак"><text:span text:style-name="T98">Расчет плановой прибыли</text:span></text:span><text:bookmark-end text:name="_Toc232328901"/></text:h>
      <text:p text:style-name="ГОСТ_20_Обычный_20_текст" loext:marker-style-name="T35"><text:span text:style-name="T35">Прибыль П рассчитывается по формуле:</text:span><text:span text:style-name="T35"/></text:p>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office:value-type="string">
            <text:p text:style-name="P78"/>
          </table:table-cell>
          <table:table-cell table:style-name="Таблица27.A1" office:value-type="string">
            <text:p text:style-name="P76"><draw:frame draw:style-name="fr2" draw:name="Объект22" text:anchor-type="as-char" svg:width="21.01mm" svg:height="10.69mm" draw:z-index="592"><draw:object xlink:href="./Object 22" xlink:type="simple" xlink:show="embed" xlink:actuate="onLoad"/><draw:image xlink:href="./ObjectReplacements/Object 22" xlink:type="simple" xlink:show="embed" xlink:actuate="onLoad"/></draw:frame></text:p>
          </table:table-cell>
          <table:table-cell table:style-name="Таблица27.C1" office:value-type="string">
            <text:p text:style-name="P78">(6)</text:p>
          </table:table-cell>
        </table:table-row>
      </table:table>
      <text:p text:style-name="P101">где <draw:frame draw:style-name="fr2" draw:name="Объект23" text:anchor-type="as-char" svg:width="6.79mm" svg:height="5.34mm" draw:z-index="586"><draw:object xlink:href="./Object 23" xlink:type="simple" xlink:show="embed" xlink:actuate="onLoad"/><draw:image xlink:href="./ObjectReplacements/Object 23" xlink:type="simple" xlink:show="embed" xlink:actuate="onLoad"/></draw:frame><text:s/><text:span text:style-name="T60"></text:span> полная себестоимость, руб.;</text:p>
      <text:p text:style-name="P101"><draw:frame draw:style-name="fr2" draw:name="Объект24" text:anchor-type="as-char" svg:width="4.34mm" svg:height="5.34mm" draw:z-index="587"><draw:object xlink:href="./Object 24" xlink:type="simple" xlink:show="embed" xlink:actuate="onLoad"/><draw:image xlink:href="./ObjectReplacements/Object 24" xlink:type="simple" xlink:show="embed" xlink:actuate="onLoad"/></draw:frame><text:s/><text:span text:style-name="T60"></text:span> норма рентабельности.</text:p>
      <text:p text:style-name="ГОСТ_20_Обычный_20_текст" loext:marker-style-name="T35"><text:span text:style-name="T35">При норме рентабльности 50% плановая прибыль составит:</text:span><text:span text:style-name="T35"/></text:p>
      <text:p text:style-name="ГОСТ_20_Обычный_20_текст" loext:marker-style-name="T100"><text:span text:style-name="T93">П = 282 788 </text:span><draw:frame draw:style-name="fr2" draw:name="Объект25" text:anchor-type="as-char" svg:width="35.28mm" svg:height="4.71mm" draw:z-index="588"><draw:object xlink:href="./Object 25" xlink:type="simple" xlink:show="embed" xlink:actuate="onLoad"/><draw:image xlink:href="./ObjectReplacements/Object 25" xlink:type="simple" xlink:show="embed" xlink:actuate="onLoad"/></draw:frame><text:span text:style-name="T100"><text:s/>50 % / 100 % = 141 394 руб.</text:span></text:p>
      <text:p text:style-name="ГОСТ_20_Обычный_20_текст" loext:marker-style-name="T93"><text:span text:style-name="T100">Полная стоимость проекта </text:span><draw:frame draw:style-name="fr2" draw:name="Объект26" text:anchor-type="as-char" svg:width="5.75mm" svg:height="5.34mm" draw:z-index="589"><draw:object xlink:href="./Object 26" xlink:type="simple" xlink:show="embed" xlink:actuate="onLoad"/><draw:image xlink:href="./ObjectReplacements/Object 26" xlink:type="simple" xlink:show="embed" xlink:actuate="onLoad"/></draw:frame><text:span text:style-name="T93"><text:s/>определяется как сумма себестоимости проекта и прибыли:</text:span></text:p>
      <text:p text:style-name="ГОСТ_20_Обычный_20_текст" loext:marker-style-name="T100"><draw:frame draw:style-name="fr2" draw:name="Объект27" text:anchor-type="as-char" svg:width="6.79mm" svg:height="5.34mm" draw:z-index="590"><draw:object xlink:href="./Object 27" xlink:type="simple" xlink:show="embed" xlink:actuate="onLoad"/><draw:image xlink:href="./ObjectReplacements/Object 27" xlink:type="simple" xlink:show="embed" xlink:actuate="onLoad"/></draw:frame><text:s/>= <text:span text:style-name="T93">282 788 + </text:span><text:span text:style-name="T100">141 394 = 424 182 руб.</text:span></text:p>
      <text:p text:style-name="ГОСТ_20_Обычный_20_текст" loext:marker-style-name="T100"><text:span text:style-name="T100">С учетом налога на прибыль 20 % доход составит:</text:span><text:span text:style-name="T100"/></text:p>
      <text:p text:style-name="ГОСТ_20_Обычный_20_текст" loext:marker-style-name="T100"><text:span text:style-name="T100">141 394 </text:span><text:span text:style-name="T60"></text:span><text:span text:style-name="T93"> </text:span><text:span text:style-name="T100">141 394 </text:span><draw:frame draw:style-name="fr2" draw:name="Объект28" text:anchor-type="as-char" svg:width="35.28mm" svg:height="4.71mm" draw:z-index="591"><draw:object xlink:href="./Object 28" xlink:type="simple" xlink:show="embed" xlink:actuate="onLoad"/><draw:image xlink:href="./ObjectReplacements/Object 28" xlink:type="simple" xlink:show="embed" xlink:actuate="onLoad"/></draw:frame><text:span text:style-name="T100"><text:s/>0,2 = 113 116 руб.</text:span></text:p>
      <text:h text:style-name="Heading_20_2" text:outline-level="2" loext:marker-style-name="T93"><text:bookmark-start text:name="_Toc232328902"/><text:span text:style-name="T93">6.8 </text:span><text:span text:style-name="_5f_Текст_20_Знак"><text:span text:style-name="T101">Определение экономической эффективности проекта</text:span></text:span><text:bookmark-end text:name="_Toc232328902"/></text:h>
      <text:p text:style-name="ГОСТ_20_Обычный_20_текст" loext:marker-style-name="T100"><text:span text:style-name="T100">Определение экономической эффективности проекта проводилась по методу расчета экономического эффекта от прибыли по следующей формуле:</text:span><text:span text:style-name="T100"/></text:p>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office:value-type="string">
            <text:p text:style-name="P78"/>
          </table:table-cell>
          <table:table-cell table:style-name="Таблица28.A1" office:value-type="string">
            <text:p text:style-name="P76"><draw:frame draw:style-name="fr2" draw:name="Объект29" text:anchor-type="as-char" svg:width="32.86mm" svg:height="10.67mm" draw:z-index="593"><draw:object xlink:href="./Object 29" xlink:type="simple" xlink:show="embed" xlink:actuate="onLoad"/><draw:image xlink:href="./ObjectReplacements/Object 29" xlink:type="simple" xlink:show="embed" xlink:actuate="onLoad"/></draw:frame><text:soft-page-break/></text:p>
          </table:table-cell>
          <table:table-cell table:style-name="Таблица28.C1" office:value-type="string">
            <text:p text:style-name="P78">(7)</text:p>
          </table:table-cell>
        </table:table-row>
      </table:table>
      <text:p text:style-name="P101">где <draw:frame draw:style-name="fr2" draw:name="Объект30" text:anchor-type="as-char" svg:width="4.34mm" svg:height="5.34mm" draw:z-index="594"><draw:object xlink:href="./Object 30" xlink:type="simple" xlink:show="embed" xlink:actuate="onLoad"/><draw:image xlink:href="./ObjectReplacements/Object 30" xlink:type="simple" xlink:show="embed" xlink:actuate="onLoad"/></draw:frame><text:s/><text:span text:style-name="T60"></text:span> экономический эффект, %;</text:p>
      <text:p text:style-name="P101"><draw:frame draw:style-name="fr2" draw:name="Объект31" text:anchor-type="as-char" svg:width="6.79mm" svg:height="5.34mm" draw:z-index="595"><draw:object xlink:href="./Object 31" xlink:type="simple" xlink:show="embed" xlink:actuate="onLoad"/><draw:image xlink:href="./ObjectReplacements/Object 31" xlink:type="simple" xlink:show="embed" xlink:actuate="onLoad"/></draw:frame><text:s/><text:span text:style-name="T60"></text:span> себестоимость, руб.;</text:p>
      <text:p text:style-name="P101" loext:marker-style-name="T35"><text:span text:style-name="T35">П </text:span><text:span text:style-name="T102"></text:span><text:span text:style-name="T35"> прибыль (за вычетом налога на прибыль), руб.</text:span></text:p>
      <text:p text:style-name="ГОСТ_20_Обычный_20_текст" loext:marker-style-name="T100"><text:span text:style-name="T100">Экономический эффект равен:</text:span><text:span text:style-name="T100"/></text:p>
      <text:p text:style-name="ГОСТ_20_Обычный_20_текст" loext:marker-style-name="T100"><draw:frame draw:style-name="fr2" draw:name="Объект32" text:anchor-type="as-char" svg:width="4.34mm" svg:height="5.34mm" draw:z-index="596"><draw:object xlink:href="./Object 32" xlink:type="simple" xlink:show="embed" xlink:actuate="onLoad"/><draw:image xlink:href="./ObjectReplacements/Object 32" xlink:type="simple" xlink:show="embed" xlink:actuate="onLoad"/></draw:frame><text:span text:style-name="T93"><text:s/>= (</text:span><text:span text:style-name="T100">113 116 / 424 182</text:span><text:span text:style-name="T93">) </text:span><draw:frame draw:style-name="fr2" draw:name="Объект33" text:anchor-type="as-char" svg:width="13.92mm" svg:height="4.71mm" draw:z-index="597"><draw:object xlink:href="./Object 33" xlink:type="simple" xlink:show="embed" xlink:actuate="onLoad"/><draw:image xlink:href="./ObjectReplacements/Object 33" xlink:type="simple" xlink:show="embed" xlink:actuate="onLoad"/></draw:frame><text:span text:style-name="T100"><text:s/>= </text:span><draw:frame draw:style-name="fr2" draw:name="Объект34" text:anchor-type="as-char" svg:width="10.2mm" svg:height="4.71mm" draw:z-index="598"><draw:object xlink:href="./Object 34" xlink:type="simple" xlink:show="embed" xlink:actuate="onLoad"/><draw:image xlink:href="./ObjectReplacements/Object 34" xlink:type="simple" xlink:show="embed" xlink:actuate="onLoad"/></draw:frame></text:p>
      <text:h text:style-name="Heading_20_2" text:outline-level="2" loext:marker-style-name="T93"><text:bookmark-start text:name="_Toc232328903"/><text:span text:style-name="T93">6.9 </text:span><text:span text:style-name="_5f_Текст_20_Знак"><text:span text:style-name="T101">Выводы по технико-экономическому анализу и обоснованию проекта разработки</text:span></text:span><text:bookmark-end text:name="_Toc232328903"/></text:h>
      <text:p text:style-name="ГОСТ_20_Обычный_20_текст" loext:marker-style-name="T35"><text:span text:style-name="T35">В результате проведения технико-экономического анализа проекта были рассчитаны несколько показателей, с помощью которых было получено технико- экономическое обоснование разработки. Себестоимость проекта составила 321 600 руб. Полная стоимость проекта составила 482 400 руб. Доход от внедрения системы - 128 640 руб. Экономический эффект составил 27%.</text:span><text:span text:style-name="T35"/></text:p>
      <text:p text:style-name="ГОСТ_20_Обычный_20_текст" loext:marker-style-name="T35"><text:span text:style-name="T35">Исходя из показателей, разработка системы является эффективной и принесет прибыль.</text:span><text:span text:style-name="T35"/></text:p>
      <text:p text:style-name="P105" loext:marker-style-name="T35"/>
      <text:p text:style-name="P106" loext:marker-style-name="T86"/>
      <text:h text:style-name="P41" text:outline-level="1"><text:bookmark-start text:name="_Toc137554495"/><text:bookmark-start text:name="_Toc232328904"/>ЗАКЛЮЧЕНИЕ<text:bookmark-end text:name="_Toc137554495"/><text:bookmark-end text:name="_Toc232328904"/></text:h>
      <text:p text:style-name="_5f_Текст">В данной выпускной квалификационной работе разработано программное обеспечение для управления камерой и обработки данных в системе инфракрасного мониторинга температуры объекта.</text:p>
      <text:p text:style-name="_5f_Текст">В ходе выполнения работы были проанализированы существующие программные решения для тепловизионного контроля, сформировано техническое задание и определены требования к разрабатываемой системе. Выполнено проектирование информационного обеспечения, разработана структура базы данных для хранения результатов измерений, а также определены форматы входных и выходных данных.</text:p>
      <text:p text:style-name="_5f_Текст">Разработанное программное обеспечение обеспечивает подключение к модулю ESP32-CAM, приём изображений и температурных данных, автоматическое наложение температурной информации на изображения, сохранение результатов измерений в базе данных MySQL, а также экспорт данных в форматы CSV и DOCX. Для реализации системы использованы язык программирования Python, библиотека Tkinter для построения графического интерфейса пользователя и библиотека Pillow для обработки изображений.</text:p>
      <text:p text:style-name="_5f_Текст">В процессе работы были разработаны алгоритмы визуализации температурных данных, сохранения результатов измерений и формирования отчётов. Проведённое тестирование подтвердило корректность работы всех основных функций системы, включая получение данных, отображение тепловой карты, экспорт результатов и создание отчётной документации.</text:p>
      <text:p text:style-name="_5f_Текст">Разработанная система позволяет автоматизировать процесс теплового контроля электронных компонентов, печатных плат и готовых изделий, снизить влияние человеческого фактора при проведении измерений и обеспечить удобное хранение результатов для последующего анализа. Использование открытых технологий и модульной архитектуры обеспечивает возможность дальнейшего <text:soft-page-break/>расширения функциональности и интеграции системы в более крупные комплексы мониторинга и диагностики.</text:p>
      <text:p text:style-name="_5f_Текст">Экономический анализ показал целесообразность разработки и внедрения программного обеспечения. Полученные результаты подтверждают достижение поставленной цели и решение всех задач, сформулированных в выпускной квалификационной работе.</text:p>
      <text:p text:style-name="P106" loext:marker-style-name="T86"/>
      <text:h text:style-name="P41" text:outline-level="1"><text:bookmark-start text:name="_Toc137554496"/><text:bookmark-start text:name="_Toc232328905"/>СПИСОК ИСПОЛЬЗУЕМЫХ ИСТОЧНИКОВ<text:bookmark-end text:name="_Toc137554496"/><text:bookmark-end text:name="_Toc232328905"/></text:h>
      <text:list text:style-name="WWNum6">
        <text:list-item>
          <text:p text:style-name="P107" loext:marker-style-name="T43"><text:span text:style-name="T43">ГОСТ 19.701-90. Единая система программной документации. Схемы алгоритмов, программ, данных и систем. Обозначения условные и правила выполнения. — Введ. 1992-01-01. — Москва : Стандартинформ, 2010. — 26 с.</text:span><text:span text:style-name="T43"/></text:p>
        </text:list-item>
        <text:list-item>
          <text:p text:style-name="P107" loext:marker-style-name="T43"><text:span text:style-name="T43">ГОСТ 34.602-89. Информационная технология. Комплекс стандартов на автоматизированные системы. Техническое задание на создание автоматизированной системы. — Введ. 1990-01-01. — Москва : Стандартинформ, 2009. — 11 с.</text:span><text:span text:style-name="T43"/></text:p>
        </text:list-item>
        <text:list-item>
          <text:p text:style-name="P107" loext:marker-style-name="T61"><text:span text:style-name="T61">Pillow (PIL) Documentation / Python Imaging Library [</text:span><text:span text:style-name="T43">сайт</text:span><text:span text:style-name="T61">]. — URL: </text:span><text:a xlink:type="simple" xlink:href="https://python-pillow.org/" office:target-frame-name="_blank" xlink:show="new" text:style-name="Internet_20_link" text:visited-style-name="Visited_20_Internet_20_Link"><text:span text:style-name="Internet_20_link"><text:span text:style-name="T61">https://python-pillow.org/</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Tkinter Documentation / Python Software Foundation [</text:span><text:span text:style-name="T43">сайт</text:span><text:span text:style-name="T61">]. — URL: </text:span><text:a xlink:type="simple" xlink:href="https://docs.python.org/3/library/tkinter.html" office:target-frame-name="_blank" xlink:show="new" text:style-name="Internet_20_link" text:visited-style-name="Visited_20_Internet_20_Link"><text:span text:style-name="Internet_20_link"><text:span text:style-name="T61">https://docs.python.org/3/library/tkinter.html</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Python CSV Module Documentation / Python Software Foundation [</text:span><text:span text:style-name="T43">сайт</text:span><text:span text:style-name="T61">]. — URL: </text:span><text:a xlink:type="simple" xlink:href="https://docs.python.org/3/library/csv.html" office:target-frame-name="_blank" xlink:show="new" text:style-name="Internet_20_link" text:visited-style-name="Visited_20_Internet_20_Link"><text:span text:style-name="Internet_20_link"><text:span text:style-name="T61">https://docs.python.org/3/library/csv.html</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http.server — HTTP servers / Python Software Foundation [</text:span><text:span text:style-name="T43">сайт</text:span><text:span text:style-name="T61">]. — URL: </text:span><text:a xlink:type="simple" xlink:href="https://docs.python.org/3/library/http.server.html" office:target-frame-name="_blank" xlink:show="new" text:style-name="Internet_20_link" text:visited-style-name="Visited_20_Internet_20_Link"><text:span text:style-name="Internet_20_link"><text:span text:style-name="T61">https://docs.python.org/3/library/http.server.html</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MLX90614 Datasheet / Melexis Microelectronic Systems [</text:span><text:span text:style-name="T43">сайт</text:span><text:span text:style-name="T61">]. — URL: </text:span><text:a xlink:type="simple" xlink:href="https://www.melexis.com/en/documents/documentation/datasheets/datasheet-mlx90614" office:target-frame-name="_blank" xlink:show="new" text:style-name="Internet_20_link" text:visited-style-name="Visited_20_Internet_20_Link"><text:span text:style-name="Internet_20_link"><text:span text:style-name="T61">https://www.melexis.com/en/documents/documentation/datasheets/datasheet-mlx90614</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ESP32-CAM HTTP Post Images/Photos to Server / R. Santos [</text:span><text:span text:style-name="T43">сайт</text:span><text:span text:style-name="T61">]. — URL: </text:span><text:a xlink:type="simple" xlink:href="https://randomnerdtutorials.com/esp32-cam-http-post-image-server/" office:target-frame-name="_blank" xlink:show="new" text:style-name="Internet_20_link" text:visited-style-name="Visited_20_Internet_20_Link"><text:span text:style-name="Internet_20_link"><text:span text:style-name="T61">https://randomnerdtutorials.com/esp32-cam-http-post-image-server/</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61"><text:span text:style-name="T61">Adafruit CircuitPython MLX90614 Library / Adafruit Industries [</text:span><text:span text:style-name="T43">сайт</text:span><text:span text:style-name="T61">]. — URL: </text:span><text:a xlink:type="simple" xlink:href="https://github.com/adafruit/Adafruit_CircuitPython_MLX90614" office:target-frame-name="_blank" xlink:show="new" text:style-name="Internet_20_link" text:visited-style-name="Visited_20_Internet_20_Link"><text:span text:style-name="Internet_20_link"><text:span text:style-name="T61">https://github.com/adafruit/Adafruit_CircuitPython_MLX90614</text:span></text:span></text:a><text:span text:style-name="T61"> (</text:span><text:span text:style-name="T43">дата</text:span><text:span text:style-name="T61"> </text:span><text:span text:style-name="T43">обращения</text:span><text:span text:style-name="T61">: 01.06.2026).</text:span></text:p>
        </text:list-item>
        <text:list-item>
          <text:p text:style-name="P107" loext:marker-style-name="T43"><text:span text:style-name="T103">Оценка трудоемкости разработки программного продукта: метод указания / сост. Шанченко Н.И. – Ульяновск : УлГТУ, 2015. – 21с. </text:span><text:span text:style-name="T103"/></text:p>
        </text:list-item>
        <text:list-item>
          <text:p text:style-name="P107" loext:marker-style-name="T43"><text:soft-page-break/><text:span text:style-name="T43">Обработка изображений на Python с использованием библиотеки Pillow / Skillfactory [сайт]. — URL: </text:span><text:a xlink:type="simple" xlink:href="https://blog.skillfactory.ru/python-pillow/" office:target-frame-name="_blank" xlink:show="new" text:style-name="Internet_20_link" text:visited-style-name="Visited_20_Internet_20_Link"><text:span text:style-name="Internet_20_link"><text:span text:style-name="T43">https://blog.skillfactory.ru/python-pillow/</text:span></text:span></text:a><text:span text:style-name="T43"> (дата обращения: 01.06.2026).</text:span></text:p>
        </text:list-item>
        <text:list-item>
          <text:p text:style-name="P107" loext:marker-style-name="T43"><text:span text:style-name="T43">Библиотека Tkinter в Python / Selectel [сайт]. — URL: </text:span><text:a xlink:type="simple" xlink:href="https://selectel.ru/blog/tutorials/tkinter-python/" office:target-frame-name="_blank" xlink:show="new" text:style-name="Internet_20_link" text:visited-style-name="Visited_20_Internet_20_Link"><text:span text:style-name="Internet_20_link"><text:span text:style-name="T43">https://selectel.ru/blog/tutorials/tkinter-python/</text:span></text:span></text:a><text:span text:style-name="T43"> (дата обращения: 01.06.2026).</text:span></text:p>
        </text:list-item>
        <text:list-item>
          <text:p text:style-name="P107" loext:marker-style-name="T43"><text:span text:style-name="T43">Эффективная обработка CSV-файлов с помощью Python / </text:span><text:a xlink:type="simple" xlink:href="https://tutkit.com/" office:target-frame-name="_blank" xlink:show="new" text:style-name="Internet_20_link" text:visited-style-name="Visited_20_Internet_20_Link"><text:span text:style-name="Internet_20_link"><text:span text:style-name="T43">TutKit.com</text:span></text:span></text:a><text:span text:style-name="T43"> [сайт]. — URL: </text:span><text:a xlink:type="simple" xlink:href="https://www.tutkit.com/" office:target-frame-name="_blank" xlink:show="new" text:style-name="Internet_20_link" text:visited-style-name="Visited_20_Internet_20_Link"><text:span text:style-name="Internet_20_link"><text:span text:style-name="T43">https://www.tutkit.com</text:span></text:span></text:a><text:span text:style-name="T43"> (дата обращения: 01.06.2026).</text:span></text:p>
        </text:list-item>
        <text:list-item>
          <text:p text:style-name="P107" loext:marker-style-name="T43"><text:span text:style-name="T43">Разработка графического интерфейса на Tkinter / Real Python [сайт]. — URL: </text:span><text:a xlink:type="simple" xlink:href="https://realpython.com/python-gui-tkinter/" office:target-frame-name="_blank" xlink:show="new" text:style-name="Internet_20_link" text:visited-style-name="Visited_20_Internet_20_Link"><text:span text:style-name="Internet_20_link"><text:span text:style-name="T43">https://realpython.com/python-gui-tkinter/</text:span></text:span></text:a><text:span text:style-name="T43"> (дата обращения: 01.06.2026).</text:span></text:p>
        </text:list-item>
        <text:list-item>
          <text:p text:style-name="P107" loext:marker-style-name="T43"><text:span text:style-name="T43">Бесконтактный датчик температуры MLX90614 / RobotClass [сайт]. — URL: </text:span><text:a xlink:type="simple" xlink:href="https://robotclass.ru/tutorials/sensor-mlx90614/" office:target-frame-name="_blank" xlink:show="new" text:style-name="Internet_20_link" text:visited-style-name="Visited_20_Internet_20_Link"><text:span text:style-name="Internet_20_link"><text:span text:style-name="T43">https://robotclass.ru/tutorials/sensor-mlx90614/</text:span></text:span></text:a><text:span text:style-name="T43"> (дата обращения: 01.06.2026).</text:span></text:p>
        </text:list-item>
        <text:list-item>
          <text:p text:style-name="P107" loext:marker-style-name="T43"><text:span text:style-name="T43">Работа с CSV-файлами на Python / LabEx [сайт]. — URL: </text:span><text:a xlink:type="simple" xlink:href="https://labex.io/" office:target-frame-name="_blank" xlink:show="new" text:style-name="Internet_20_link" text:visited-style-name="Visited_20_Internet_20_Link"><text:span text:style-name="Internet_20_link"><text:span text:style-name="T43">https://labex.io</text:span></text:span></text:a><text:span text:style-name="T43"> (дата обращения: 01.06.2026).</text:span></text:p>
        </text:list-item>
        <text:list-item>
          <text:p text:style-name="P107" loext:marker-style-name="T43"><text:span text:style-name="T43">Гонсалес, Р. Ц. Цифровая обработка изображений / Р. Ц. Гонсалес, Р. Э. Вудс. — 3-е изд. — Москва : Техносфера, 2012. — 1104 с. — ISBN 978-5-94836-331-8.</text:span><text:span text:style-name="T43"/></text:p>
        </text:list-item>
        <text:list-item>
          <text:p text:style-name="P107" loext:marker-style-name="T43"><text:span text:style-name="T43">Вавилов, В. П. Инфракрасная термография и тепловой контроль / В. П. Вавилов, А. Г. Климов. — Москва : Спектр, 2011. — 380 с. — ISBN 978-5-4442-0069-6.</text:span><text:span text:style-name="T43"/></text:p>
        </text:list-item>
        <text:list-item>
          <text:p text:style-name="P107" loext:marker-style-name="T61"><text:span text:style-name="T43">Свейгарт</text:span><text:span text:style-name="T61">, </text:span><text:span text:style-name="T43">Э</text:span><text:span text:style-name="T61">. Automate the Boring Stuff with Python / </text:span><text:span text:style-name="T43">Э</text:span><text:span text:style-name="T61">. </text:span><text:span text:style-name="T43">Свейгарт</text:span><text:span text:style-name="T61">. — 2nd ed. — San Francisco : No Starch Press, 2019. — 592 p. — ISBN 978-1-59327-992-9.</text:span></text:p>
        </text:list-item>
        <text:list-item>
          <text:p text:style-name="P107" loext:marker-style-name="T43"><text:span text:style-name="T43">Лутц, М. Изучаем Python / М. Лутц. — 5-е изд. — Санкт-Петербург : БХВ-Петербург, 2019. — 1296 с. — ISBN 978-5-9775-3949-4.</text:span><text:span text:style-name="T43"/></text:p>
        </text:list-item>
        <text:list-item>
          <text:p text:style-name="P107" loext:marker-style-name="T43"><text:span text:style-name="T43">MLX90614. Бесконтактный инфракрасный датчик температуры: руководство по применению / Melexis Microelectronic Systems. — Ieper : Melexis, 2021. — 52 p.</text:span><text:span text:style-name="T43"/></text:p>
        </text:list-item>
      </text:list>
      <text:h text:style-name="P108" text:outline-level="1"><text:bookmark-start text:name="_Toc137554497"/><text:bookmark-start text:name="_Toc232328906"/>ПРИЛОЖЕНИЕ А<text:bookmark-end text:name="_Toc137554497"/><text:bookmark-end text:name="_Toc232328906"/></text:h>
      <text:p text:style-name="P109" loext:marker-style-name="T104"><text:span text:style-name="T104">(обязательное)</text:span><text:span text:style-name="T104"/></text:p>
      <text:p text:style-name="P110" loext:marker-style-name="T105"><text:span text:style-name="T105">Исходные тексты программы</text:span><text:span text:style-name="T105"/></text:p>
      <text:p text:style-name="P111" loext:marker-style-name="T106"><text:span text:style-name="T106">main.py</text:span><text:span text:style-name="T106"/></text:p>
      <text:p text:style-name="P112" loext:marker-style-name="T107"><text:span text:style-name="T108">import</text:span><text:span text:style-name="T107"> </text:span><text:span text:style-name="T109">json</text:span></text:p>
      <text:p text:style-name="P112" loext:marker-style-name="T107"><text:span text:style-name="T108">from</text:span><text:span text:style-name="T107"> </text:span><text:span text:style-name="T109">session_selector</text:span><text:span text:style-name="T107"> </text:span><text:span text:style-name="T108">import</text:span><text:span text:style-name="T107"> </text:span><text:span text:style-name="T109">SessionSelector</text:span></text:p>
      <text:p text:style-name="P113" loext:marker-style-name="T107"/>
      <text:p text:style-name="P112" loext:marker-style-name="T107"><text:span text:style-name="T108">with</text:span><text:span text:style-name="T107"> </text:span><text:span text:style-name="T110">open</text:span><text:span text:style-name="T107">(</text:span><text:span text:style-name="T111">"config/settings.json"</text:span><text:span text:style-name="T107">, </text:span><text:span text:style-name="T111">"r"</text:span><text:span text:style-name="T107">, </text:span><text:span text:style-name="T112">encoding</text:span><text:span text:style-name="T113">=</text:span><text:span text:style-name="T111">"utf-8"</text:span><text:span text:style-name="T107">) </text:span><text:span text:style-name="T108">as</text:span><text:span text:style-name="T107"> </text:span><text:span text:style-name="T114">f</text:span><text:span text:style-name="T107">:</text:span></text:p>
      <text:p text:style-name="P112" loext:marker-style-name="T107"><text:span text:style-name="T107">    </text:span><text:span text:style-name="T114">settings</text:span><text:span text:style-name="T107"> </text:span><text:span text:style-name="T113">=</text:span><text:span text:style-name="T107"> </text:span><text:span text:style-name="T109">json</text:span><text:span text:style-name="T107">.</text:span><text:span text:style-name="T110">load</text:span><text:span text:style-name="T107">(</text:span><text:span text:style-name="T114">f</text:span><text:span text:style-name="T107">)</text:span></text:p>
      <text:p text:style-name="P113" loext:marker-style-name="T107"/>
      <text:p text:style-name="P112" loext:marker-style-name="T107"><text:span text:style-name="T108">if</text:span><text:span text:style-name="T107"> </text:span><text:span text:style-name="T114">__name__</text:span><text:span text:style-name="T107"> </text:span><text:span text:style-name="T113">==</text:span><text:span text:style-name="T107"> </text:span><text:span text:style-name="T111">"__main__"</text:span><text:span text:style-name="T107">:</text:span></text:p>
      <text:p text:style-name="P112" loext:marker-style-name="T107"><text:span text:style-name="T107">    </text:span><text:span text:style-name="T109">SessionSelector</text:span><text:span text:style-name="T107">(</text:span><text:span text:style-name="T114">settings</text:span><text:span text:style-name="T107">).</text:span><text:span text:style-name="T110">run</text:span><text:span text:style-name="T107">()</text:span></text:p>
      <text:p text:style-name="P114" loext:marker-style-name="T115"/>
      <text:p text:style-name="P111" loext:marker-style-name="T106"><text:span text:style-name="T106">gui.py</text:span><text:span text:style-name="T106"/></text:p>
      <text:p text:style-name="P112" loext:marker-style-name="T107"><text:span text:style-name="T108">import</text:span><text:span text:style-name="T107"> </text:span><text:span text:style-name="T109">tkinter</text:span><text:span text:style-name="T107"> </text:span><text:span text:style-name="T108">as</text:span><text:span text:style-name="T107"> </text:span><text:span text:style-name="T109">tk</text:span><text:span text:style-name="T107"> </text:span></text:p>
      <text:p text:style-name="P112" loext:marker-style-name="T107"><text:span text:style-name="T108">import</text:span><text:span text:style-name="T107"> </text:span><text:span text:style-name="T109">json</text:span></text:p>
      <text:p text:style-name="P112" loext:marker-style-name="T107"><text:span text:style-name="T108">import</text:span><text:span text:style-name="T107"> </text:span><text:span text:style-name="T109">os</text:span></text:p>
      <text:p text:style-name="P112" loext:marker-style-name="T107"><text:span text:style-name="T108">from</text:span><text:span text:style-name="T107"> </text:span><text:span text:style-name="T109">tkinter</text:span><text:span text:style-name="T107"> </text:span><text:span text:style-name="T108">import</text:span><text:span text:style-name="T107"> </text:span><text:span text:style-name="T109">ttk</text:span><text:span text:style-name="T107">, </text:span><text:span text:style-name="T109">messagebox</text:span></text:p>
      <text:p text:style-name="P112" loext:marker-style-name="T107"><text:span text:style-name="T108">from</text:span><text:span text:style-name="T107"> </text:span><text:span text:style-name="T109">PIL</text:span><text:span text:style-name="T107"> </text:span><text:span text:style-name="T108">import</text:span><text:span text:style-name="T107"> </text:span><text:span text:style-name="T109">ImageTk</text:span><text:span text:style-name="T107">, </text:span><text:span text:style-name="T109">Image</text:span></text:p>
      <text:p text:style-name="P112" loext:marker-style-name="T107"><text:span text:style-name="T108">from</text:span><text:span text:style-name="T107"> </text:span><text:span text:style-name="T109">database</text:span><text:span text:style-name="T107"> </text:span><text:span text:style-name="T108">import</text:span><text:span text:style-name="T107"> </text:span><text:span text:style-name="T109">DatabaseManager</text:span></text:p>
      <text:p text:style-name="P112" loext:marker-style-name="T107"><text:span text:style-name="T108">from</text:span><text:span text:style-name="T107"> </text:span><text:span text:style-name="T109">monitoring</text:span><text:span text:style-name="T107"> </text:span><text:span text:style-name="T108">import</text:span><text:span text:style-name="T107"> </text:span><text:span text:style-name="T109">MonitoringThread</text:span></text:p>
      <text:p text:style-name="P112" loext:marker-style-name="T107"><text:span text:style-name="T108">from</text:span><text:span text:style-name="T107"> </text:span><text:span text:style-name="T109">exporter</text:span><text:span text:style-name="T107"> </text:span><text:span text:style-name="T108">import</text:span><text:span text:style-name="T107"> </text:span><text:span text:style-name="T109">CSVExporter</text:span></text:p>
      <text:p text:style-name="P112" loext:marker-style-name="T107"><text:span text:style-name="T108">from</text:span><text:span text:style-name="T107"> </text:span><text:span text:style-name="T109">report_generator</text:span><text:span text:style-name="T107"> </text:span><text:span text:style-name="T108">import</text:span><text:span text:style-name="T107"> </text:span><text:span text:style-name="T109">ReportGenerator</text:span></text:p>
      <text:p text:style-name="P112" loext:marker-style-name="T107"><text:span text:style-name="T108">from</text:span><text:span text:style-name="T107"> </text:span><text:span text:style-name="T109">esp32_client</text:span><text:span text:style-name="T107"> </text:span><text:span text:style-name="T108">import</text:span><text:span text:style-name="T107"> </text:span><text:span text:style-name="T109">ESP32Client</text:span></text:p>
      <text:p text:style-name="P112" loext:marker-style-name="T107"><text:span text:style-name="T108">from</text:span><text:span text:style-name="T107"> </text:span><text:span text:style-name="T109">datetime</text:span><text:span text:style-name="T107"> </text:span><text:span text:style-name="T108">import</text:span><text:span text:style-name="T107"> </text:span><text:span text:style-name="T109">datetime</text:span></text:p>
      <text:p text:style-name="P113" loext:marker-style-name="T107"/>
      <text:p text:style-name="P112" loext:marker-style-name="T107"><text:span text:style-name="T114">stamp</text:span><text:span text:style-name="T107"> </text:span><text:span text:style-name="T113">=</text:span><text:span text:style-name="T107"> </text:span><text:span text:style-name="T109">datetime</text:span><text:span text:style-name="T107">.</text:span><text:span text:style-name="T110">now</text:span><text:span text:style-name="T107">().</text:span><text:span text:style-name="T110">strftime</text:span><text:span text:style-name="T107">(</text:span><text:span text:style-name="T111">"%Y%m</text:span><text:span text:style-name="T116">%d</text:span><text:span text:style-name="T111">_%H%M%S"</text:span><text:span text:style-name="T107">)</text:span></text:p>
      <text:p text:style-name="P113" loext:marker-style-name="T107"/>
      <text:p text:style-name="P112" loext:marker-style-name="T107"><text:span text:style-name="T116">class</text:span><text:span text:style-name="T107"> </text:span><text:span text:style-name="T109">ThermalMonitorApp</text:span><text:span text:style-name="T107">:</text:span></text:p>
      <text:p text:style-name="P113" loext:marker-style-name="T107"/>
      <text:p text:style-name="P112" loext:marker-style-name="T107"><text:span text:style-name="T107">    </text:span><text:span text:style-name="T116">def</text:span><text:span text:style-name="T107"> </text:span><text:span text:style-name="T117">__init__</text:span><text:span text:style-name="T107">(</text:span><text:span text:style-name="T114">self</text:span><text:span text:style-name="T107">, </text:span><text:span text:style-name="T112">settings</text:span><text:span text:style-name="T107">, </text:span><text:span text:style-name="T112">session_id</text:span><text:span text:style-name="T107">, </text:span><text:span text:style-name="T112">is_new_session</text:span><text:span text:style-name="T113">=</text:span><text:span text:style-name="T118">False</text:span><text:span text:style-name="T107">):</text:span></text:p>
      <text:p text:style-name="P113" loext:marker-style-name="T107"/>
      <text:p text:style-name="P112" loext:marker-style-name="T107"><text:span text:style-name="T107">        </text:span><text:span text:style-name="T114">self</text:span><text:span text:style-name="T107">.</text:span><text:span text:style-name="T114">settings</text:span><text:span text:style-name="T113">=</text:span><text:span text:style-name="T112">settings</text:span></text:p>
      <text:p text:style-name="P112" loext:marker-style-name="T107"><text:span text:style-name="T107">        </text:span><text:span text:style-name="T114">self</text:span><text:span text:style-name="T107">.</text:span><text:span text:style-name="T114">session_id</text:span><text:span text:style-name="T113">=</text:span><text:span text:style-name="T112">session_id</text:span></text:p>
      <text:p text:style-name="P112" loext:marker-style-name="T107"><text:span text:style-name="T107">        </text:span><text:span text:style-name="T114">self</text:span><text:span text:style-name="T107">.</text:span><text:span text:style-name="T114">is_new_session</text:span><text:span text:style-name="T107"> </text:span><text:span text:style-name="T113">=</text:span><text:span text:style-name="T107"> </text:span><text:span text:style-name="T112">is_new_session</text:span></text:p>
      <text:p text:style-name="P113" loext:marker-style-name="T107"/>
      <text:p text:style-name="P112" loext:marker-style-name="T107"><text:span text:style-name="T107">        </text:span><text:span text:style-name="T114">self</text:span><text:span text:style-name="T107">.</text:span><text:span text:style-name="T114">root</text:span><text:span text:style-name="T113">=</text:span><text:span text:style-name="T109">tk</text:span><text:span text:style-name="T107">.</text:span><text:span text:style-name="T109">Tk</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4">title</text:span><text:span text:style-name="T107">(</text:span><text:span text:style-name="T116">f</text:span><text:span text:style-name="T111">"</text:span><text:span text:style-name="T119">Мониторинг</text:span><text:span text:style-name="T111"> - </text:span><text:span text:style-name="T119">Сессия</text:span><text:span text:style-name="T111"> №</text:span><text:span text:style-name="T116">{</text:span><text:span text:style-name="T112">session_id</text:span><text:span text:style-name="T116">}</text:span><text:span text:style-name="T111">"</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4">geometry</text:span><text:span text:style-name="T107">(</text:span><text:span text:style-name="T111">"1200x1000"</text:span><text:span text:style-name="T107">)</text:span></text:p>
      <text:p text:style-name="P112" loext:marker-style-name="T107"><text:span text:style-name="T107">    </text:span><text:span text:style-name="T107"/></text:p>
      <text:p text:style-name="P112" loext:marker-style-name="T107"><text:span text:style-name="T107">        </text:span><text:span text:style-name="T114">self</text:span><text:span text:style-name="T107">.</text:span><text:span text:style-name="T114">db</text:span><text:span text:style-name="T113">=</text:span><text:span text:style-name="T109">DatabaseManager</text:span><text:span text:style-name="T107">(</text:span><text:span text:style-name="T112">settings</text:span><text:span text:style-name="T107">)</text:span></text:p>
      <text:p text:style-name="P113" loext:marker-style-name="T107"/>
      <text:p text:style-name="P112" loext:marker-style-name="T107"><text:span text:style-name="T107">        </text:span><text:span text:style-name="T114">self</text:span><text:span text:style-name="T107">.</text:span><text:span text:style-name="T114">connected</text:span><text:span text:style-name="T107"> </text:span><text:span text:style-name="T113">=</text:span><text:span text:style-name="T107"> </text:span><text:span text:style-name="T118">False</text:span></text:p>
      <text:p text:style-name="P112" loext:marker-style-name="T107"><text:span text:style-name="T107">        </text:span><text:span text:style-name="T114">self</text:span><text:span text:style-name="T107">.</text:span><text:span text:style-name="T114">monitor_thread</text:span><text:span text:style-name="T107"> </text:span><text:span text:style-name="T113">=</text:span><text:span text:style-name="T107"> </text:span><text:span text:style-name="T118">None</text:span></text:p>
      <text:p text:style-name="P113" loext:marker-style-name="T107"/>
      <text:p text:style-name="P112" loext:marker-style-name="T107"><text:span text:style-name="T107">        </text:span><text:span text:style-name="T114">self</text:span><text:span text:style-name="T107">.</text:span><text:span text:style-name="T114">image_label</text:span><text:span text:style-name="T113">=</text:span><text:span text:style-name="T109">tk</text:span><text:span text:style-name="T107">.</text:span><text:span text:style-name="T109">Label</text:span><text:span text:style-name="T107">(</text:span><text:span text:style-name="T114">self</text:span><text:span text:style-name="T107">.</text:span><text:span text:style-name="T114">root</text:span><text:span text:style-name="T107">)</text:span></text:p>
      <text:p text:style-name="P112" loext:marker-style-name="T107"><text:span text:style-name="T107">        </text:span><text:span text:style-name="T114">self</text:span><text:span text:style-name="T107">.</text:span><text:span text:style-name="T114">image_label</text:span><text:span text:style-name="T107">.</text:span><text:span text:style-name="T114">pack</text:span><text:span text:style-name="T107">(</text:span><text:span text:style-name="T112">expand</text:span><text:span text:style-name="T113">=</text:span><text:span text:style-name="T118">True</text:span><text:span text:style-name="T107">)</text:span></text:p>
      <text:p text:style-name="P113" loext:marker-style-name="T107"/>
      <text:p text:style-name="P112" loext:marker-style-name="T107"><text:span text:style-name="T107">        </text:span><text:span text:style-name="T114">self</text:span><text:span text:style-name="T107">.</text:span><text:span text:style-name="T114">info_frame</text:span><text:span text:style-name="T107"> </text:span><text:span text:style-name="T113">=</text:span><text:span text:style-name="T107"> </text:span><text:span text:style-name="T109">ttk</text:span><text:span text:style-name="T107">.</text:span><text:span text:style-name="T109">Frame</text:span><text:span text:style-name="T107">(</text:span><text:span text:style-name="T114">self</text:span><text:span text:style-name="T107">.</text:span><text:span text:style-name="T114">root</text:span><text:span text:style-name="T107">)</text:span></text:p>
      <text:p text:style-name="P112" loext:marker-style-name="T107"><text:span text:style-name="T107">        </text:span><text:span text:style-name="T114">self</text:span><text:span text:style-name="T107">.</text:span><text:span text:style-name="T114">info_frame</text:span><text:span text:style-name="T107">.</text:span><text:span text:style-name="T114">pack</text:span><text:span text:style-name="T107">(</text:span><text:span text:style-name="T112">fill</text:span><text:span text:style-name="T113">=</text:span><text:span text:style-name="T111">"x"</text:span><text:span text:style-name="T107">, </text:span><text:span text:style-name="T112">padx</text:span><text:span text:style-name="T113">=</text:span><text:span text:style-name="T120">10</text:span><text:span text:style-name="T107">, </text:span><text:span text:style-name="T112">pady</text:span><text:span text:style-name="T113">=</text:span><text:span text:style-name="T120">5</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points</text:span><text:span text:style-name="T107"> </text:span><text:span text:style-name="T113">=</text:span><text:span text:style-name="T107"> </text:span><text:span text:style-name="T109">ttk</text:span><text:span text:style-name="T107">.</text:span><text:span text:style-name="T109">Label</text:span><text:span text:style-name="T107">(</text:span><text:span text:style-name="T114">self</text:span><text:span text:style-name="T107">.</text:span><text:span text:style-name="T114">info_frame</text:span><text:span text:style-name="T107">, </text:span><text:span text:style-name="T112">text</text:span><text:span text:style-name="T113">=</text:span><text:span text:style-name="T111">"</text:span><text:span text:style-name="T119">Точек</text:span><text:span text:style-name="T111">: -"</text:span><text:span text:style-name="T107">)</text:span></text:p>
      <text:p text:style-name="P112" loext:marker-style-name="T107"><text:span text:style-name="T107">        </text:span><text:span text:style-name="T114">self</text:span><text:span text:style-name="T107">.</text:span><text:span text:style-name="T114">lbl_points</text:span><text:span text:style-name="T107">.</text:span><text:span text:style-name="T114">pack</text:span><text:span text:style-name="T107">(</text:span><text:span text:style-name="T112">anchor</text:span><text:span text:style-name="T113">=</text:span><text:span text:style-name="T111">"w"</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min</text:span><text:span text:style-name="T107"> </text:span><text:span text:style-name="T113">=</text:span><text:span text:style-name="T107"> </text:span><text:span text:style-name="T109">ttk</text:span><text:span text:style-name="T107">.</text:span><text:span text:style-name="T109">Label</text:span><text:span text:style-name="T107">(</text:span><text:span text:style-name="T114">self</text:span><text:span text:style-name="T107">.</text:span><text:span text:style-name="T114">info_frame</text:span><text:span text:style-name="T107">, </text:span><text:span text:style-name="T112">text</text:span><text:span text:style-name="T113">=</text:span><text:span text:style-name="T111">"</text:span><text:span text:style-name="T119">Мин</text:span><text:span text:style-name="T111">. </text:span><text:span text:style-name="T119">температура</text:span><text:span text:style-name="T111">: -"</text:span><text:span text:style-name="T107">)</text:span></text:p>
      <text:p text:style-name="P112" loext:marker-style-name="T107"><text:span text:style-name="T107">        </text:span><text:span text:style-name="T114">self</text:span><text:span text:style-name="T107">.</text:span><text:span text:style-name="T114">lbl_min</text:span><text:span text:style-name="T107">.</text:span><text:span text:style-name="T114">pack</text:span><text:span text:style-name="T107">(</text:span><text:span text:style-name="T112">anchor</text:span><text:span text:style-name="T113">=</text:span><text:span text:style-name="T111">"w"</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max</text:span><text:span text:style-name="T107"> </text:span><text:span text:style-name="T113">=</text:span><text:span text:style-name="T107"> </text:span><text:span text:style-name="T109">ttk</text:span><text:span text:style-name="T107">.</text:span><text:span text:style-name="T109">Label</text:span><text:span text:style-name="T107">(</text:span><text:span text:style-name="T114">self</text:span><text:span text:style-name="T107">.</text:span><text:span text:style-name="T114">info_frame</text:span><text:span text:style-name="T107">, </text:span><text:span text:style-name="T112">text</text:span><text:span text:style-name="T113">=</text:span><text:span text:style-name="T111">"</text:span><text:span text:style-name="T119">Макс</text:span><text:span text:style-name="T111">. </text:span><text:span text:style-name="T119">температура</text:span><text:span text:style-name="T111">: -"</text:span><text:span text:style-name="T107">)</text:span></text:p>
      <text:p text:style-name="P112" loext:marker-style-name="T107"><text:span text:style-name="T107">        </text:span><text:span text:style-name="T114">self</text:span><text:span text:style-name="T107">.</text:span><text:span text:style-name="T114">lbl_max</text:span><text:span text:style-name="T107">.</text:span><text:span text:style-name="T114">pack</text:span><text:span text:style-name="T107">(</text:span><text:span text:style-name="T112">anchor</text:span><text:span text:style-name="T113">=</text:span><text:span text:style-name="T111">"w"</text:span><text:span text:style-name="T107">)</text:span></text:p>
      <text:p text:style-name="P113" loext:marker-style-name="T107"><text:soft-page-break/></text:p>
      <text:p text:style-name="P112" loext:marker-style-name="T107"><text:span text:style-name="T107">        </text:span><text:span text:style-name="T114">self</text:span><text:span text:style-name="T107">.</text:span><text:span text:style-name="T114">lbl_avg</text:span><text:span text:style-name="T107"> </text:span><text:span text:style-name="T113">=</text:span><text:span text:style-name="T107"> </text:span><text:span text:style-name="T109">ttk</text:span><text:span text:style-name="T107">.</text:span><text:span text:style-name="T109">Label</text:span><text:span text:style-name="T107">(</text:span><text:span text:style-name="T114">self</text:span><text:span text:style-name="T107">.</text:span><text:span text:style-name="T114">info_frame</text:span><text:span text:style-name="T107">, </text:span><text:span text:style-name="T112">text</text:span><text:span text:style-name="T113">=</text:span><text:span text:style-name="T111">"</text:span><text:span text:style-name="T119">Средняя</text:span><text:span text:style-name="T111"> </text:span><text:span text:style-name="T119">температура</text:span><text:span text:style-name="T111">: -"</text:span><text:span text:style-name="T107">)</text:span></text:p>
      <text:p text:style-name="P112" loext:marker-style-name="T107"><text:span text:style-name="T107">        </text:span><text:span text:style-name="T114">self</text:span><text:span text:style-name="T107">.</text:span><text:span text:style-name="T114">lbl_avg</text:span><text:span text:style-name="T107">.</text:span><text:span text:style-name="T114">pack</text:span><text:span text:style-name="T107">(</text:span><text:span text:style-name="T112">anchor</text:span><text:span text:style-name="T113">=</text:span><text:span text:style-name="T111">"w"</text:span><text:span text:style-name="T107">)</text:span></text:p>
      <text:p text:style-name="P113" loext:marker-style-name="T107"/>
      <text:p text:style-name="P112" loext:marker-style-name="T107"><text:span text:style-name="T107">        </text:span><text:span text:style-name="T108">if</text:span><text:span text:style-name="T107"> </text:span><text:span text:style-name="T114">self</text:span><text:span text:style-name="T107">.</text:span><text:span text:style-name="T114">is_new_session</text:span><text:span text:style-name="T107">:</text:span></text:p>
      <text:p text:style-name="P112" loext:marker-style-name="T107"><text:span text:style-name="T107">            </text:span><text:span text:style-name="T114">self</text:span><text:span text:style-name="T107">.</text:span><text:span text:style-name="T114">connect_btn</text:span><text:span text:style-name="T107"> </text:span><text:span text:style-name="T113">=</text:span><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 </text:span><text:span text:style-name="T112">text</text:span><text:span text:style-name="T113">=</text:span><text:span text:style-name="T111">"</text:span><text:span text:style-name="T119">Подключиться</text:span><text:span text:style-name="T111">"</text:span><text:span text:style-name="T107">, </text:span><text:span text:style-name="T112">command</text:span><text:span text:style-name="T113">=</text:span><text:span text:style-name="T114">self</text:span><text:span text:style-name="T107">.</text:span><text:span text:style-name="T110">connect</text:span><text:span text:style-name="T107">)</text:span></text:p>
      <text:p text:style-name="P112" loext:marker-style-name="T107"><text:span text:style-name="T107">            </text:span><text:span text:style-name="T114">self</text:span><text:span text:style-name="T107">.</text:span><text:span text:style-name="T114">connect_btn</text:span><text:span text:style-name="T107">.</text:span><text:span text:style-name="T114">pack</text:span><text:span text:style-name="T107">()</text:span></text:p>
      <text:p text:style-name="P113" loext:marker-style-name="T107"/>
      <text:p text:style-name="P112" loext:marker-style-name="T107"><text:span text:style-name="T107">            </text:span><text:span text:style-name="T114">self</text:span><text:span text:style-name="T107">.</text:span><text:span text:style-name="T114">start_btn</text:span><text:span text:style-name="T107"> </text:span><text:span text:style-name="T113">=</text:span><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 </text:span><text:span text:style-name="T112">text</text:span><text:span text:style-name="T113">=</text:span><text:span text:style-name="T111">"</text:span><text:span text:style-name="T119">Старт</text:span><text:span text:style-name="T111">"</text:span><text:span text:style-name="T107">, </text:span><text:span text:style-name="T112">command</text:span><text:span text:style-name="T113">=</text:span><text:span text:style-name="T114">self</text:span><text:span text:style-name="T107">.</text:span><text:span text:style-name="T110">start_monitoring</text:span><text:span text:style-name="T107">)</text:span></text:p>
      <text:p text:style-name="P112" loext:marker-style-name="T107"><text:span text:style-name="T107">            </text:span><text:span text:style-name="T114">self</text:span><text:span text:style-name="T107">.</text:span><text:span text:style-name="T114">start_btn</text:span><text:span text:style-name="T107">.</text:span><text:span text:style-name="T114">pack</text:span><text:span text:style-name="T107">()</text:span></text:p>
      <text:p text:style-name="P113" loext:marker-style-name="T107"/>
      <text:p text:style-name="P112" loext:marker-style-name="T107"><text:span text:style-name="T107">            </text:span><text:span text:style-name="T114">self</text:span><text:span text:style-name="T107">.</text:span><text:span text:style-name="T114">stop_btn</text:span><text:span text:style-name="T107"> </text:span><text:span text:style-name="T113">=</text:span><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 </text:span><text:span text:style-name="T112">text</text:span><text:span text:style-name="T113">=</text:span><text:span text:style-name="T111">"</text:span><text:span text:style-name="T119">Стоп</text:span><text:span text:style-name="T111">"</text:span><text:span text:style-name="T107">, </text:span><text:span text:style-name="T112">command</text:span><text:span text:style-name="T113">=</text:span><text:span text:style-name="T114">self</text:span><text:span text:style-name="T107">.</text:span><text:span text:style-name="T110">stop_monitoring</text:span><text:span text:style-name="T107">)</text:span></text:p>
      <text:p text:style-name="P112" loext:marker-style-name="T107"><text:span text:style-name="T107">            </text:span><text:span text:style-name="T114">self</text:span><text:span text:style-name="T107">.</text:span><text:span text:style-name="T114">stop_btn</text:span><text:span text:style-name="T107">.</text:span><text:span text:style-name="T114">pack</text:span><text:span text:style-name="T107">()</text:span></text:p>
      <text:p text:style-name="P113" loext:marker-style-name="T107"/>
      <text:p text:style-name="P112" loext:marker-style-name="T107"><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text:span><text:span text:style-name="T112">text</text:span><text:span text:style-name="T113">=</text:span><text:span text:style-name="T111">"CSV"</text:span><text:span text:style-name="T107">,</text:span><text:span text:style-name="T112">command</text:span><text:span text:style-name="T113">=</text:span><text:span text:style-name="T114">self</text:span><text:span text:style-name="T107">.</text:span><text:span text:style-name="T110">export_csv</text:span><text:span text:style-name="T107">).</text:span><text:span text:style-name="T114">pack</text:span><text:span text:style-name="T107">()</text:span></text:p>
      <text:p text:style-name="P112" loext:marker-style-name="T107"><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text:span><text:span text:style-name="T112">text</text:span><text:span text:style-name="T113">=</text:span><text:span text:style-name="T111">"DOCX"</text:span><text:span text:style-name="T107">,</text:span><text:span text:style-name="T112">command</text:span><text:span text:style-name="T113">=</text:span><text:span text:style-name="T114">self</text:span><text:span text:style-name="T107">.</text:span><text:span text:style-name="T110">export_docx</text:span><text:span text:style-name="T107">).</text:span><text:span text:style-name="T114">pack</text:span><text:span text:style-name="T107">()</text:span></text:p>
      <text:p text:style-name="P112" loext:marker-style-name="T107"><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text:span><text:span text:style-name="T112">text</text:span><text:span text:style-name="T113">=</text:span><text:span text:style-name="T111">"</text:span><text:span text:style-name="T119">Назад</text:span><text:span text:style-name="T111">"</text:span><text:span text:style-name="T107">,</text:span><text:span text:style-name="T112">command</text:span><text:span text:style-name="T113">=</text:span><text:span text:style-name="T114">self</text:span><text:span text:style-name="T107">.</text:span><text:span text:style-name="T110">back_to_sessions</text:span><text:span text:style-name="T107">).</text:span><text:span text:style-name="T114">pack</text:span><text:span text:style-name="T107">()</text:span></text:p>
      <text:p text:style-name="P113" loext:marker-style-name="T107"/>
      <text:p text:style-name="P112" loext:marker-style-name="T107"><text:span text:style-name="T107">        </text:span><text:span text:style-name="T108">if</text:span><text:span text:style-name="T107"> </text:span><text:span text:style-name="T121">not</text:span><text:span text:style-name="T107"> </text:span><text:span text:style-name="T114">self</text:span><text:span text:style-name="T107">.</text:span><text:span text:style-name="T114">is_new_session</text:span><text:span text:style-name="T107">:</text:span></text:p>
      <text:p text:style-name="P112" loext:marker-style-name="T107"><text:span text:style-name="T107">            </text:span><text:span text:style-name="T114">self</text:span><text:span text:style-name="T107">.</text:span><text:span text:style-name="T110">load_last_image</text:span><text:span text:style-name="T107">()</text:span></text:p>
      <text:p text:style-name="P115" loext:marker-style-name="T107"/>
      <text:p text:style-name="P112" loext:marker-style-name="T107"><text:span text:style-name="T107">    </text:span><text:span text:style-name="T116">def</text:span><text:span text:style-name="T107"> </text:span><text:span text:style-name="T110">update_monitor</text:span><text:span text:style-name="T107">( </text:span><text:span text:style-name="T114">self</text:span><text:span text:style-name="T107">, </text:span><text:span text:style-name="T112">image</text:span><text:span text:style-name="T107">, </text:span><text:span text:style-name="T112">stats</text:span><text:span text:style-name="T107">, </text:span><text:span text:style-name="T112">ts</text:span><text:span text:style-name="T107">):</text:span></text:p>
      <text:p text:style-name="P113" loext:marker-style-name="T107"/>
      <text:p text:style-name="P112" loext:marker-style-name="T107"><text:span text:style-name="T107">        </text:span><text:span text:style-name="T114">self</text:span><text:span text:style-name="T107">.</text:span><text:span text:style-name="T114">root</text:span><text:span text:style-name="T107">.</text:span><text:span text:style-name="T110">after</text:span><text:span text:style-name="T107">(</text:span><text:span text:style-name="T120">0</text:span><text:span text:style-name="T107">, </text:span><text:span text:style-name="T116">lambda</text:span><text:span text:style-name="T107">: </text:span><text:span text:style-name="T114">self</text:span><text:span text:style-name="T107">.</text:span><text:span text:style-name="T110">_update_ui</text:span><text:span text:style-name="T107">(</text:span><text:span text:style-name="T112">image</text:span><text:span text:style-name="T107">, </text:span><text:span text:style-name="T112">stats</text:span><text:span text:style-name="T107">))</text:span></text:p>
      <text:p text:style-name="P115" loext:marker-style-name="T107"/>
      <text:p text:style-name="P112" loext:marker-style-name="T107"><text:span text:style-name="T107">    </text:span><text:span text:style-name="T116">def</text:span><text:span text:style-name="T107"> </text:span><text:span text:style-name="T110">_u</text:span><text:span text:style-name="T107">(</text:span><text:span text:style-name="T114">self</text:span><text:span text:style-name="T107">,</text:span><text:span text:style-name="T112">image</text:span><text:span text:style-name="T107">):</text:span></text:p>
      <text:p text:style-name="P112" loext:marker-style-name="T107"><text:span text:style-name="T107">        </text:span><text:span text:style-name="T122">#print("GUI </text:span><text:span text:style-name="T123">получил</text:span><text:span text:style-name="T122"> </text:span><text:span text:style-name="T123">изображение</text:span><text:span text:style-name="T122">", image.size)</text:span></text:p>
      <text:p text:style-name="P113" loext:marker-style-name="T107"/>
      <text:p text:style-name="P112" loext:marker-style-name="T107"><text:span text:style-name="T107">        </text:span><text:span text:style-name="T112">image</text:span><text:span text:style-name="T107">.thumbnail((</text:span><text:span text:style-name="T120">900</text:span><text:span text:style-name="T107">,</text:span><text:span text:style-name="T120">600</text:span><text:span text:style-name="T107">))</text:span></text:p>
      <text:p text:style-name="P112" loext:marker-style-name="T107"><text:span text:style-name="T107">        </text:span><text:span text:style-name="T114">p</text:span><text:span text:style-name="T113">=</text:span><text:span text:style-name="T109">ImageTk</text:span><text:span text:style-name="T107">.</text:span><text:span text:style-name="T109">PhotoImage</text:span><text:span text:style-name="T107">(</text:span><text:span text:style-name="T112">image</text:span><text:span text:style-name="T107">)</text:span></text:p>
      <text:p text:style-name="P112" loext:marker-style-name="T107"><text:span text:style-name="T107">        </text:span><text:span text:style-name="T114">self</text:span><text:span text:style-name="T107">.</text:span><text:span text:style-name="T114">current_image</text:span><text:span text:style-name="T113">=</text:span><text:span text:style-name="T114">p</text:span></text:p>
      <text:p text:style-name="P112" loext:marker-style-name="T107"><text:span text:style-name="T107">        </text:span><text:span text:style-name="T114">self</text:span><text:span text:style-name="T107">.</text:span><text:span text:style-name="T114">image_label</text:span><text:span text:style-name="T107">.</text:span><text:span text:style-name="T110">configure</text:span><text:span text:style-name="T107">(</text:span><text:span text:style-name="T112">image</text:span><text:span text:style-name="T113">=</text:span><text:span text:style-name="T114">p</text:span><text:span text:style-name="T107">)</text:span></text:p>
      <text:p text:style-name="P115" loext:marker-style-name="T107"/>
      <text:p text:style-name="P112" loext:marker-style-name="T107"><text:span text:style-name="T107">    </text:span><text:span text:style-name="T116">def</text:span><text:span text:style-name="T107"> </text:span><text:span text:style-name="T110">_update_ui</text:span><text:span text:style-name="T107">(</text:span><text:span text:style-name="T114">self</text:span><text:span text:style-name="T107">, </text:span><text:span text:style-name="T112">image</text:span><text:span text:style-name="T107">, </text:span><text:span text:style-name="T112">stats</text:span><text:span text:style-name="T107">):</text:span></text:p>
      <text:p text:style-name="P113" loext:marker-style-name="T107"/>
      <text:p text:style-name="P112" loext:marker-style-name="T107"><text:span text:style-name="T107">        </text:span><text:span text:style-name="T114">self</text:span><text:span text:style-name="T107">.</text:span><text:span text:style-name="T110">_u</text:span><text:span text:style-name="T107">(</text:span><text:span text:style-name="T112">image</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points</text:span><text:span text:style-name="T107">.</text:span><text:span text:style-name="T110">configure</text:span><text:span text:style-name="T107">( </text:span><text:span text:style-name="T112">text</text:span><text:span text:style-name="T113">=</text:span><text:span text:style-name="T116">f</text:span><text:span text:style-name="T111">"</text:span><text:span text:style-name="T119">Точек</text:span><text:span text:style-name="T111">: </text:span><text:span text:style-name="T116">{</text:span><text:span text:style-name="T112">stats</text:span><text:span text:style-name="T107">[</text:span><text:span text:style-name="T111">'points'</text:span><text:span text:style-name="T107">]</text:span><text:span text:style-name="T116">}</text:span><text:span text:style-name="T111">"</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min</text:span><text:span text:style-name="T107">.</text:span><text:span text:style-name="T110">configure</text:span><text:span text:style-name="T107">(</text:span><text:span text:style-name="T112">text</text:span><text:span text:style-name="T113">=</text:span><text:span text:style-name="T107">(</text:span></text:p>
      <text:p text:style-name="P112" loext:marker-style-name="T107"><text:span text:style-name="T107">                </text:span><text:span text:style-name="T116">f</text:span><text:span text:style-name="T111">"</text:span><text:span text:style-name="T119">Мин</text:span><text:span text:style-name="T111">. </text:span><text:span text:style-name="T119">температура</text:span><text:span text:style-name="T111">: "</text:span></text:p>
      <text:p text:style-name="P112" loext:marker-style-name="T107"><text:span text:style-name="T107">                </text:span><text:span text:style-name="T116">f</text:span><text:span text:style-name="T111">"</text:span><text:span text:style-name="T116">{</text:span><text:span text:style-name="T112">stats</text:span><text:span text:style-name="T107">[</text:span><text:span text:style-name="T111">'tmin'</text:span><text:span text:style-name="T107">]</text:span><text:span text:style-name="T116">:.2f}</text:span><text:span text:style-name="T111"> °C"</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max</text:span><text:span text:style-name="T107">.</text:span><text:span text:style-name="T110">configure</text:span><text:span text:style-name="T107">(</text:span><text:span text:style-name="T112">text</text:span><text:span text:style-name="T113">=</text:span><text:span text:style-name="T107">(</text:span></text:p>
      <text:p text:style-name="P112" loext:marker-style-name="T107"><text:span text:style-name="T107">                </text:span><text:span text:style-name="T116">f</text:span><text:span text:style-name="T111">"</text:span><text:span text:style-name="T119">Макс</text:span><text:span text:style-name="T111">. </text:span><text:span text:style-name="T119">температура</text:span><text:span text:style-name="T111">: "</text:span></text:p>
      <text:p text:style-name="P112" loext:marker-style-name="T107"><text:span text:style-name="T107">                </text:span><text:span text:style-name="T116">f</text:span><text:span text:style-name="T111">"</text:span><text:span text:style-name="T116">{</text:span><text:span text:style-name="T112">stats</text:span><text:span text:style-name="T107">[</text:span><text:span text:style-name="T111">'tmax'</text:span><text:span text:style-name="T107">]</text:span><text:span text:style-name="T116">:.2f}</text:span><text:span text:style-name="T111"> °C"</text:span><text:span text:style-name="T107">))</text:span></text:p>
      <text:p text:style-name="P113" loext:marker-style-name="T107"/>
      <text:p text:style-name="P112" loext:marker-style-name="T107"><text:span text:style-name="T107">        </text:span><text:span text:style-name="T114">self</text:span><text:span text:style-name="T107">.</text:span><text:span text:style-name="T114">lbl_avg</text:span><text:span text:style-name="T107">.</text:span><text:span text:style-name="T110">configure</text:span><text:span text:style-name="T107">(</text:span><text:span text:style-name="T112">text</text:span><text:span text:style-name="T113">=</text:span><text:span text:style-name="T107">(</text:span></text:p>
      <text:p text:style-name="P112" loext:marker-style-name="T124"><text:span text:style-name="T107">                </text:span><text:span text:style-name="T125">f</text:span><text:span text:style-name="T119">"Средняя температура: "</text:span></text:p>
      <text:p text:style-name="P112" loext:marker-style-name="T124"><text:span text:style-name="T124">                </text:span><text:span text:style-name="T125">f</text:span><text:span text:style-name="T119">"</text:span><text:span text:style-name="T125">{</text:span><text:span text:style-name="T126">stats</text:span><text:span text:style-name="T124">[</text:span><text:span text:style-name="T119">'tavg'</text:span><text:span text:style-name="T124">]</text:span><text:span text:style-name="T125">:.2f}</text:span><text:span text:style-name="T119"> °C"</text:span><text:span text:style-name="T124">))</text:span></text:p>
      <text:p text:style-name="P116" loext:marker-style-name="T124"/>
      <text:p text:style-name="P112" loext:marker-style-name="T107"><text:span text:style-name="T124">    </text:span><text:span text:style-name="T116">def</text:span><text:span text:style-name="T107"> </text:span><text:span text:style-name="T110">load_last_image</text:span><text:span text:style-name="T107">(</text:span><text:span text:style-name="T114">self</text:span><text:span text:style-name="T107">):</text:span></text:p>
      <text:p text:style-name="P113" loext:marker-style-name="T107"/>
      <text:p text:style-name="P112" loext:marker-style-name="T107"><text:span text:style-name="T107">        </text:span><text:span text:style-name="T114">path</text:span><text:span text:style-name="T107"> </text:span><text:span text:style-name="T113">=</text:span><text:span text:style-name="T107"> </text:span><text:span text:style-name="T114">self</text:span><text:span text:style-name="T107">.</text:span><text:span text:style-name="T114">db</text:span><text:span text:style-name="T107">.</text:span><text:span text:style-name="T110">get_last_image</text:span><text:span text:style-name="T107">(</text:span><text:span text:style-name="T114">self</text:span><text:span text:style-name="T107">.</text:span><text:span text:style-name="T114">session_id</text:span><text:span text:style-name="T107">)</text:span></text:p>
      <text:p text:style-name="P113" loext:marker-style-name="T107"/>
      <text:p text:style-name="P112" loext:marker-style-name="T107"><text:span text:style-name="T107">        </text:span><text:span text:style-name="T108">if</text:span><text:span text:style-name="T107"> </text:span><text:span text:style-name="T121">not</text:span><text:span text:style-name="T107"> </text:span><text:span text:style-name="T114">path</text:span><text:span text:style-name="T107">:</text:span></text:p>
      <text:p text:style-name="P112" loext:marker-style-name="T107"><text:span text:style-name="T107">            </text:span><text:span text:style-name="T108">return</text:span></text:p>
      <text:p text:style-name="P112" loext:marker-style-name="T107"><text:span text:style-name="T107">        </text:span><text:span text:style-name="T107"/></text:p>
      <text:p text:style-name="P112" loext:marker-style-name="T107"><text:span text:style-name="T107">        </text:span><text:span text:style-name="T108">try</text:span><text:span text:style-name="T107">:</text:span></text:p>
      <text:p text:style-name="P112" loext:marker-style-name="T107"><text:span text:style-name="T107">            </text:span><text:span text:style-name="T114">image</text:span><text:span text:style-name="T107"> </text:span><text:span text:style-name="T113">=</text:span><text:span text:style-name="T107"> </text:span><text:span text:style-name="T109">Image</text:span><text:span text:style-name="T107">.</text:span><text:span text:style-name="T110">open</text:span><text:span text:style-name="T107">(</text:span><text:span text:style-name="T114">path</text:span><text:span text:style-name="T107">)</text:span></text:p>
      <text:p text:style-name="P112" loext:marker-style-name="T107"><text:span text:style-name="T107">            </text:span><text:span text:style-name="T114">self</text:span><text:span text:style-name="T107">.</text:span><text:span text:style-name="T110">_u</text:span><text:span text:style-name="T107">(</text:span><text:span text:style-name="T114">image</text:span><text:span text:style-name="T107">)</text:span></text:p>
      <text:p text:style-name="P113" loext:marker-style-name="T107"><text:soft-page-break/></text:p>
      <text:p text:style-name="P112" loext:marker-style-name="T107"><text:span text:style-name="T107">        </text:span><text:span text:style-name="T108">except</text:span><text:span text:style-name="T107"> </text:span><text:span text:style-name="T109">Exception</text:span><text:span text:style-name="T107"> </text:span><text:span text:style-name="T108">as</text:span><text:span text:style-name="T107"> </text:span><text:span text:style-name="T114">e</text:span><text:span text:style-name="T107">:</text:span></text:p>
      <text:p text:style-name="P112" loext:marker-style-name="T107"><text:span text:style-name="T107">            </text:span><text:span text:style-name="T110">print</text:span><text:span text:style-name="T107">(</text:span><text:span text:style-name="T116">f</text:span><text:span text:style-name="T111">"</text:span><text:span text:style-name="T119">Ошибка</text:span><text:span text:style-name="T111"> </text:span><text:span text:style-name="T119">загрузки</text:span><text:span text:style-name="T111"> </text:span><text:span text:style-name="T119">изображения</text:span><text:span text:style-name="T111">: </text:span><text:span text:style-name="T116">{</text:span><text:span text:style-name="T114">e</text:span><text:span text:style-name="T116">}</text:span><text:span text:style-name="T111">"</text:span><text:span text:style-name="T107">)</text:span></text:p>
      <text:p text:style-name="P115" loext:marker-style-name="T107"/>
      <text:p text:style-name="P112" loext:marker-style-name="T107"><text:span text:style-name="T107">    </text:span><text:span text:style-name="T116">def</text:span><text:span text:style-name="T107"> </text:span><text:span text:style-name="T110">connect</text:span><text:span text:style-name="T107">(</text:span><text:span text:style-name="T114">self</text:span><text:span text:style-name="T107">):</text:span></text:p>
      <text:p text:style-name="P112" loext:marker-style-name="T107"><text:span text:style-name="T107">        </text:span><text:span text:style-name="T108">try</text:span><text:span text:style-name="T107">:</text:span></text:p>
      <text:p text:style-name="P112" loext:marker-style-name="T107"><text:span text:style-name="T107">            </text:span><text:span text:style-name="T114">client</text:span><text:span text:style-name="T107"> </text:span><text:span text:style-name="T113">=</text:span><text:span text:style-name="T107"> </text:span><text:span text:style-name="T109">ESP32Client</text:span><text:span text:style-name="T107">(</text:span><text:span text:style-name="T114">self</text:span><text:span text:style-name="T107">.</text:span><text:span text:style-name="T114">settings</text:span><text:span text:style-name="T107">[</text:span><text:span text:style-name="T111">"esp32_ip"</text:span><text:span text:style-name="T107">])</text:span></text:p>
      <text:p text:style-name="P113" loext:marker-style-name="T107"/>
      <text:p text:style-name="P112" loext:marker-style-name="T107"><text:span text:style-name="T107">            </text:span><text:span text:style-name="T114">client</text:span><text:span text:style-name="T107">.</text:span><text:span text:style-name="T110">get_frame</text:span><text:span text:style-name="T107">()</text:span></text:p>
      <text:p text:style-name="P112" loext:marker-style-name="T107"><text:span text:style-name="T107">            </text:span><text:span text:style-name="T114">self</text:span><text:span text:style-name="T107">.</text:span><text:span text:style-name="T114">connected</text:span><text:span text:style-name="T107"> </text:span><text:span text:style-name="T113">=</text:span><text:span text:style-name="T107"> </text:span><text:span text:style-name="T118">True</text:span></text:p>
      <text:p text:style-name="P112" loext:marker-style-name="T107"><text:span text:style-name="T107">            </text:span><text:span text:style-name="T110">print</text:span><text:span text:style-name="T107">(</text:span><text:span text:style-name="T111">"ESP32 </text:span><text:span text:style-name="T119">подключена</text:span><text:span text:style-name="T111">"</text:span><text:span text:style-name="T107">)</text:span></text:p>
      <text:p text:style-name="P113" loext:marker-style-name="T107"/>
      <text:p text:style-name="P112" loext:marker-style-name="T107"><text:span text:style-name="T107">        </text:span><text:span text:style-name="T108">except</text:span><text:span text:style-name="T107"> </text:span><text:span text:style-name="T109">Exception</text:span><text:span text:style-name="T107"> </text:span><text:span text:style-name="T108">as</text:span><text:span text:style-name="T107"> </text:span><text:span text:style-name="T114">e</text:span><text:span text:style-name="T107">:</text:span></text:p>
      <text:p text:style-name="P112" loext:marker-style-name="T107"><text:span text:style-name="T107">            </text:span><text:span text:style-name="T114">self</text:span><text:span text:style-name="T107">.</text:span><text:span text:style-name="T114">connected</text:span><text:span text:style-name="T107"> </text:span><text:span text:style-name="T113">=</text:span><text:span text:style-name="T107"> </text:span><text:span text:style-name="T118">False</text:span></text:p>
      <text:p text:style-name="P112" loext:marker-style-name="T107"><text:span text:style-name="T107">            </text:span><text:span text:style-name="T110">print</text:span><text:span text:style-name="T107">(</text:span><text:span text:style-name="T111">"</text:span><text:span text:style-name="T119">Ошибка</text:span><text:span text:style-name="T111"> </text:span><text:span text:style-name="T119">подключения</text:span><text:span text:style-name="T111">:"</text:span><text:span text:style-name="T107">,</text:span><text:span text:style-name="T114">e</text:span><text:span text:style-name="T107">)</text:span></text:p>
      <text:p text:style-name="P113" loext:marker-style-name="T107"/>
      <text:p text:style-name="P112" loext:marker-style-name="T107"><text:span text:style-name="T107">    </text:span><text:span text:style-name="T107"/></text:p>
      <text:p text:style-name="P112" loext:marker-style-name="T107"><text:span text:style-name="T107">    </text:span><text:span text:style-name="T116">def</text:span><text:span text:style-name="T107"> </text:span><text:span text:style-name="T110">start_monitoring</text:span><text:span text:style-name="T107">(</text:span><text:span text:style-name="T114">self</text:span><text:span text:style-name="T107">):</text:span></text:p>
      <text:p text:style-name="P113" loext:marker-style-name="T107"/>
      <text:p text:style-name="P112" loext:marker-style-name="T107"><text:span text:style-name="T107">        </text:span><text:span text:style-name="T108">if</text:span><text:span text:style-name="T107"> </text:span><text:span text:style-name="T121">not</text:span><text:span text:style-name="T107"> </text:span><text:span text:style-name="T114">self</text:span><text:span text:style-name="T107">.</text:span><text:span text:style-name="T114">connected</text:span><text:span text:style-name="T107">:</text:span></text:p>
      <text:p text:style-name="P112" loext:marker-style-name="T107"><text:span text:style-name="T107">            </text:span><text:span text:style-name="T110">print</text:span><text:span text:style-name="T107">(</text:span><text:span text:style-name="T111">"</text:span><text:span text:style-name="T119">Сначала</text:span><text:span text:style-name="T111"> </text:span><text:span text:style-name="T119">выполните</text:span><text:span text:style-name="T111"> </text:span><text:span text:style-name="T119">подключение</text:span><text:span text:style-name="T111">"</text:span><text:span text:style-name="T107">)</text:span></text:p>
      <text:p text:style-name="P112" loext:marker-style-name="T107"><text:span text:style-name="T107">            </text:span><text:span text:style-name="T108">return</text:span></text:p>
      <text:p text:style-name="P113" loext:marker-style-name="T107"/>
      <text:p text:style-name="P112" loext:marker-style-name="T107"><text:span text:style-name="T107">        </text:span><text:span text:style-name="T108">if</text:span><text:span text:style-name="T107"> (</text:span><text:span text:style-name="T114">self</text:span><text:span text:style-name="T107">.</text:span><text:span text:style-name="T114">monitor_thread</text:span><text:span text:style-name="T107"> </text:span><text:span text:style-name="T121">and</text:span><text:span text:style-name="T107"> </text:span><text:span text:style-name="T114">self</text:span><text:span text:style-name="T107">.</text:span><text:span text:style-name="T114">monitor_thread</text:span><text:span text:style-name="T107">.</text:span><text:span text:style-name="T110">is_alive</text:span><text:span text:style-name="T107">()):</text:span></text:p>
      <text:p text:style-name="P112" loext:marker-style-name="T107"><text:span text:style-name="T107">            </text:span><text:span text:style-name="T108">return</text:span></text:p>
      <text:p text:style-name="P113" loext:marker-style-name="T107"/>
      <text:p text:style-name="P112" loext:marker-style-name="T107"><text:span text:style-name="T107">        </text:span><text:span text:style-name="T114">self</text:span><text:span text:style-name="T107">.</text:span><text:span text:style-name="T114">monitor_thread</text:span><text:span text:style-name="T107"> </text:span><text:span text:style-name="T113">=</text:span><text:span text:style-name="T107"> </text:span><text:span text:style-name="T109">MonitoringThread</text:span><text:span text:style-name="T107">(</text:span><text:span text:style-name="T114">self</text:span><text:span text:style-name="T107">.</text:span><text:span text:style-name="T114">session_id</text:span><text:span text:style-name="T107">, </text:span><text:span text:style-name="T114">self</text:span><text:span text:style-name="T107">.</text:span><text:span text:style-name="T114">settings</text:span><text:span text:style-name="T107">[</text:span><text:span text:style-name="T111">"esp32_ip"</text:span><text:span text:style-name="T107">], </text:span><text:span text:style-name="T114">self</text:span><text:span text:style-name="T107">.</text:span><text:span text:style-name="T114">db</text:span><text:span text:style-name="T107">, </text:span><text:span text:style-name="T114">self</text:span><text:span text:style-name="T107">.</text:span><text:span text:style-name="T110">update_monitor</text:span><text:span text:style-name="T107">)</text:span></text:p>
      <text:p text:style-name="P113" loext:marker-style-name="T107"/>
      <text:p text:style-name="P112" loext:marker-style-name="T107"><text:span text:style-name="T107">        </text:span><text:span text:style-name="T114">self</text:span><text:span text:style-name="T107">.</text:span><text:span text:style-name="T114">monitor_thread</text:span><text:span text:style-name="T107">.</text:span><text:span text:style-name="T110">start</text:span><text:span text:style-name="T107">()</text:span></text:p>
      <text:p text:style-name="P115" loext:marker-style-name="T107"/>
      <text:p text:style-name="P112" loext:marker-style-name="T107"><text:span text:style-name="T107">    </text:span><text:span text:style-name="T116">def</text:span><text:span text:style-name="T107"> </text:span><text:span text:style-name="T110">stop_monitoring</text:span><text:span text:style-name="T107">(</text:span><text:span text:style-name="T114">self</text:span><text:span text:style-name="T107">):</text:span></text:p>
      <text:p text:style-name="P113" loext:marker-style-name="T107"/>
      <text:p text:style-name="P112" loext:marker-style-name="T107"><text:span text:style-name="T107">        </text:span><text:span text:style-name="T108">if</text:span><text:span text:style-name="T107"> </text:span><text:span text:style-name="T114">self</text:span><text:span text:style-name="T107">.</text:span><text:span text:style-name="T114">monitor_thread</text:span><text:span text:style-name="T107">:</text:span></text:p>
      <text:p text:style-name="P113" loext:marker-style-name="T107"/>
      <text:p text:style-name="P112" loext:marker-style-name="T107"><text:span text:style-name="T107">            </text:span><text:span text:style-name="T114">self</text:span><text:span text:style-name="T107">.</text:span><text:span text:style-name="T114">monitor_thread</text:span><text:span text:style-name="T107">.</text:span><text:span text:style-name="T110">stop</text:span><text:span text:style-name="T107">()</text:span></text:p>
      <text:p text:style-name="P112" loext:marker-style-name="T107"><text:span text:style-name="T107">            </text:span><text:span text:style-name="T114">self</text:span><text:span text:style-name="T107">.</text:span><text:span text:style-name="T114">monitor_thread</text:span><text:span text:style-name="T107"> </text:span><text:span text:style-name="T113">=</text:span><text:span text:style-name="T107"> </text:span><text:span text:style-name="T118">None</text:span></text:p>
      <text:p text:style-name="P115" loext:marker-style-name="T107"/>
      <text:p text:style-name="P112" loext:marker-style-name="T107"><text:span text:style-name="T107">    </text:span><text:span text:style-name="T116">def</text:span><text:span text:style-name="T107"> </text:span><text:span text:style-name="T110">export_csv</text:span><text:span text:style-name="T107">(</text:span><text:span text:style-name="T114">self</text:span><text:span text:style-name="T107">):</text:span></text:p>
      <text:p text:style-name="P112" loext:marker-style-name="T107"><text:span text:style-name="T107">        </text:span><text:span text:style-name="T109">os</text:span><text:span text:style-name="T107">.</text:span><text:span text:style-name="T110">makedirs</text:span><text:span text:style-name="T107">(</text:span><text:span text:style-name="T111">"exports"</text:span><text:span text:style-name="T107">, </text:span><text:span text:style-name="T112">exist_ok</text:span><text:span text:style-name="T113">=</text:span><text:span text:style-name="T118">True</text:span><text:span text:style-name="T107">)</text:span></text:p>
      <text:p text:style-name="P112" loext:marker-style-name="T107"><text:span text:style-name="T107">        </text:span><text:span text:style-name="T114">filename</text:span><text:span text:style-name="T107"> </text:span><text:span text:style-name="T113">=</text:span><text:span text:style-name="T107"> (</text:span><text:span text:style-name="T116">f</text:span><text:span text:style-name="T111">"exports/"</text:span><text:span text:style-name="T116">f</text:span><text:span text:style-name="T111">"session_</text:span><text:span text:style-name="T116">{</text:span><text:span text:style-name="T114">self</text:span><text:span text:style-name="T107">.</text:span><text:span text:style-name="T114">session_id</text:span><text:span text:style-name="T116">}</text:span><text:span text:style-name="T111">_</text:span><text:span text:style-name="T116">{</text:span><text:span text:style-name="T114">stamp</text:span><text:span text:style-name="T116">}</text:span><text:span text:style-name="T111">.csv"</text:span><text:span text:style-name="T107">)</text:span></text:p>
      <text:p text:style-name="P113" loext:marker-style-name="T107"/>
      <text:p text:style-name="P112" loext:marker-style-name="T107"><text:span text:style-name="T107">        </text:span><text:span text:style-name="T109">CSVExporter</text:span><text:span text:style-name="T107">.</text:span><text:span text:style-name="T110">export</text:span><text:span text:style-name="T107">(</text:span><text:span text:style-name="T114">self</text:span><text:span text:style-name="T107">.</text:span><text:span text:style-name="T114">db</text:span><text:span text:style-name="T107">.</text:span><text:span text:style-name="T110">get_session_points</text:span><text:span text:style-name="T107">(</text:span><text:span text:style-name="T114">self</text:span><text:span text:style-name="T107">.</text:span><text:span text:style-name="T114">session_id</text:span><text:span text:style-name="T107">), </text:span><text:span text:style-name="T114">filename</text:span><text:span text:style-name="T107">)</text:span></text:p>
      <text:p text:style-name="P113" loext:marker-style-name="T107"/>
      <text:p text:style-name="P112" loext:marker-style-name="T107"><text:span text:style-name="T107">        </text:span><text:span text:style-name="T109">messagebox</text:span><text:span text:style-name="T107">.</text:span><text:span text:style-name="T110">showinfo</text:span><text:span text:style-name="T107">(</text:span><text:span text:style-name="T112">title</text:span><text:span text:style-name="T113">=</text:span><text:span text:style-name="T111">"</text:span><text:span text:style-name="T119">Успешно</text:span><text:span text:style-name="T111">"</text:span><text:span text:style-name="T107">, </text:span><text:span text:style-name="T112">message</text:span><text:span text:style-name="T113">=</text:span><text:span text:style-name="T116">f</text:span><text:span text:style-name="T111">"csv </text:span><text:span text:style-name="T119">файл</text:span><text:span text:style-name="T111"> </text:span><text:span text:style-name="T119">сохранён</text:span><text:span text:style-name="T111"> </text:span><text:span text:style-name="T119">в</text:span><text:span text:style-name="T111"> exports </text:span><text:span text:style-name="T119">под</text:span><text:span text:style-name="T111"> </text:span><text:span text:style-name="T119">названием</text:span><text:span text:style-name="T111"> session_</text:span><text:span text:style-name="T116">{</text:span><text:span text:style-name="T114">self</text:span><text:span text:style-name="T107">.</text:span><text:span text:style-name="T114">session_id</text:span><text:span text:style-name="T116">}</text:span><text:span text:style-name="T111">_</text:span><text:span text:style-name="T116">{</text:span><text:span text:style-name="T114">stamp</text:span><text:span text:style-name="T116">}</text:span><text:span text:style-name="T111">.csv"</text:span><text:span text:style-name="T107">)</text:span></text:p>
      <text:p text:style-name="P113" loext:marker-style-name="T107"/>
      <text:p text:style-name="P112" loext:marker-style-name="T107"><text:span text:style-name="T107">    </text:span><text:span text:style-name="T116">def</text:span><text:span text:style-name="T107"> </text:span><text:span text:style-name="T110">export_docx</text:span><text:span text:style-name="T107">(</text:span><text:span text:style-name="T114">self</text:span><text:span text:style-name="T107">):</text:span></text:p>
      <text:p text:style-name="P112" loext:marker-style-name="T107"><text:span text:style-name="T107">        </text:span><text:span text:style-name="T109">os</text:span><text:span text:style-name="T107">.</text:span><text:span text:style-name="T110">makedirs</text:span><text:span text:style-name="T107">(</text:span><text:span text:style-name="T111">"reports"</text:span><text:span text:style-name="T107">, </text:span><text:span text:style-name="T112">exist_ok</text:span><text:span text:style-name="T113">=</text:span><text:span text:style-name="T118">True</text:span><text:span text:style-name="T107">)</text:span></text:p>
      <text:p text:style-name="P112" loext:marker-style-name="T107"><text:span text:style-name="T107">        </text:span><text:span text:style-name="T114">filename</text:span><text:span text:style-name="T107"> </text:span><text:span text:style-name="T113">=</text:span><text:span text:style-name="T107"> (</text:span><text:span text:style-name="T116">f</text:span><text:span text:style-name="T111">"reports/"</text:span><text:span text:style-name="T116">f</text:span><text:span text:style-name="T111">"session_</text:span><text:span text:style-name="T116">{</text:span><text:span text:style-name="T114">self</text:span><text:span text:style-name="T107">.</text:span><text:span text:style-name="T114">session_id</text:span><text:span text:style-name="T116">}</text:span><text:span text:style-name="T111">_</text:span><text:span text:style-name="T116">{</text:span><text:span text:style-name="T114">stamp</text:span><text:span text:style-name="T116">}</text:span><text:span text:style-name="T111">.docx"</text:span><text:span text:style-name="T107">)</text:span></text:p>
      <text:p text:style-name="P113" loext:marker-style-name="T107"/>
      <text:p text:style-name="P112" loext:marker-style-name="T107"><text:span text:style-name="T107">        </text:span><text:span text:style-name="T109">ReportGenerator</text:span><text:span text:style-name="T107">.</text:span><text:span text:style-name="T110">generate</text:span><text:span text:style-name="T107">(</text:span><text:span text:style-name="T114">filename</text:span><text:span text:style-name="T107">, </text:span><text:span text:style-name="T114">self</text:span><text:span text:style-name="T107">.</text:span><text:span text:style-name="T114">session_id</text:span><text:span text:style-name="T107">,</text:span></text:p>
      <text:p text:style-name="P112" loext:marker-style-name="T107"><text:span text:style-name="T107">            </text:span><text:span text:style-name="T114">self</text:span><text:span text:style-name="T107">.</text:span><text:span text:style-name="T114">db</text:span><text:span text:style-name="T107">.</text:span><text:span text:style-name="T110">get_measurements</text:span><text:span text:style-name="T107">(</text:span><text:span text:style-name="T114">self</text:span><text:span text:style-name="T107">.</text:span><text:span text:style-name="T114">session_id</text:span><text:span text:style-name="T107">),</text:span></text:p>
      <text:p text:style-name="P112" loext:marker-style-name="T107"><text:span text:style-name="T107">            </text:span><text:span text:style-name="T114">self</text:span><text:span text:style-name="T107">.</text:span><text:span text:style-name="T114">db</text:span><text:span text:style-name="T107">.</text:span><text:span text:style-name="T110">get_session_points</text:span><text:span text:style-name="T107">(</text:span><text:span text:style-name="T114">self</text:span><text:span text:style-name="T107">.</text:span><text:span text:style-name="T114">session_id</text:span><text:span text:style-name="T107">),</text:span></text:p>
      <text:p text:style-name="P112" loext:marker-style-name="T107"><text:span text:style-name="T107">            </text:span><text:span text:style-name="T114">self</text:span><text:span text:style-name="T107">.</text:span><text:span text:style-name="T114">db</text:span><text:span text:style-name="T107">.</text:span><text:span text:style-name="T110">get_last_image</text:span><text:span text:style-name="T107">(</text:span><text:span text:style-name="T114">self</text:span><text:span text:style-name="T107">.</text:span><text:span text:style-name="T114">session_id</text:span><text:span text:style-name="T107">))</text:span></text:p>
      <text:p text:style-name="P112" loext:marker-style-name="T107"><text:span text:style-name="T107">        </text:span><text:span text:style-name="T107"/></text:p>
      <text:p text:style-name="P112" loext:marker-style-name="T107"><text:span text:style-name="T107">        </text:span><text:span text:style-name="T109">messagebox</text:span><text:span text:style-name="T107">.</text:span><text:span text:style-name="T110">showinfo</text:span><text:span text:style-name="T107">(</text:span><text:span text:style-name="T112">title</text:span><text:span text:style-name="T113">=</text:span><text:span text:style-name="T111">"</text:span><text:span text:style-name="T119">Успешно</text:span><text:span text:style-name="T111">"</text:span><text:span text:style-name="T107">, </text:span><text:span text:style-name="T112">message</text:span><text:span text:style-name="T113">=</text:span><text:span text:style-name="T116">f</text:span><text:span text:style-name="T111">"</text:span><text:span text:style-name="T119">Отчёт</text:span><text:span text:style-name="T111"> </text:span><text:span text:style-name="T119">создан</text:span><text:span text:style-name="T111"> </text:span><text:span text:style-name="T119">и</text:span><text:span text:style-name="T111"> </text:span><text:span text:style-name="T119">сохранён</text:span><text:span text:style-name="T111"> </text:span><text:span text:style-name="T119">в</text:span><text:span text:style-name="T111"> reports </text:span><text:span text:style-name="T119">под</text:span><text:span text:style-name="T111"> </text:span><text:span text:style-name="T119">названием</text:span><text:span text:style-name="T111"> session_</text:span><text:span text:style-name="T116">{</text:span><text:span text:style-name="T114">self</text:span><text:span text:style-name="T107">.</text:span><text:span text:style-name="T114">session_id</text:span><text:span text:style-name="T116">}</text:span><text:span text:style-name="T111">_</text:span><text:span text:style-name="T116">{</text:span><text:span text:style-name="T114">stamp</text:span><text:span text:style-name="T116">}</text:span><text:span text:style-name="T111">.docx"</text:span><text:span text:style-name="T107">)</text:span></text:p>
      <text:p text:style-name="P112" loext:marker-style-name="T107"><text:soft-page-break/><text:span text:style-name="T107">            </text:span><text:span text:style-name="T107"/></text:p>
      <text:p text:style-name="P113" loext:marker-style-name="T107"/>
      <text:p text:style-name="P112" loext:marker-style-name="T107"><text:span text:style-name="T107">    </text:span><text:span text:style-name="T116">def</text:span><text:span text:style-name="T107"> </text:span><text:span text:style-name="T110">back_to_sessions</text:span><text:span text:style-name="T107">(</text:span><text:span text:style-name="T114">self</text:span><text:span text:style-name="T107">):</text:span></text:p>
      <text:p text:style-name="P113" loext:marker-style-name="T107"/>
      <text:p text:style-name="P112" loext:marker-style-name="T107"><text:span text:style-name="T107">        </text:span><text:span text:style-name="T108">if</text:span><text:span text:style-name="T107"> </text:span><text:span text:style-name="T114">self</text:span><text:span text:style-name="T107">.</text:span><text:span text:style-name="T114">monitor_thread</text:span><text:span text:style-name="T107">:</text:span></text:p>
      <text:p text:style-name="P112" loext:marker-style-name="T107"><text:span text:style-name="T107">            </text:span><text:span text:style-name="T114">self</text:span><text:span text:style-name="T107">.</text:span><text:span text:style-name="T114">monitor_thread</text:span><text:span text:style-name="T107">.</text:span><text:span text:style-name="T110">stop</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0">destroy</text:span><text:span text:style-name="T107">()</text:span></text:p>
      <text:p text:style-name="P113" loext:marker-style-name="T107"/>
      <text:p text:style-name="P112" loext:marker-style-name="T107"><text:span text:style-name="T107">        </text:span><text:span text:style-name="T108">from</text:span><text:span text:style-name="T107"> </text:span><text:span text:style-name="T109">session_selector</text:span><text:span text:style-name="T107"> </text:span><text:span text:style-name="T108">import</text:span><text:span text:style-name="T107"> </text:span><text:span text:style-name="T109">SessionSelector</text:span></text:p>
      <text:p text:style-name="P112" loext:marker-style-name="T107"><text:span text:style-name="T107">        </text:span><text:span text:style-name="T109">SessionSelector</text:span><text:span text:style-name="T107">(</text:span><text:span text:style-name="T114">self</text:span><text:span text:style-name="T107">.</text:span><text:span text:style-name="T114">settings</text:span><text:span text:style-name="T107">).</text:span><text:span text:style-name="T110">run</text:span><text:span text:style-name="T107">()</text:span></text:p>
      <text:p text:style-name="P115" loext:marker-style-name="T107"/>
      <text:p text:style-name="P112" loext:marker-style-name="T107"><text:span text:style-name="T107">    </text:span><text:span text:style-name="T116">def</text:span><text:span text:style-name="T107"> </text:span><text:span text:style-name="T110">run</text:span><text:span text:style-name="T107">(</text:span><text:span text:style-name="T114">self</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0">mainloop</text:span><text:span text:style-name="T107">()</text:span></text:p>
      <text:p text:style-name="P117" loext:marker-style-name="T127"/>
      <text:p text:style-name="P111" loext:marker-style-name="T106"><text:span text:style-name="T106">monitoring.py</text:span><text:span text:style-name="T106"/></text:p>
      <text:p text:style-name="P117" loext:marker-style-name="T127"/>
      <text:p text:style-name="P112" loext:marker-style-name="T107"><text:span text:style-name="T108">import</text:span><text:span text:style-name="T107"> </text:span><text:span text:style-name="T109">os</text:span><text:span text:style-name="T107">, </text:span><text:span text:style-name="T109">random</text:span><text:span text:style-name="T107">, </text:span><text:span text:style-name="T109">threading</text:span></text:p>
      <text:p text:style-name="P112" loext:marker-style-name="T107"><text:span text:style-name="T108">from</text:span><text:span text:style-name="T107"> </text:span><text:span text:style-name="T109">datetime</text:span><text:span text:style-name="T107"> </text:span><text:span text:style-name="T108">import</text:span><text:span text:style-name="T107"> </text:span><text:span text:style-name="T109">datetime</text:span></text:p>
      <text:p text:style-name="P112" loext:marker-style-name="T107"><text:span text:style-name="T108">from</text:span><text:span text:style-name="T107"> </text:span><text:span text:style-name="T109">esp32_client</text:span><text:span text:style-name="T107"> </text:span><text:span text:style-name="T108">import</text:span><text:span text:style-name="T107"> </text:span><text:span text:style-name="T109">ESP32Client</text:span></text:p>
      <text:p text:style-name="P112" loext:marker-style-name="T107"><text:span text:style-name="T108">from</text:span><text:span text:style-name="T107"> </text:span><text:span text:style-name="T109">image_processor</text:span><text:span text:style-name="T107"> </text:span><text:span text:style-name="T108">import</text:span><text:span text:style-name="T107"> </text:span><text:span text:style-name="T109">ImageProcessor</text:span></text:p>
      <text:p text:style-name="P112" loext:marker-style-name="T107"><text:span text:style-name="T108">from</text:span><text:span text:style-name="T107"> </text:span><text:span text:style-name="T109">logger</text:span><text:span text:style-name="T107"> </text:span><text:span text:style-name="T108">import</text:span><text:span text:style-name="T107"> </text:span><text:span text:style-name="T114">logger</text:span></text:p>
      <text:p text:style-name="P112" loext:marker-style-name="T107"><text:span text:style-name="T108">import</text:span><text:span text:style-name="T107"> </text:span><text:span text:style-name="T109">traceback</text:span></text:p>
      <text:p text:style-name="P113" loext:marker-style-name="T107"/>
      <text:p text:style-name="P112" loext:marker-style-name="T107"><text:span text:style-name="T116">class</text:span><text:span text:style-name="T107"> </text:span><text:span text:style-name="T109">MonitoringThread</text:span><text:span text:style-name="T107">(</text:span><text:span text:style-name="T109">threading</text:span><text:span text:style-name="T107">.</text:span><text:span text:style-name="T109">Thread</text:span><text:span text:style-name="T107">):</text:span></text:p>
      <text:p text:style-name="P113" loext:marker-style-name="T107"/>
      <text:p text:style-name="P112" loext:marker-style-name="T107"><text:span text:style-name="T107">    </text:span><text:span text:style-name="T116">def</text:span><text:span text:style-name="T107"> </text:span><text:span text:style-name="T117">__init__</text:span><text:span text:style-name="T107">(</text:span><text:span text:style-name="T114">self</text:span><text:span text:style-name="T107">, </text:span><text:span text:style-name="T112">session_id</text:span><text:span text:style-name="T107">, </text:span><text:span text:style-name="T112">ip</text:span><text:span text:style-name="T107">, </text:span><text:span text:style-name="T112">db</text:span><text:span text:style-name="T107">, </text:span><text:span text:style-name="T112">cb</text:span><text:span text:style-name="T107">):</text:span></text:p>
      <text:p text:style-name="P112" loext:marker-style-name="T107"><text:span text:style-name="T107">        </text:span><text:span text:style-name="T109">super</text:span><text:span text:style-name="T107">().</text:span><text:span text:style-name="T117">__init__</text:span><text:span text:style-name="T107">(</text:span><text:span text:style-name="T112">daemon</text:span><text:span text:style-name="T113">=</text:span><text:span text:style-name="T118">True</text:span><text:span text:style-name="T107">)</text:span></text:p>
      <text:p text:style-name="P112" loext:marker-style-name="T107"><text:span text:style-name="T107">        </text:span><text:span text:style-name="T114">self</text:span><text:span text:style-name="T107">.</text:span><text:span text:style-name="T114">session_id</text:span><text:span text:style-name="T113">=</text:span><text:span text:style-name="T112">session_id</text:span></text:p>
      <text:p text:style-name="P112" loext:marker-style-name="T107"><text:span text:style-name="T107">        </text:span><text:span text:style-name="T114">self</text:span><text:span text:style-name="T107">.</text:span><text:span text:style-name="T114">ip</text:span><text:span text:style-name="T113">=</text:span><text:span text:style-name="T112">ip</text:span></text:p>
      <text:p text:style-name="P112" loext:marker-style-name="T107"><text:span text:style-name="T107">        </text:span><text:span text:style-name="T114">self</text:span><text:span text:style-name="T107">.</text:span><text:span text:style-name="T114">db</text:span><text:span text:style-name="T113">=</text:span><text:span text:style-name="T112">db</text:span></text:p>
      <text:p text:style-name="P112" loext:marker-style-name="T107"><text:span text:style-name="T107">        </text:span><text:span text:style-name="T114">self</text:span><text:span text:style-name="T107">.</text:span><text:span text:style-name="T114">cb</text:span><text:span text:style-name="T113">=</text:span><text:span text:style-name="T112">cb</text:span></text:p>
      <text:p text:style-name="P112" loext:marker-style-name="T107"><text:span text:style-name="T107">        </text:span><text:span text:style-name="T114">self</text:span><text:span text:style-name="T107">.</text:span><text:span text:style-name="T114">running</text:span><text:span text:style-name="T113">=</text:span><text:span text:style-name="T118">False</text:span></text:p>
      <text:p text:style-name="P112" loext:marker-style-name="T107"><text:span text:style-name="T107">        </text:span><text:span text:style-name="T114">self</text:span><text:span text:style-name="T107">.</text:span><text:span text:style-name="T114">stop_event</text:span><text:span text:style-name="T113">=</text:span><text:span text:style-name="T109">threading</text:span><text:span text:style-name="T107">.</text:span><text:span text:style-name="T109">Event</text:span><text:span text:style-name="T107">()</text:span></text:p>
      <text:p text:style-name="P113" loext:marker-style-name="T107"/>
      <text:p text:style-name="P112" loext:marker-style-name="T107"><text:span text:style-name="T107">    </text:span><text:span text:style-name="T116">def</text:span><text:span text:style-name="T107"> </text:span><text:span text:style-name="T110">stop</text:span><text:span text:style-name="T107">(</text:span><text:span text:style-name="T114">self</text:span><text:span text:style-name="T107">):</text:span></text:p>
      <text:p text:style-name="P112" loext:marker-style-name="T107"><text:span text:style-name="T107">        </text:span><text:span text:style-name="T114">self</text:span><text:span text:style-name="T107">.</text:span><text:span text:style-name="T114">running</text:span><text:span text:style-name="T113">=</text:span><text:span text:style-name="T118">False</text:span></text:p>
      <text:p text:style-name="P112" loext:marker-style-name="T107"><text:span text:style-name="T107">        </text:span><text:span text:style-name="T114">self</text:span><text:span text:style-name="T107">.</text:span><text:span text:style-name="T114">stop_event</text:span><text:span text:style-name="T107">.</text:span><text:span text:style-name="T110">set</text:span><text:span text:style-name="T107">()</text:span></text:p>
      <text:p text:style-name="P113" loext:marker-style-name="T107"/>
      <text:p text:style-name="P112" loext:marker-style-name="T107"><text:span text:style-name="T107">    </text:span><text:span text:style-name="T116">def</text:span><text:span text:style-name="T107"> </text:span><text:span text:style-name="T110">run</text:span><text:span text:style-name="T107">(</text:span><text:span text:style-name="T114">self</text:span><text:span text:style-name="T107">):</text:span></text:p>
      <text:p text:style-name="P113" loext:marker-style-name="T107"/>
      <text:p text:style-name="P112" loext:marker-style-name="T107"><text:span text:style-name="T107">        </text:span><text:span text:style-name="T114">self</text:span><text:span text:style-name="T107">.</text:span><text:span text:style-name="T114">running</text:span><text:span text:style-name="T107"> </text:span><text:span text:style-name="T113">=</text:span><text:span text:style-name="T107"> </text:span><text:span text:style-name="T118">True</text:span></text:p>
      <text:p text:style-name="P113" loext:marker-style-name="T107"/>
      <text:p text:style-name="P112" loext:marker-style-name="T107"><text:span text:style-name="T107">        </text:span><text:span text:style-name="T114">camera</text:span><text:span text:style-name="T107"> </text:span><text:span text:style-name="T113">=</text:span><text:span text:style-name="T107"> </text:span><text:span text:style-name="T109">ESP32Client</text:span><text:span text:style-name="T107">(</text:span><text:span text:style-name="T114">self</text:span><text:span text:style-name="T107">.</text:span><text:span text:style-name="T114">ip</text:span><text:span text:style-name="T107">)</text:span></text:p>
      <text:p text:style-name="P113" loext:marker-style-name="T107"/>
      <text:p text:style-name="P112" loext:marker-style-name="T107"><text:span text:style-name="T107">        </text:span><text:span text:style-name="T108">while</text:span><text:span text:style-name="T107"> </text:span><text:span text:style-name="T114">self</text:span><text:span text:style-name="T107">.</text:span><text:span text:style-name="T114">running</text:span><text:span text:style-name="T107">:</text:span></text:p>
      <text:p text:style-name="P113" loext:marker-style-name="T107"/>
      <text:p text:style-name="P112" loext:marker-style-name="T107"><text:span text:style-name="T107">            </text:span><text:span text:style-name="T108">try</text:span><text:span text:style-name="T107">:</text:span></text:p>
      <text:p text:style-name="P113" loext:marker-style-name="T107"/>
      <text:p text:style-name="P112" loext:marker-style-name="T107"><text:span text:style-name="T107">                </text:span><text:span text:style-name="T114">frame</text:span><text:span text:style-name="T107"> </text:span><text:span text:style-name="T113">=</text:span><text:span text:style-name="T107"> </text:span><text:span text:style-name="T114">camera</text:span><text:span text:style-name="T107">.</text:span><text:span text:style-name="T110">get_frame</text:span><text:span text:style-name="T107">()</text:span></text:p>
      <text:p text:style-name="P112" loext:marker-style-name="T107"><text:span text:style-name="T107">                </text:span><text:span text:style-name="T114">ts</text:span><text:span text:style-name="T107"> </text:span><text:span text:style-name="T113">=</text:span><text:span text:style-name="T107"> </text:span><text:span text:style-name="T109">datetime</text:span><text:span text:style-name="T107">.</text:span><text:span text:style-name="T110">now</text:span><text:span text:style-name="T107">()</text:span></text:p>
      <text:p text:style-name="P113" loext:marker-style-name="T107"/>
      <text:p text:style-name="P112" loext:marker-style-name="T107"><text:span text:style-name="T107">                </text:span><text:span text:style-name="T114">points</text:span><text:span text:style-name="T107"> </text:span><text:span text:style-name="T113">=</text:span><text:span text:style-name="T107"> []</text:span></text:p>
      <text:p text:style-name="P113" loext:marker-style-name="T107"/>
      <text:p text:style-name="P112" loext:marker-style-name="T107"><text:span text:style-name="T107">                </text:span><text:span text:style-name="T108">for</text:span><text:span text:style-name="T107"> </text:span><text:span text:style-name="T114">_</text:span><text:span text:style-name="T107"> </text:span><text:span text:style-name="T108">in</text:span><text:span text:style-name="T107"> </text:span><text:span text:style-name="T109">range</text:span><text:span text:style-name="T107">(</text:span><text:span text:style-name="T120">300</text:span><text:span text:style-name="T107">):</text:span></text:p>
      <text:p text:style-name="P113" loext:marker-style-name="T107"/>
      <text:p text:style-name="P112" loext:marker-style-name="T107"><text:span text:style-name="T107">                    </text:span><text:span text:style-name="T114">points</text:span><text:span text:style-name="T107">.</text:span><text:span text:style-name="T110">append</text:span><text:span text:style-name="T107">(</text:span></text:p>
      <text:p text:style-name="P112" loext:marker-style-name="T107"><text:span text:style-name="T107">                        {</text:span><text:span text:style-name="T107"/></text:p>
      <text:p text:style-name="P112" loext:marker-style-name="T107"><text:span text:style-name="T107">                            </text:span><text:span text:style-name="T111">"x"</text:span><text:span text:style-name="T107">: </text:span><text:span text:style-name="T109">random</text:span><text:span text:style-name="T107">.</text:span><text:span text:style-name="T114">randint</text:span><text:span text:style-name="T107">(</text:span><text:span text:style-name="T120">0</text:span><text:span text:style-name="T107">, </text:span><text:span text:style-name="T120">799</text:span><text:span text:style-name="T107">),</text:span></text:p>
      <text:p text:style-name="P112" loext:marker-style-name="T107"><text:span text:style-name="T107">                            </text:span><text:span text:style-name="T111">"y"</text:span><text:span text:style-name="T107">: </text:span><text:span text:style-name="T109">random</text:span><text:span text:style-name="T107">.</text:span><text:span text:style-name="T114">randint</text:span><text:span text:style-name="T107">(</text:span><text:span text:style-name="T120">0</text:span><text:span text:style-name="T107">, </text:span><text:span text:style-name="T120">599</text:span><text:span text:style-name="T107">),</text:span></text:p>
      <text:p text:style-name="P112" loext:marker-style-name="T107"><text:span text:style-name="T107">                            </text:span><text:span text:style-name="T111">"temp"</text:span><text:span text:style-name="T107">: </text:span><text:span text:style-name="T110">round</text:span><text:span text:style-name="T107">(</text:span><text:span text:style-name="T109">random</text:span><text:span text:style-name="T107">.</text:span><text:span text:style-name="T114">uniform</text:span><text:span text:style-name="T107">(</text:span><text:span text:style-name="T120">20</text:span><text:span text:style-name="T107">,</text:span><text:span text:style-name="T120">90</text:span><text:span text:style-name="T107">),</text:span><text:span text:style-name="T120">2</text:span><text:span text:style-name="T107">)</text:span></text:p>
      <text:p text:style-name="P112" loext:marker-style-name="T107"><text:span text:style-name="T107">                        })</text:span><text:span text:style-name="T107"/></text:p>
      <text:p text:style-name="P113" loext:marker-style-name="T107"/>
      <text:p text:style-name="P112" loext:marker-style-name="T107"><text:span text:style-name="T107">                </text:span><text:span text:style-name="T114">image</text:span><text:span text:style-name="T107"> </text:span><text:span text:style-name="T113">=</text:span><text:span text:style-name="T107"> </text:span><text:span text:style-name="T109">ImageProcessor</text:span><text:span text:style-name="T107">.</text:span><text:span text:style-name="T110">load_image</text:span><text:span text:style-name="T107">(</text:span><text:span text:style-name="T114">frame</text:span><text:span text:style-name="T107">)</text:span></text:p>
      <text:p text:style-name="P113" loext:marker-style-name="T107"><text:soft-page-break/></text:p>
      <text:p text:style-name="P112" loext:marker-style-name="T107"><text:span text:style-name="T107">                </text:span><text:span text:style-name="T108">from</text:span><text:span text:style-name="T107"> </text:span><text:span text:style-name="T109">heatmap</text:span><text:span text:style-name="T107"> </text:span><text:span text:style-name="T108">import</text:span><text:span text:style-name="T107"> </text:span><text:span text:style-name="T109">HeatMapBuilder</text:span></text:p>
      <text:p text:style-name="P112" loext:marker-style-name="T107"><text:span text:style-name="T107">                (</text:span><text:span text:style-name="T114">result_image</text:span><text:span text:style-name="T107">, </text:span><text:span text:style-name="T114">tmin</text:span><text:span text:style-name="T107">, </text:span><text:span text:style-name="T114">tmax</text:span><text:span text:style-name="T107">, </text:span><text:span text:style-name="T114">tavg</text:span><text:span text:style-name="T107">) </text:span><text:span text:style-name="T113">=</text:span><text:span text:style-name="T107"> </text:span><text:span text:style-name="T109">HeatMapBuilder</text:span><text:span text:style-name="T107">.</text:span><text:span text:style-name="T110">build_overlay</text:span><text:span text:style-name="T107">(</text:span><text:span text:style-name="T114">image</text:span><text:span text:style-name="T107">,</text:span><text:span text:style-name="T114">points</text:span><text:span text:style-name="T107">)</text:span></text:p>
      <text:p text:style-name="P113" loext:marker-style-name="T107"/>
      <text:p text:style-name="P112" loext:marker-style-name="T107"><text:span text:style-name="T107">                </text:span><text:span text:style-name="T114">folder</text:span><text:span text:style-name="T107"> </text:span><text:span text:style-name="T113">=</text:span><text:span text:style-name="T107"> (</text:span><text:span text:style-name="T116">f</text:span><text:span text:style-name="T111">"images/session_"</text:span><text:span text:style-name="T116">f</text:span><text:span text:style-name="T111">"</text:span><text:span text:style-name="T116">{</text:span><text:span text:style-name="T114">self</text:span><text:span text:style-name="T107">.</text:span><text:span text:style-name="T114">session_id</text:span><text:span text:style-name="T116">}</text:span><text:span text:style-name="T111">"</text:span><text:span text:style-name="T107">)</text:span></text:p>
      <text:p text:style-name="P113" loext:marker-style-name="T107"/>
      <text:p text:style-name="P112" loext:marker-style-name="T107"><text:span text:style-name="T107">                </text:span><text:span text:style-name="T109">os</text:span><text:span text:style-name="T107">.</text:span><text:span text:style-name="T110">makedirs</text:span><text:span text:style-name="T107">(</text:span><text:span text:style-name="T114">folder</text:span><text:span text:style-name="T107">,</text:span><text:span text:style-name="T112">exist_ok</text:span><text:span text:style-name="T113">=</text:span><text:span text:style-name="T118">True</text:span><text:span text:style-name="T107">)</text:span></text:p>
      <text:p text:style-name="P113" loext:marker-style-name="T107"/>
      <text:p text:style-name="P112" loext:marker-style-name="T107"><text:span text:style-name="T107">                </text:span><text:span text:style-name="T114">path</text:span><text:span text:style-name="T107"> </text:span><text:span text:style-name="T113">=</text:span><text:span text:style-name="T107"> (</text:span><text:span text:style-name="T116">f</text:span><text:span text:style-name="T111">"</text:span><text:span text:style-name="T116">{</text:span><text:span text:style-name="T114">folder</text:span><text:span text:style-name="T116">}</text:span><text:span text:style-name="T111">/"</text:span><text:span text:style-name="T116">f</text:span><text:span text:style-name="T111">"</text:span><text:span text:style-name="T116">{</text:span><text:span text:style-name="T114">ts</text:span><text:span text:style-name="T107">.</text:span><text:span text:style-name="T110">strftime</text:span><text:span text:style-name="T107">(</text:span><text:span text:style-name="T111">'%Y%m</text:span><text:span text:style-name="T116">%d</text:span><text:span text:style-name="T111">_%H%M%S'</text:span><text:span text:style-name="T107">)</text:span><text:span text:style-name="T116">}</text:span><text:span text:style-name="T111">.jpg"</text:span><text:span text:style-name="T107">)</text:span></text:p>
      <text:p text:style-name="P113" loext:marker-style-name="T107"/>
      <text:p text:style-name="P112" loext:marker-style-name="T107"><text:span text:style-name="T107">                </text:span><text:span text:style-name="T114">result_image</text:span><text:span text:style-name="T107">.</text:span><text:span text:style-name="T110">convert</text:span><text:span text:style-name="T107">(</text:span><text:span text:style-name="T111">"RGB"</text:span><text:span text:style-name="T107">).</text:span><text:span text:style-name="T110">save</text:span><text:span text:style-name="T107">(</text:span><text:span text:style-name="T114">path</text:span><text:span text:style-name="T107">)</text:span></text:p>
      <text:p text:style-name="P113" loext:marker-style-name="T107"/>
      <text:p text:style-name="P112" loext:marker-style-name="T107"><text:span text:style-name="T107">                </text:span><text:span text:style-name="T114">measurement_id</text:span><text:span text:style-name="T107"> </text:span><text:span text:style-name="T113">=</text:span><text:span text:style-name="T107"> </text:span><text:span text:style-name="T114">self</text:span><text:span text:style-name="T107">.</text:span><text:span text:style-name="T114">db</text:span><text:span text:style-name="T107">.create_measurement(</text:span><text:span text:style-name="T114">self</text:span><text:span text:style-name="T107">.</text:span><text:span text:style-name="T114">session_id</text:span><text:span text:style-name="T107">, </text:span><text:span text:style-name="T114">ts</text:span><text:span text:style-name="T107">, </text:span><text:span text:style-name="T114">path</text:span><text:span text:style-name="T107">)</text:span></text:p>
      <text:p text:style-name="P113" loext:marker-style-name="T107"/>
      <text:p text:style-name="P112" loext:marker-style-name="T107"><text:span text:style-name="T107">                </text:span><text:span text:style-name="T114">self</text:span><text:span text:style-name="T107">.</text:span><text:span text:style-name="T114">db</text:span><text:span text:style-name="T107">.insert_points(</text:span><text:span text:style-name="T114">measurement_id</text:span><text:span text:style-name="T107">, </text:span><text:span text:style-name="T114">points</text:span><text:span text:style-name="T107">)</text:span></text:p>
      <text:p text:style-name="P112" loext:marker-style-name="T124"><text:span text:style-name="T107">                </text:span><text:span text:style-name="T128">print</text:span><text:span text:style-name="T124">(</text:span><text:span text:style-name="T119">"Передача изображения в GUI"</text:span><text:span text:style-name="T124">)</text:span></text:p>
      <text:p text:style-name="P118" loext:marker-style-name="T124"/>
      <text:p text:style-name="P112" loext:marker-style-name="T107"><text:span text:style-name="T124">                </text:span><text:span text:style-name="T114">self</text:span><text:span text:style-name="T107">.</text:span><text:span text:style-name="T114">cb</text:span><text:span text:style-name="T107">(</text:span><text:span text:style-name="T114">result_image</text:span><text:span text:style-name="T107">,{</text:span><text:span text:style-name="T111">"tmin"</text:span><text:span text:style-name="T107">: </text:span><text:span text:style-name="T114">tmin</text:span><text:span text:style-name="T107">, </text:span><text:span text:style-name="T111">"tmax"</text:span><text:span text:style-name="T107">: </text:span><text:span text:style-name="T114">tmax</text:span><text:span text:style-name="T107">, </text:span><text:span text:style-name="T111">"tavg"</text:span><text:span text:style-name="T107">: </text:span><text:span text:style-name="T114">tavg</text:span><text:span text:style-name="T107">, </text:span><text:span text:style-name="T111">"points"</text:span><text:span text:style-name="T107">: </text:span><text:span text:style-name="T110">len</text:span><text:span text:style-name="T107">(</text:span><text:span text:style-name="T114">points</text:span><text:span text:style-name="T107">)}, </text:span><text:span text:style-name="T114">ts</text:span><text:span text:style-name="T107">)</text:span></text:p>
      <text:p text:style-name="P112" loext:marker-style-name="T107"><text:span text:style-name="T107">                </text:span><text:span text:style-name="T122">#print("HeatMap:", result_image, tmin, tmax, tavg)</text:span></text:p>
      <text:p text:style-name="P113" loext:marker-style-name="T107"/>
      <text:p text:style-name="P112" loext:marker-style-name="T107"><text:span text:style-name="T107">            </text:span><text:span text:style-name="T108">except</text:span><text:span text:style-name="T107"> </text:span><text:span text:style-name="T109">Exception</text:span><text:span text:style-name="T107">:</text:span></text:p>
      <text:p text:style-name="P113" loext:marker-style-name="T107"/>
      <text:p text:style-name="P112" loext:marker-style-name="T107"><text:span text:style-name="T107">                </text:span><text:span text:style-name="T114">logger</text:span><text:span text:style-name="T107">.</text:span><text:span text:style-name="T110">error</text:span><text:span text:style-name="T107">(</text:span></text:p>
      <text:p text:style-name="P112" loext:marker-style-name="T107"><text:span text:style-name="T107">                    </text:span><text:span text:style-name="T109">traceback</text:span><text:span text:style-name="T107">.</text:span><text:span text:style-name="T110">format_exc</text:span><text:span text:style-name="T107">()</text:span></text:p>
      <text:p text:style-name="P112" loext:marker-style-name="T107"><text:span text:style-name="T107">                )</text:span><text:span text:style-name="T107"/></text:p>
      <text:p text:style-name="P113" loext:marker-style-name="T107"/>
      <text:p text:style-name="P112" loext:marker-style-name="T107"><text:span text:style-name="T107">            </text:span><text:span text:style-name="T108">if</text:span><text:span text:style-name="T107"> </text:span><text:span text:style-name="T114">self</text:span><text:span text:style-name="T107">.</text:span><text:span text:style-name="T114">stop_event</text:span><text:span text:style-name="T107">.</text:span><text:span text:style-name="T110">wait</text:span><text:span text:style-name="T107">(</text:span><text:span text:style-name="T120">5</text:span><text:span text:style-name="T107">):</text:span></text:p>
      <text:p text:style-name="P112" loext:marker-style-name="T107"><text:span text:style-name="T107">                </text:span><text:span text:style-name="T108">break</text:span></text:p>
      <text:p text:style-name="P117" loext:marker-style-name="T127"/>
      <text:p text:style-name="P111" loext:marker-style-name="T106"><text:span text:style-name="T106">logging.py</text:span><text:span text:style-name="T106"/></text:p>
      <text:p text:style-name="P119" loext:marker-style-name="T129"/>
      <text:p text:style-name="P112" loext:marker-style-name="T107"><text:span text:style-name="T108">import</text:span><text:span text:style-name="T107"> </text:span><text:span text:style-name="T109">os</text:span><text:span text:style-name="T107">, </text:span><text:span text:style-name="T109">logging</text:span></text:p>
      <text:p text:style-name="P113" loext:marker-style-name="T107"/>
      <text:p text:style-name="P112" loext:marker-style-name="T107"><text:span text:style-name="T109">os</text:span><text:span text:style-name="T107">.</text:span><text:span text:style-name="T110">makedirs</text:span><text:span text:style-name="T107">(</text:span><text:span text:style-name="T111">"logs"</text:span><text:span text:style-name="T107">, </text:span><text:span text:style-name="T112">exist_ok</text:span><text:span text:style-name="T113">=</text:span><text:span text:style-name="T118">True</text:span><text:span text:style-name="T107">)</text:span></text:p>
      <text:p text:style-name="P113" loext:marker-style-name="T107"/>
      <text:p text:style-name="P112" loext:marker-style-name="T107"><text:span text:style-name="T108">with</text:span><text:span text:style-name="T107"> </text:span><text:span text:style-name="T110">open</text:span><text:span text:style-name="T107">(</text:span><text:span text:style-name="T111">"logs/app.log"</text:span><text:span text:style-name="T107">, </text:span><text:span text:style-name="T111">"w"</text:span><text:span text:style-name="T107">, </text:span><text:span text:style-name="T112">encoding</text:span><text:span text:style-name="T113">=</text:span><text:span text:style-name="T111">"utf-8"</text:span><text:span text:style-name="T107">):</text:span></text:p>
      <text:p text:style-name="P112" loext:marker-style-name="T107"><text:span text:style-name="T107">    </text:span><text:span text:style-name="T108">pass</text:span></text:p>
      <text:p text:style-name="P113" loext:marker-style-name="T107"/>
      <text:p text:style-name="P112" loext:marker-style-name="T107"><text:span text:style-name="T109">logging</text:span><text:span text:style-name="T107">.</text:span><text:span text:style-name="T110">basicConfig</text:span><text:span text:style-name="T107">(</text:span><text:span text:style-name="T112">filename</text:span><text:span text:style-name="T113">=</text:span><text:span text:style-name="T111">"logs/app.log"</text:span><text:span text:style-name="T107">, </text:span><text:span text:style-name="T112">level</text:span><text:span text:style-name="T113">=</text:span><text:span text:style-name="T109">logging</text:span><text:span text:style-name="T107">.</text:span><text:span text:style-name="T114">INFO</text:span><text:span text:style-name="T107">,</text:span></text:p>
      <text:p text:style-name="P112" loext:marker-style-name="T107"><text:span text:style-name="T107">                    </text:span><text:span text:style-name="T112">format</text:span><text:span text:style-name="T113">=</text:span><text:span text:style-name="T111">"</text:span><text:span text:style-name="T116">%(asctime)s</text:span><text:span text:style-name="T111"> | </text:span><text:span text:style-name="T116">%(levelname)s</text:span><text:span text:style-name="T111"> | </text:span><text:span text:style-name="T116">%(message)s</text:span><text:span text:style-name="T111">"</text:span><text:span text:style-name="T107">,</text:span></text:p>
      <text:p text:style-name="P112" loext:marker-style-name="T107"><text:span text:style-name="T107">                    </text:span><text:span text:style-name="T112">encoding</text:span><text:span text:style-name="T113">=</text:span><text:span text:style-name="T111">"utf-8"</text:span><text:span text:style-name="T107">)</text:span></text:p>
      <text:p text:style-name="P113" loext:marker-style-name="T107"/>
      <text:p text:style-name="P112" loext:marker-style-name="T107"><text:span text:style-name="T114">logger</text:span><text:span text:style-name="T107"> </text:span><text:span text:style-name="T113">=</text:span><text:span text:style-name="T107"> </text:span><text:span text:style-name="T109">logging</text:span><text:span text:style-name="T107">.</text:span><text:span text:style-name="T110">getLogger</text:span><text:span text:style-name="T107">(</text:span><text:span text:style-name="T111">"thermal_monitor"</text:span><text:span text:style-name="T107">)</text:span></text:p>
      <text:p text:style-name="P115" loext:marker-style-name="T107"/>
      <text:p text:style-name="P111" loext:marker-style-name="T106"><text:span text:style-name="T106">exporter.py</text:span><text:span text:style-name="T106"/></text:p>
      <text:p text:style-name="P120" loext:marker-style-name="T130"/>
      <text:p text:style-name="P112" loext:marker-style-name="T107"><text:span text:style-name="T108">import</text:span><text:span text:style-name="T107"> </text:span><text:span text:style-name="T109">pandas</text:span><text:span text:style-name="T107"> </text:span><text:span text:style-name="T108">as</text:span><text:span text:style-name="T107"> </text:span><text:span text:style-name="T109">pd</text:span></text:p>
      <text:p text:style-name="P112" loext:marker-style-name="T107"><text:span text:style-name="T116">class</text:span><text:span text:style-name="T107"> </text:span><text:span text:style-name="T109">CSVExporter</text:span><text:span text:style-name="T107">:</text:span></text:p>
      <text:p text:style-name="P112" loext:marker-style-name="T107"><text:span text:style-name="T107">    </text:span><text:span text:style-name="T110">@</text:span><text:span text:style-name="T109">staticmethod</text:span></text:p>
      <text:p text:style-name="P112" loext:marker-style-name="T107"><text:span text:style-name="T107">    </text:span><text:span text:style-name="T107"/></text:p>
      <text:p text:style-name="P112" loext:marker-style-name="T107"><text:span text:style-name="T107">    </text:span><text:span text:style-name="T116">def</text:span><text:span text:style-name="T107"> </text:span><text:span text:style-name="T110">export</text:span><text:span text:style-name="T107">(</text:span><text:span text:style-name="T112">records</text:span><text:span text:style-name="T107">,</text:span><text:span text:style-name="T112">filename</text:span><text:span text:style-name="T107">):</text:span></text:p>
      <text:p text:style-name="P112" loext:marker-style-name="T107"><text:span text:style-name="T107">        </text:span><text:span text:style-name="T109">pd</text:span><text:span text:style-name="T107">.</text:span><text:span text:style-name="T109">DataFrame</text:span><text:span text:style-name="T107">(</text:span><text:span text:style-name="T112">records</text:span><text:span text:style-name="T107">).</text:span><text:span text:style-name="T110">to_csv</text:span><text:span text:style-name="T107">(</text:span><text:span text:style-name="T112">filename</text:span><text:span text:style-name="T107">,</text:span><text:span text:style-name="T112">sep</text:span><text:span text:style-name="T113">=</text:span><text:span text:style-name="T111">";"</text:span><text:span text:style-name="T107">,</text:span><text:span text:style-name="T112">index</text:span><text:span text:style-name="T113">=</text:span><text:span text:style-name="T118">False</text:span><text:span text:style-name="T107">,</text:span><text:span text:style-name="T112">encoding</text:span><text:span text:style-name="T113">=</text:span><text:span text:style-name="T111">"utf-8-sig"</text:span><text:span text:style-name="T107">)</text:span></text:p>
      <text:p text:style-name="P117" loext:marker-style-name="T127"/>
      <text:p text:style-name="P111" loext:marker-style-name="T127"><text:span text:style-name="T127"><text:s/>report_generator.py</text:span><text:span text:style-name="T127"/></text:p>
      <text:p text:style-name="P112" loext:marker-style-name="T107"><text:span text:style-name="T108">from</text:span><text:span text:style-name="T107"> </text:span><text:span text:style-name="T109">docx</text:span><text:span text:style-name="T107"> </text:span><text:span text:style-name="T108">import</text:span><text:span text:style-name="T107"> </text:span><text:span text:style-name="T110">Document</text:span></text:p>
      <text:p text:style-name="P112" loext:marker-style-name="T107"><text:span text:style-name="T108">from</text:span><text:span text:style-name="T107"> </text:span><text:span text:style-name="T109">docx</text:span><text:span text:style-name="T107">.</text:span><text:span text:style-name="T109">shared</text:span><text:span text:style-name="T107"> </text:span><text:span text:style-name="T108">import</text:span><text:span text:style-name="T107"> </text:span><text:span text:style-name="T109">Cm</text:span><text:span text:style-name="T107">, </text:span><text:span text:style-name="T109">Pt</text:span></text:p>
      <text:p text:style-name="P115" loext:marker-style-name="T107"/>
      <text:p text:style-name="P112" loext:marker-style-name="T107"><text:span text:style-name="T116">class</text:span><text:span text:style-name="T107"> </text:span><text:span text:style-name="T109">ReportGenerator</text:span><text:span text:style-name="T107">:</text:span></text:p>
      <text:p text:style-name="P113" loext:marker-style-name="T107"/>
      <text:p text:style-name="P112" loext:marker-style-name="T107"><text:span text:style-name="T107">    </text:span><text:span text:style-name="T110">@</text:span><text:span text:style-name="T109">staticmethod</text:span></text:p>
      <text:p text:style-name="P112" loext:marker-style-name="T107"><text:span text:style-name="T107">    </text:span><text:span text:style-name="T116">def</text:span><text:span text:style-name="T107"> </text:span><text:span text:style-name="T110">generate</text:span><text:span text:style-name="T107">(</text:span><text:span text:style-name="T112">filename</text:span><text:span text:style-name="T107">, </text:span><text:span text:style-name="T112">session_id</text:span><text:span text:style-name="T107">, </text:span><text:span text:style-name="T112">records</text:span><text:span text:style-name="T107">, </text:span><text:span text:style-name="T112">points</text:span><text:span text:style-name="T107">, </text:span><text:span text:style-name="T112">image_path</text:span><text:span text:style-name="T107">):</text:span></text:p>
      <text:p text:style-name="P113" loext:marker-style-name="T107"><text:soft-page-break/></text:p>
      <text:p text:style-name="P112" loext:marker-style-name="T107"><text:span text:style-name="T107">        </text:span><text:span text:style-name="T114">d</text:span><text:span text:style-name="T107"> </text:span><text:span text:style-name="T113">=</text:span><text:span text:style-name="T107"> </text:span><text:span text:style-name="T110">Document</text:span><text:span text:style-name="T107">()</text:span></text:p>
      <text:p text:style-name="P113" loext:marker-style-name="T107"/>
      <text:p text:style-name="P112" loext:marker-style-name="T107"><text:span text:style-name="T107">        </text:span><text:span text:style-name="T114">style</text:span><text:span text:style-name="T107"> </text:span><text:span text:style-name="T113">=</text:span><text:span text:style-name="T107"> </text:span><text:span text:style-name="T114">d</text:span><text:span text:style-name="T107">.</text:span><text:span text:style-name="T114">styles</text:span><text:span text:style-name="T107">[</text:span><text:span text:style-name="T111">"Normal"</text:span><text:span text:style-name="T107">]</text:span></text:p>
      <text:p text:style-name="P112" loext:marker-style-name="T107"><text:span text:style-name="T107">        </text:span><text:span text:style-name="T114">style</text:span><text:span text:style-name="T107">.font.name </text:span><text:span text:style-name="T113">=</text:span><text:span text:style-name="T107"> </text:span><text:span text:style-name="T111">"Times New Roman"</text:span></text:p>
      <text:p text:style-name="P112" loext:marker-style-name="T107"><text:span text:style-name="T107">        </text:span><text:span text:style-name="T114">style</text:span><text:span text:style-name="T107">.font.size </text:span><text:span text:style-name="T113">=</text:span><text:span text:style-name="T107"> </text:span><text:span text:style-name="T109">Pt</text:span><text:span text:style-name="T107">(</text:span><text:span text:style-name="T120">12</text:span><text:span text:style-name="T107">)</text:span></text:p>
      <text:p text:style-name="P113" loext:marker-style-name="T107"/>
      <text:p text:style-name="P112" loext:marker-style-name="T107"><text:span text:style-name="T107">        </text:span><text:span text:style-name="T114">d</text:span><text:span text:style-name="T107">.</text:span><text:span text:style-name="T110">add_heading</text:span><text:span text:style-name="T107">(</text:span><text:span text:style-name="T116">f</text:span><text:span text:style-name="T111">"</text:span><text:span text:style-name="T119">Отчёт</text:span><text:span text:style-name="T111"> </text:span><text:span text:style-name="T119">по</text:span><text:span text:style-name="T111"> </text:span><text:span text:style-name="T119">сессии</text:span><text:span text:style-name="T111"> №</text:span><text:span text:style-name="T116">{</text:span><text:span text:style-name="T112">session_id</text:span><text:span text:style-name="T116">}</text:span><text:span text:style-name="T111">"</text:span><text:span text:style-name="T107">, </text:span><text:span text:style-name="T120">1</text:span><text:span text:style-name="T107">)</text:span></text:p>
      <text:p text:style-name="P112" loext:marker-style-name="T107"><text:span text:style-name="T107">        </text:span><text:span text:style-name="T114">d</text:span><text:span text:style-name="T107">.</text:span><text:span text:style-name="T110">add_paragraph</text:span><text:span text:style-name="T107">(</text:span><text:span text:style-name="T116">f</text:span><text:span text:style-name="T111">"</text:span><text:span text:style-name="T119">Количество</text:span><text:span text:style-name="T111"> </text:span><text:span text:style-name="T119">кадров</text:span><text:span text:style-name="T111">: </text:span><text:span text:style-name="T116">{</text:span><text:span text:style-name="T110">len</text:span><text:span text:style-name="T107">(</text:span><text:span text:style-name="T112">records</text:span><text:span text:style-name="T107">)</text:span><text:span text:style-name="T116">}</text:span><text:span text:style-name="T111">"</text:span><text:span text:style-name="T107">)</text:span></text:p>
      <text:p text:style-name="P112" loext:marker-style-name="T107"><text:span text:style-name="T107">        </text:span><text:span text:style-name="T114">d</text:span><text:span text:style-name="T107">.</text:span><text:span text:style-name="T110">add_paragraph</text:span><text:span text:style-name="T107">(</text:span><text:span text:style-name="T116">f</text:span><text:span text:style-name="T111">"</text:span><text:span text:style-name="T119">Количество</text:span><text:span text:style-name="T111"> </text:span><text:span text:style-name="T119">точек</text:span><text:span text:style-name="T111">: </text:span><text:span text:style-name="T116">{</text:span><text:span text:style-name="T110">len</text:span><text:span text:style-name="T107">(</text:span><text:span text:style-name="T112">points</text:span><text:span text:style-name="T107">)</text:span><text:span text:style-name="T116">}</text:span><text:span text:style-name="T111">"</text:span><text:span text:style-name="T107">)</text:span></text:p>
      <text:p text:style-name="P113" loext:marker-style-name="T107"/>
      <text:p text:style-name="P112" loext:marker-style-name="T107"><text:span text:style-name="T107">        </text:span><text:span text:style-name="T108">if</text:span><text:span text:style-name="T107"> </text:span><text:span text:style-name="T112">points</text:span><text:span text:style-name="T107">:</text:span></text:p>
      <text:p text:style-name="P112" loext:marker-style-name="T107"><text:span text:style-name="T107">            </text:span><text:span text:style-name="T114">temps</text:span><text:span text:style-name="T107"> </text:span><text:span text:style-name="T113">=</text:span><text:span text:style-name="T107"> [</text:span><text:span text:style-name="T109">float</text:span><text:span text:style-name="T107">(</text:span><text:span text:style-name="T114">p</text:span><text:span text:style-name="T107">[</text:span><text:span text:style-name="T111">"temperature"</text:span><text:span text:style-name="T107">])</text:span><text:span text:style-name="T108">for</text:span><text:span text:style-name="T107"> </text:span><text:span text:style-name="T114">p</text:span><text:span text:style-name="T107"> </text:span><text:span text:style-name="T108">in</text:span><text:span text:style-name="T107"> </text:span><text:span text:style-name="T112">points</text:span><text:span text:style-name="T107">]</text:span></text:p>
      <text:p text:style-name="P112" loext:marker-style-name="T107"><text:span text:style-name="T107">            </text:span><text:span text:style-name="T114">d</text:span><text:span text:style-name="T107">.</text:span><text:span text:style-name="T110">add_paragraph</text:span><text:span text:style-name="T107">(</text:span><text:span text:style-name="T116">f</text:span><text:span text:style-name="T111">"</text:span><text:span text:style-name="T119">Мин</text:span><text:span text:style-name="T111">. </text:span><text:span text:style-name="T119">температура</text:span><text:span text:style-name="T111">: </text:span><text:span text:style-name="T116">{</text:span><text:span text:style-name="T110">min</text:span><text:span text:style-name="T107">(</text:span><text:span text:style-name="T114">temps</text:span><text:span text:style-name="T107">)</text:span><text:span text:style-name="T116">:.2f}</text:span><text:span text:style-name="T111"> °C"</text:span><text:span text:style-name="T107">)</text:span></text:p>
      <text:p text:style-name="P112" loext:marker-style-name="T107"><text:span text:style-name="T107">            </text:span><text:span text:style-name="T114">d</text:span><text:span text:style-name="T107">.</text:span><text:span text:style-name="T110">add_paragraph</text:span><text:span text:style-name="T107">(</text:span><text:span text:style-name="T116">f</text:span><text:span text:style-name="T111">"</text:span><text:span text:style-name="T119">Макс</text:span><text:span text:style-name="T111">. </text:span><text:span text:style-name="T119">температура</text:span><text:span text:style-name="T111">: </text:span><text:span text:style-name="T116">{</text:span><text:span text:style-name="T110">max</text:span><text:span text:style-name="T107">(</text:span><text:span text:style-name="T114">temps</text:span><text:span text:style-name="T107">)</text:span><text:span text:style-name="T116">:.2f}</text:span><text:span text:style-name="T111"> °C"</text:span><text:span text:style-name="T107">)</text:span></text:p>
      <text:p text:style-name="P112" loext:marker-style-name="T107"><text:span text:style-name="T107">            </text:span><text:span text:style-name="T114">d</text:span><text:span text:style-name="T107">.</text:span><text:span text:style-name="T110">add_paragraph</text:span><text:span text:style-name="T107">(</text:span><text:span text:style-name="T116">f</text:span><text:span text:style-name="T111">"</text:span><text:span text:style-name="T119">Средняя</text:span><text:span text:style-name="T111"> </text:span><text:span text:style-name="T119">температура</text:span><text:span text:style-name="T111">: "</text:span><text:span text:style-name="T116">f</text:span><text:span text:style-name="T111">"</text:span><text:span text:style-name="T116">{</text:span><text:span text:style-name="T110">sum</text:span><text:span text:style-name="T107">(</text:span><text:span text:style-name="T114">temps</text:span><text:span text:style-name="T107">)</text:span><text:span text:style-name="T113">/</text:span><text:span text:style-name="T110">len</text:span><text:span text:style-name="T107">(</text:span><text:span text:style-name="T114">temps</text:span><text:span text:style-name="T107">)</text:span><text:span text:style-name="T116">:.2f}</text:span><text:span text:style-name="T111"> °C"</text:span><text:span text:style-name="T107">)</text:span></text:p>
      <text:p text:style-name="P113" loext:marker-style-name="T107"/>
      <text:p text:style-name="P112" loext:marker-style-name="T107"><text:span text:style-name="T107">        </text:span><text:span text:style-name="T108">if</text:span><text:span text:style-name="T107"> </text:span><text:span text:style-name="T112">image_path</text:span><text:span text:style-name="T107">:</text:span></text:p>
      <text:p text:style-name="P112" loext:marker-style-name="T107"><text:span text:style-name="T107">            </text:span><text:span text:style-name="T108">try</text:span><text:span text:style-name="T107">:</text:span></text:p>
      <text:p text:style-name="P112" loext:marker-style-name="T107"><text:span text:style-name="T107">                </text:span><text:span text:style-name="T114">d</text:span><text:span text:style-name="T107">.</text:span><text:span text:style-name="T110">add_picture</text:span><text:span text:style-name="T107">(</text:span><text:span text:style-name="T112">image_path</text:span><text:span text:style-name="T107">, </text:span><text:span text:style-name="T112">width</text:span><text:span text:style-name="T113">=</text:span><text:span text:style-name="T109">Cm</text:span><text:span text:style-name="T107">(</text:span><text:span text:style-name="T120">12</text:span><text:span text:style-name="T107">))</text:span></text:p>
      <text:p text:style-name="P113" loext:marker-style-name="T107"/>
      <text:p text:style-name="P112" loext:marker-style-name="T107"><text:span text:style-name="T107">            </text:span><text:span text:style-name="T108">except</text:span><text:span text:style-name="T107"> </text:span><text:span text:style-name="T109">Exception</text:span><text:span text:style-name="T107">:</text:span></text:p>
      <text:p text:style-name="P112" loext:marker-style-name="T107"><text:span text:style-name="T107">                </text:span><text:span text:style-name="T108">pass</text:span></text:p>
      <text:p text:style-name="P113" loext:marker-style-name="T107"/>
      <text:p text:style-name="P112" loext:marker-style-name="T107"><text:span text:style-name="T107">        </text:span><text:span text:style-name="T114">d</text:span><text:span text:style-name="T107">.</text:span><text:span text:style-name="T110">save</text:span><text:span text:style-name="T107">(</text:span><text:span text:style-name="T112">filename</text:span><text:span text:style-name="T107">)</text:span></text:p>
      <text:p text:style-name="P121" loext:marker-style-name="T106"/>
      <text:p text:style-name="P111" loext:marker-style-name="T106"><text:span text:style-name="T106">heatmap.py</text:span><text:span text:style-name="T106"/></text:p>
      <text:p text:style-name="P117" loext:marker-style-name="T127"/>
      <text:p text:style-name="P112" loext:marker-style-name="T107"><text:span text:style-name="T108">import</text:span><text:span text:style-name="T107"> </text:span><text:span text:style-name="T109">numpy</text:span><text:span text:style-name="T107"> </text:span><text:span text:style-name="T108">as</text:span><text:span text:style-name="T107"> </text:span><text:span text:style-name="T109">np</text:span></text:p>
      <text:p text:style-name="P113" loext:marker-style-name="T107"/>
      <text:p text:style-name="P112" loext:marker-style-name="T107"><text:span text:style-name="T108">from</text:span><text:span text:style-name="T107"> </text:span><text:span text:style-name="T109">PIL</text:span><text:span text:style-name="T107"> </text:span><text:span text:style-name="T108">import</text:span><text:span text:style-name="T107"> </text:span><text:span text:style-name="T109">Image</text:span></text:p>
      <text:p text:style-name="P113" loext:marker-style-name="T107"/>
      <text:p text:style-name="P112" loext:marker-style-name="T107"><text:span text:style-name="T108">from</text:span><text:span text:style-name="T107"> </text:span><text:span text:style-name="T109">scipy</text:span><text:span text:style-name="T107">.</text:span><text:span text:style-name="T109">interpolate</text:span><text:span text:style-name="T107"> </text:span><text:span text:style-name="T108">import</text:span><text:span text:style-name="T107"> </text:span><text:span text:style-name="T110">griddata</text:span></text:p>
      <text:p text:style-name="P112" loext:marker-style-name="T107"><text:span text:style-name="T108">from</text:span><text:span text:style-name="T107"> </text:span><text:span text:style-name="T109">scipy</text:span><text:span text:style-name="T107">.</text:span><text:span text:style-name="T109">ndimage</text:span><text:span text:style-name="T107"> </text:span><text:span text:style-name="T108">import</text:span><text:span text:style-name="T107"> </text:span><text:span text:style-name="T110">gaussian_filter</text:span></text:p>
      <text:p text:style-name="P115" loext:marker-style-name="T107"/>
      <text:p text:style-name="P112" loext:marker-style-name="T107"><text:span text:style-name="T116">class</text:span><text:span text:style-name="T107"> </text:span><text:span text:style-name="T109">HeatMapBuilder</text:span><text:span text:style-name="T107">:</text:span></text:p>
      <text:p text:style-name="P113" loext:marker-style-name="T107"/>
      <text:p text:style-name="P112" loext:marker-style-name="T107"><text:span text:style-name="T107">    </text:span><text:span text:style-name="T110">@</text:span><text:span text:style-name="T109">staticmethod</text:span></text:p>
      <text:p text:style-name="P112" loext:marker-style-name="T107"><text:span text:style-name="T107">    </text:span><text:span text:style-name="T116">def</text:span><text:span text:style-name="T107"> </text:span><text:span text:style-name="T110">build_heatmap</text:span><text:span text:style-name="T107">(</text:span><text:span text:style-name="T112">width</text:span><text:span text:style-name="T107">, </text:span><text:span text:style-name="T112">height</text:span><text:span text:style-name="T107">, </text:span><text:span text:style-name="T112">points</text:span><text:span text:style-name="T107">, </text:span><text:span text:style-name="T112">sigma</text:span><text:span text:style-name="T113">=</text:span><text:span text:style-name="T120">3</text:span><text:span text:style-name="T107">):</text:span></text:p>
      <text:p text:style-name="P113" loext:marker-style-name="T107"/>
      <text:p text:style-name="P112" loext:marker-style-name="T107"><text:span text:style-name="T107">        </text:span><text:span text:style-name="T108">if</text:span><text:span text:style-name="T107"> </text:span><text:span text:style-name="T110">len</text:span><text:span text:style-name="T107">(</text:span><text:span text:style-name="T112">points</text:span><text:span text:style-name="T107">) </text:span><text:span text:style-name="T113">&lt;</text:span><text:span text:style-name="T107"> </text:span><text:span text:style-name="T120">3</text:span><text:span text:style-name="T107">:</text:span></text:p>
      <text:p text:style-name="P112" loext:marker-style-name="T107"><text:span text:style-name="T107">            </text:span><text:span text:style-name="T108">return</text:span><text:span text:style-name="T107"> </text:span><text:span text:style-name="T118">None</text:span><text:span text:style-name="T107">, </text:span><text:span text:style-name="T118">None</text:span><text:span text:style-name="T107">, </text:span><text:span text:style-name="T118">None</text:span><text:span text:style-name="T107">, </text:span><text:span text:style-name="T118">None</text:span></text:p>
      <text:p text:style-name="P113" loext:marker-style-name="T107"/>
      <text:p text:style-name="P112" loext:marker-style-name="T107"><text:span text:style-name="T107">        </text:span><text:span text:style-name="T114">xs</text:span><text:span text:style-name="T107"> </text:span><text:span text:style-name="T113">=</text:span><text:span text:style-name="T107"> </text:span><text:span text:style-name="T109">np</text:span><text:span text:style-name="T107">.</text:span><text:span text:style-name="T110">array</text:span><text:span text:style-name="T107">([</text:span><text:span text:style-name="T114">p</text:span><text:span text:style-name="T107">[</text:span><text:span text:style-name="T111">"x"</text:span><text:span text:style-name="T107">] </text:span><text:span text:style-name="T108">for</text:span><text:span text:style-name="T107"> </text:span><text:span text:style-name="T114">p</text:span><text:span text:style-name="T107"> </text:span><text:span text:style-name="T108">in</text:span><text:span text:style-name="T107"> </text:span><text:span text:style-name="T112">points</text:span><text:span text:style-name="T107">], </text:span><text:span text:style-name="T112">dtype</text:span><text:span text:style-name="T113">=</text:span><text:span text:style-name="T109">np</text:span><text:span text:style-name="T107">.</text:span><text:span text:style-name="T114">float32</text:span><text:span text:style-name="T107">)</text:span></text:p>
      <text:p text:style-name="P112" loext:marker-style-name="T107"><text:span text:style-name="T107">        </text:span><text:span text:style-name="T114">ys</text:span><text:span text:style-name="T107"> </text:span><text:span text:style-name="T113">=</text:span><text:span text:style-name="T107"> </text:span><text:span text:style-name="T109">np</text:span><text:span text:style-name="T107">.</text:span><text:span text:style-name="T110">array</text:span><text:span text:style-name="T107">([</text:span><text:span text:style-name="T114">p</text:span><text:span text:style-name="T107">[</text:span><text:span text:style-name="T111">"y"</text:span><text:span text:style-name="T107">] </text:span><text:span text:style-name="T108">for</text:span><text:span text:style-name="T107"> </text:span><text:span text:style-name="T114">p</text:span><text:span text:style-name="T107"> </text:span><text:span text:style-name="T108">in</text:span><text:span text:style-name="T107"> </text:span><text:span text:style-name="T112">points</text:span><text:span text:style-name="T107">], </text:span><text:span text:style-name="T112">dtype</text:span><text:span text:style-name="T113">=</text:span><text:span text:style-name="T109">np</text:span><text:span text:style-name="T107">.</text:span><text:span text:style-name="T114">float32</text:span><text:span text:style-name="T107">)</text:span></text:p>
      <text:p text:style-name="P112" loext:marker-style-name="T107"><text:span text:style-name="T107">        </text:span><text:span text:style-name="T114">temps</text:span><text:span text:style-name="T107"> </text:span><text:span text:style-name="T113">=</text:span><text:span text:style-name="T107"> </text:span><text:span text:style-name="T109">np</text:span><text:span text:style-name="T107">.</text:span><text:span text:style-name="T110">array</text:span><text:span text:style-name="T107">([</text:span><text:span text:style-name="T114">p</text:span><text:span text:style-name="T107">[</text:span><text:span text:style-name="T111">"temp"</text:span><text:span text:style-name="T107">] </text:span><text:span text:style-name="T108">for</text:span><text:span text:style-name="T107"> </text:span><text:span text:style-name="T114">p</text:span><text:span text:style-name="T107"> </text:span><text:span text:style-name="T108">in</text:span><text:span text:style-name="T107"> </text:span><text:span text:style-name="T112">points</text:span><text:span text:style-name="T107">], </text:span><text:span text:style-name="T112">dtype</text:span><text:span text:style-name="T113">=</text:span><text:span text:style-name="T109">np</text:span><text:span text:style-name="T107">.</text:span><text:span text:style-name="T114">float32</text:span><text:span text:style-name="T107">)</text:span></text:p>
      <text:p text:style-name="P113" loext:marker-style-name="T107"/>
      <text:p text:style-name="P112" loext:marker-style-name="T107"><text:span text:style-name="T107">        </text:span><text:span text:style-name="T114">tmin</text:span><text:span text:style-name="T107"> </text:span><text:span text:style-name="T113">=</text:span><text:span text:style-name="T107"> </text:span><text:span text:style-name="T117">float</text:span><text:span text:style-name="T107">(</text:span><text:span text:style-name="T109">np</text:span><text:span text:style-name="T107">.</text:span><text:span text:style-name="T114">min</text:span><text:span text:style-name="T107">(</text:span><text:span text:style-name="T114">temps</text:span><text:span text:style-name="T107">))</text:span></text:p>
      <text:p text:style-name="P112" loext:marker-style-name="T107"><text:span text:style-name="T107">        </text:span><text:span text:style-name="T114">tmax</text:span><text:span text:style-name="T107"> </text:span><text:span text:style-name="T113">=</text:span><text:span text:style-name="T107"> </text:span><text:span text:style-name="T117">float</text:span><text:span text:style-name="T107">(</text:span><text:span text:style-name="T109">np</text:span><text:span text:style-name="T107">.</text:span><text:span text:style-name="T114">max</text:span><text:span text:style-name="T107">(</text:span><text:span text:style-name="T114">temps</text:span><text:span text:style-name="T107">))</text:span></text:p>
      <text:p text:style-name="P112" loext:marker-style-name="T107"><text:span text:style-name="T107">        </text:span><text:span text:style-name="T114">tavg</text:span><text:span text:style-name="T107"> </text:span><text:span text:style-name="T113">=</text:span><text:span text:style-name="T107"> </text:span><text:span text:style-name="T117">float</text:span><text:span text:style-name="T107">(</text:span><text:span text:style-name="T109">np</text:span><text:span text:style-name="T107">.</text:span><text:span text:style-name="T110">mean</text:span><text:span text:style-name="T107">(</text:span><text:span text:style-name="T114">temps</text:span><text:span text:style-name="T107">))</text:span></text:p>
      <text:p text:style-name="P113" loext:marker-style-name="T107"/>
      <text:p text:style-name="P112" loext:marker-style-name="T107"><text:span text:style-name="T107">        </text:span><text:span text:style-name="T114">grid_y</text:span><text:span text:style-name="T107">, </text:span><text:span text:style-name="T114">grid_x</text:span><text:span text:style-name="T107"> </text:span><text:span text:style-name="T113">=</text:span><text:span text:style-name="T107"> </text:span><text:span text:style-name="T109">np</text:span><text:span text:style-name="T107">.</text:span><text:span text:style-name="T114">mgrid</text:span><text:span text:style-name="T107">[</text:span><text:span text:style-name="T120">0</text:span><text:span text:style-name="T107">:</text:span><text:span text:style-name="T112">height</text:span><text:span text:style-name="T107">, </text:span><text:span text:style-name="T120">0</text:span><text:span text:style-name="T107">:</text:span><text:span text:style-name="T112">width</text:span><text:span text:style-name="T107">]</text:span></text:p>
      <text:p text:style-name="P112" loext:marker-style-name="T107"><text:span text:style-name="T107">        </text:span><text:span text:style-name="T114">grid</text:span><text:span text:style-name="T107"> </text:span><text:span text:style-name="T113">=</text:span><text:span text:style-name="T107"> </text:span><text:span text:style-name="T110">griddata</text:span><text:span text:style-name="T107">((</text:span><text:span text:style-name="T114">xs</text:span><text:span text:style-name="T107">, </text:span><text:span text:style-name="T114">ys</text:span><text:span text:style-name="T107">), </text:span><text:span text:style-name="T114">temps</text:span><text:span text:style-name="T107">, (</text:span><text:span text:style-name="T114">grid_x</text:span><text:span text:style-name="T107">, </text:span><text:span text:style-name="T114">grid_y</text:span><text:span text:style-name="T107">), </text:span><text:span text:style-name="T112">method</text:span><text:span text:style-name="T113">=</text:span><text:span text:style-name="T111">"cubic"</text:span><text:span text:style-name="T107">, </text:span><text:span text:style-name="T112">fill_value</text:span><text:span text:style-name="T113">=</text:span><text:span text:style-name="T109">np</text:span><text:span text:style-name="T107">.</text:span><text:span text:style-name="T114">nan</text:span><text:span text:style-name="T107">)</text:span></text:p>
      <text:p text:style-name="P112" loext:marker-style-name="T107"><text:span text:style-name="T107">        </text:span><text:span text:style-name="T114">mask</text:span><text:span text:style-name="T107"> </text:span><text:span text:style-name="T113">=</text:span><text:span text:style-name="T107"> </text:span><text:span text:style-name="T109">np</text:span><text:span text:style-name="T107">.</text:span><text:span text:style-name="T114">isnan</text:span><text:span text:style-name="T107">(</text:span><text:span text:style-name="T114">grid</text:span><text:span text:style-name="T107">)</text:span></text:p>
      <text:p text:style-name="P113" loext:marker-style-name="T107"/>
      <text:p text:style-name="P112" loext:marker-style-name="T107"><text:span text:style-name="T107">        </text:span><text:span text:style-name="T108">if</text:span><text:span text:style-name="T107"> </text:span><text:span text:style-name="T109">np</text:span><text:span text:style-name="T107">.</text:span><text:span text:style-name="T110">all</text:span><text:span text:style-name="T107">(</text:span><text:span text:style-name="T114">mask</text:span><text:span text:style-name="T107">):</text:span></text:p>
      <text:p text:style-name="P112" loext:marker-style-name="T107"><text:span text:style-name="T107">            </text:span><text:span text:style-name="T108">return</text:span><text:span text:style-name="T107"> </text:span><text:span text:style-name="T118">None</text:span><text:span text:style-name="T107">, </text:span><text:span text:style-name="T114">tmin</text:span><text:span text:style-name="T107">, </text:span><text:span text:style-name="T114">tmax</text:span><text:span text:style-name="T107">, </text:span><text:span text:style-name="T114">tavg</text:span></text:p>
      <text:p text:style-name="P113" loext:marker-style-name="T107"/>
      <text:p text:style-name="P112" loext:marker-style-name="T107"><text:span text:style-name="T107">        </text:span><text:span text:style-name="T114">mean_temp</text:span><text:span text:style-name="T107"> </text:span><text:span text:style-name="T113">=</text:span><text:span text:style-name="T107"> </text:span><text:span text:style-name="T109">np</text:span><text:span text:style-name="T107">.</text:span><text:span text:style-name="T114">nanmean</text:span><text:span text:style-name="T107">(</text:span><text:span text:style-name="T114">grid</text:span><text:span text:style-name="T107">)</text:span></text:p>
      <text:p text:style-name="P112" loext:marker-style-name="T107"><text:span text:style-name="T107">        </text:span><text:span text:style-name="T114">grid</text:span><text:span text:style-name="T107">[</text:span><text:span text:style-name="T114">mask</text:span><text:span text:style-name="T107">] </text:span><text:span text:style-name="T113">=</text:span><text:span text:style-name="T107"> </text:span><text:span text:style-name="T114">mean_temp</text:span></text:p>
      <text:p text:style-name="P112" loext:marker-style-name="T107"><text:span text:style-name="T107">        </text:span><text:span text:style-name="T114">grid</text:span><text:span text:style-name="T107"> </text:span><text:span text:style-name="T113">=</text:span><text:span text:style-name="T107"> </text:span><text:span text:style-name="T110">gaussian_filter</text:span><text:span text:style-name="T107">(</text:span><text:span text:style-name="T114">grid</text:span><text:span text:style-name="T107">, </text:span><text:span text:style-name="T112">sigma</text:span><text:span text:style-name="T113">=</text:span><text:span text:style-name="T112">sigma</text:span><text:span text:style-name="T107">)</text:span></text:p>
      <text:p text:style-name="P113" loext:marker-style-name="T107"/>
      <text:p text:style-name="P112" loext:marker-style-name="T107"><text:span text:style-name="T107">        </text:span><text:span text:style-name="T108">if</text:span><text:span text:style-name="T107"> </text:span><text:span text:style-name="T110">abs</text:span><text:span text:style-name="T107">(</text:span><text:span text:style-name="T114">tmax</text:span><text:span text:style-name="T107"> </text:span><text:span text:style-name="T113">-</text:span><text:span text:style-name="T107"> </text:span><text:span text:style-name="T114">tmin</text:span><text:span text:style-name="T107">) </text:span><text:span text:style-name="T113">&lt;</text:span><text:span text:style-name="T107"> </text:span><text:span text:style-name="T120">0.001</text:span><text:span text:style-name="T107">:</text:span></text:p>
      <text:p text:style-name="P112" loext:marker-style-name="T107"><text:span text:style-name="T107">            </text:span><text:span text:style-name="T114">norm</text:span><text:span text:style-name="T107"> </text:span><text:span text:style-name="T113">=</text:span><text:span text:style-name="T107"> </text:span><text:span text:style-name="T109">np</text:span><text:span text:style-name="T107">.</text:span><text:span text:style-name="T110">zeros_like</text:span><text:span text:style-name="T107">(</text:span><text:span text:style-name="T114">grid</text:span><text:span text:style-name="T107">)</text:span></text:p>
      <text:p text:style-name="P113" loext:marker-style-name="T107"/>
      <text:p text:style-name="P112" loext:marker-style-name="T107"><text:soft-page-break/><text:span text:style-name="T107">        </text:span><text:span text:style-name="T108">else</text:span><text:span text:style-name="T107">:</text:span></text:p>
      <text:p text:style-name="P112" loext:marker-style-name="T107"><text:span text:style-name="T107">            </text:span><text:span text:style-name="T114">norm</text:span><text:span text:style-name="T107"> </text:span><text:span text:style-name="T113">=</text:span><text:span text:style-name="T107"> (</text:span><text:span text:style-name="T114">grid</text:span><text:span text:style-name="T107"> </text:span><text:span text:style-name="T113">-</text:span><text:span text:style-name="T107"> </text:span><text:span text:style-name="T114">tmin</text:span><text:span text:style-name="T107">) </text:span><text:span text:style-name="T117">/</text:span><text:span text:style-name="T107"> (</text:span><text:span text:style-name="T114">tmax</text:span><text:span text:style-name="T107"> </text:span><text:span text:style-name="T113">-</text:span><text:span text:style-name="T107"> </text:span><text:span text:style-name="T114">tmin</text:span><text:span text:style-name="T107">)</text:span></text:p>
      <text:p text:style-name="P113" loext:marker-style-name="T107"/>
      <text:p text:style-name="P112" loext:marker-style-name="T107"><text:span text:style-name="T107">        </text:span><text:span text:style-name="T114">norm</text:span><text:span text:style-name="T107"> </text:span><text:span text:style-name="T113">=</text:span><text:span text:style-name="T107"> </text:span><text:span text:style-name="T109">np</text:span><text:span text:style-name="T107">.</text:span><text:span text:style-name="T110">clip</text:span><text:span text:style-name="T107">(</text:span><text:span text:style-name="T114">norm</text:span><text:span text:style-name="T107">, </text:span><text:span text:style-name="T120">0</text:span><text:span text:style-name="T107">, </text:span><text:span text:style-name="T120">1</text:span><text:span text:style-name="T107">)</text:span></text:p>
      <text:p text:style-name="P113" loext:marker-style-name="T107"/>
      <text:p text:style-name="P112" loext:marker-style-name="T107"><text:span text:style-name="T107">        </text:span><text:span text:style-name="T114">heatmap</text:span><text:span text:style-name="T107"> </text:span><text:span text:style-name="T113">=</text:span><text:span text:style-name="T107"> </text:span><text:span text:style-name="T109">np</text:span><text:span text:style-name="T107">.</text:span><text:span text:style-name="T110">zeros</text:span><text:span text:style-name="T107">((</text:span><text:span text:style-name="T112">height</text:span><text:span text:style-name="T107">, </text:span><text:span text:style-name="T112">width</text:span><text:span text:style-name="T107">, </text:span><text:span text:style-name="T120">4</text:span><text:span text:style-name="T107">), </text:span><text:span text:style-name="T112">dtype</text:span><text:span text:style-name="T113">=</text:span><text:span text:style-name="T109">np</text:span><text:span text:style-name="T107">.</text:span><text:span text:style-name="T114">uint8</text:span><text:span text:style-name="T107">)</text:span></text:p>
      <text:p text:style-name="P113" loext:marker-style-name="T107"/>
      <text:p text:style-name="P112" loext:marker-style-name="T107"><text:span text:style-name="T107">        </text:span><text:span text:style-name="T114">cold</text:span><text:span text:style-name="T107"> </text:span><text:span text:style-name="T113">=</text:span><text:span text:style-name="T107"> </text:span><text:span text:style-name="T109">np</text:span><text:span text:style-name="T107">.</text:span><text:span text:style-name="T110">array</text:span><text:span text:style-name="T107">([</text:span><text:span text:style-name="T120">0</text:span><text:span text:style-name="T107">, </text:span><text:span text:style-name="T120">0</text:span><text:span text:style-name="T107">, </text:span><text:span text:style-name="T120">139</text:span><text:span text:style-name="T107">], </text:span><text:span text:style-name="T112">dtype</text:span><text:span text:style-name="T113">=</text:span><text:span text:style-name="T109">np</text:span><text:span text:style-name="T107">.</text:span><text:span text:style-name="T114">float32</text:span><text:span text:style-name="T107">)</text:span></text:p>
      <text:p text:style-name="P112" loext:marker-style-name="T107"><text:span text:style-name="T107">        </text:span><text:span text:style-name="T114">hot</text:span><text:span text:style-name="T107"> </text:span><text:span text:style-name="T113">=</text:span><text:span text:style-name="T107"> </text:span><text:span text:style-name="T109">np</text:span><text:span text:style-name="T107">.</text:span><text:span text:style-name="T110">array</text:span><text:span text:style-name="T107">([</text:span><text:span text:style-name="T120">139</text:span><text:span text:style-name="T107">, </text:span><text:span text:style-name="T120">0</text:span><text:span text:style-name="T107">, </text:span><text:span text:style-name="T120">0</text:span><text:span text:style-name="T107">], </text:span><text:span text:style-name="T112">dtype</text:span><text:span text:style-name="T113">=</text:span><text:span text:style-name="T109">np</text:span><text:span text:style-name="T107">.</text:span><text:span text:style-name="T114">float32</text:span><text:span text:style-name="T107">)</text:span></text:p>
      <text:p text:style-name="P112" loext:marker-style-name="T107"><text:span text:style-name="T107">        </text:span><text:span text:style-name="T114">rgb</text:span><text:span text:style-name="T107"> </text:span><text:span text:style-name="T113">=</text:span><text:span text:style-name="T107"> (</text:span><text:span text:style-name="T114">cold</text:span><text:span text:style-name="T107"> </text:span><text:span text:style-name="T117">*</text:span><text:span text:style-name="T107"> (</text:span><text:span text:style-name="T120">1</text:span><text:span text:style-name="T107"> </text:span><text:span text:style-name="T113">-</text:span><text:span text:style-name="T107"> </text:span><text:span text:style-name="T114">norm</text:span><text:span text:style-name="T107">[:, :, </text:span><text:span text:style-name="T118">None</text:span><text:span text:style-name="T107">]) </text:span><text:span text:style-name="T117">+</text:span><text:span text:style-name="T107"> </text:span><text:span text:style-name="T114">hot</text:span><text:span text:style-name="T107"> </text:span><text:span text:style-name="T117">*</text:span><text:span text:style-name="T107"> </text:span><text:span text:style-name="T114">norm</text:span><text:span text:style-name="T107">[:, :, </text:span><text:span text:style-name="T118">None</text:span><text:span text:style-name="T107">])</text:span></text:p>
      <text:p text:style-name="P113" loext:marker-style-name="T107"/>
      <text:p text:style-name="P112" loext:marker-style-name="T107"><text:span text:style-name="T107">        </text:span><text:span text:style-name="T114">heatmap</text:span><text:span text:style-name="T107">[:, :, :</text:span><text:span text:style-name="T120">3</text:span><text:span text:style-name="T107">] </text:span><text:span text:style-name="T113">=</text:span><text:span text:style-name="T107"> </text:span><text:span text:style-name="T114">rgb</text:span><text:span text:style-name="T107">.</text:span><text:span text:style-name="T110">astype</text:span><text:span text:style-name="T107">(</text:span><text:span text:style-name="T109">np</text:span><text:span text:style-name="T107">.</text:span><text:span text:style-name="T114">uint8</text:span><text:span text:style-name="T107">)</text:span></text:p>
      <text:p text:style-name="P112" loext:marker-style-name="T107"><text:span text:style-name="T107">        </text:span><text:span text:style-name="T114">heatmap</text:span><text:span text:style-name="T107">[:, :, </text:span><text:span text:style-name="T120">3</text:span><text:span text:style-name="T107">] </text:span><text:span text:style-name="T113">=</text:span><text:span text:style-name="T107"> </text:span><text:span text:style-name="T120">180</text:span></text:p>
      <text:p text:style-name="P112" loext:marker-style-name="T107"><text:span text:style-name="T107">        </text:span><text:span text:style-name="T114">heatmap_img</text:span><text:span text:style-name="T107"> </text:span><text:span text:style-name="T113">=</text:span><text:span text:style-name="T107"> </text:span><text:span text:style-name="T109">Image</text:span><text:span text:style-name="T107">.</text:span><text:span text:style-name="T110">fromarray</text:span><text:span text:style-name="T107">(</text:span><text:span text:style-name="T114">heatmap</text:span><text:span text:style-name="T107">, </text:span><text:span text:style-name="T112">mode</text:span><text:span text:style-name="T113">=</text:span><text:span text:style-name="T111">"RGBA"</text:span><text:span text:style-name="T107"> )</text:span></text:p>
      <text:p text:style-name="P113" loext:marker-style-name="T107"/>
      <text:p text:style-name="P112" loext:marker-style-name="T107"><text:span text:style-name="T107">        </text:span><text:span text:style-name="T108">return</text:span><text:span text:style-name="T107"> (</text:span><text:span text:style-name="T114">heatmap_img</text:span><text:span text:style-name="T107">, </text:span><text:span text:style-name="T114">tmin</text:span><text:span text:style-name="T107">, </text:span><text:span text:style-name="T114">tmax</text:span><text:span text:style-name="T107">, </text:span><text:span text:style-name="T114">tavg</text:span><text:span text:style-name="T107">)</text:span></text:p>
      <text:p text:style-name="P115" loext:marker-style-name="T107"/>
      <text:p text:style-name="P112" loext:marker-style-name="T107"><text:span text:style-name="T107">    </text:span><text:span text:style-name="T110">@</text:span><text:span text:style-name="T109">staticmethod</text:span></text:p>
      <text:p text:style-name="P112" loext:marker-style-name="T107"><text:span text:style-name="T107">    </text:span><text:span text:style-name="T116">def</text:span><text:span text:style-name="T107"> </text:span><text:span text:style-name="T110">overlay</text:span><text:span text:style-name="T107">(</text:span><text:span text:style-name="T112">image</text:span><text:span text:style-name="T107">, </text:span><text:span text:style-name="T112">heatmap</text:span><text:span text:style-name="T107">):</text:span></text:p>
      <text:p text:style-name="P113" loext:marker-style-name="T107"/>
      <text:p text:style-name="P112" loext:marker-style-name="T107"><text:span text:style-name="T107">        </text:span><text:span text:style-name="T114">base</text:span><text:span text:style-name="T107"> </text:span><text:span text:style-name="T113">=</text:span><text:span text:style-name="T107"> </text:span><text:span text:style-name="T112">image</text:span><text:span text:style-name="T107">.convert(</text:span><text:span text:style-name="T111">"RGBA"</text:span><text:span text:style-name="T107">)</text:span></text:p>
      <text:p text:style-name="P113" loext:marker-style-name="T107"/>
      <text:p text:style-name="P112" loext:marker-style-name="T107"><text:span text:style-name="T107">        </text:span><text:span text:style-name="T108">return</text:span><text:span text:style-name="T107"> </text:span><text:span text:style-name="T109">Image</text:span><text:span text:style-name="T107">.</text:span><text:span text:style-name="T110">alpha_composite</text:span><text:span text:style-name="T107">(</text:span><text:span text:style-name="T114">base</text:span><text:span text:style-name="T107">, </text:span><text:span text:style-name="T112">heatmap</text:span><text:span text:style-name="T107">)</text:span></text:p>
      <text:p text:style-name="P115" loext:marker-style-name="T107"/>
      <text:p text:style-name="P112" loext:marker-style-name="T107"><text:span text:style-name="T107">    </text:span><text:span text:style-name="T110">@</text:span><text:span text:style-name="T109">staticmethod</text:span></text:p>
      <text:p text:style-name="P112" loext:marker-style-name="T107"><text:span text:style-name="T107">    </text:span><text:span text:style-name="T116">def</text:span><text:span text:style-name="T107"> </text:span><text:span text:style-name="T110">build_overlay</text:span><text:span text:style-name="T107">(</text:span><text:span text:style-name="T112">image</text:span><text:span text:style-name="T107">, </text:span><text:span text:style-name="T112">points</text:span><text:span text:style-name="T107">):</text:span></text:p>
      <text:p text:style-name="P113" loext:marker-style-name="T107"/>
      <text:p text:style-name="P112" loext:marker-style-name="T107"><text:span text:style-name="T107">        </text:span><text:span text:style-name="T114">width</text:span><text:span text:style-name="T107">, </text:span><text:span text:style-name="T114">height</text:span><text:span text:style-name="T107"> </text:span><text:span text:style-name="T113">=</text:span><text:span text:style-name="T107"> </text:span><text:span text:style-name="T112">image</text:span><text:span text:style-name="T107">.size</text:span></text:p>
      <text:p text:style-name="P112" loext:marker-style-name="T107"><text:span text:style-name="T107">        (</text:span><text:span text:style-name="T114">heatmap</text:span><text:span text:style-name="T107">, </text:span><text:span text:style-name="T114">tmin</text:span><text:span text:style-name="T107">, </text:span><text:span text:style-name="T114">tmax</text:span><text:span text:style-name="T107">, </text:span><text:span text:style-name="T114">tavg</text:span><text:span text:style-name="T107">) </text:span><text:span text:style-name="T113">=</text:span><text:span text:style-name="T107"> </text:span><text:span text:style-name="T109">HeatMapBuilder</text:span><text:span text:style-name="T107">.</text:span><text:span text:style-name="T110">build_heatmap</text:span><text:span text:style-name="T107">(</text:span><text:span text:style-name="T114">width</text:span><text:span text:style-name="T107">, </text:span><text:span text:style-name="T114">height</text:span><text:span text:style-name="T107">, </text:span><text:span text:style-name="T112">points</text:span><text:span text:style-name="T107">)</text:span></text:p>
      <text:p text:style-name="P113" loext:marker-style-name="T107"/>
      <text:p text:style-name="P112" loext:marker-style-name="T107"><text:span text:style-name="T107">        </text:span><text:span text:style-name="T108">if</text:span><text:span text:style-name="T107"> </text:span><text:span text:style-name="T114">heatmap</text:span><text:span text:style-name="T107"> </text:span><text:span text:style-name="T121">is</text:span><text:span text:style-name="T107"> </text:span><text:span text:style-name="T118">None</text:span><text:span text:style-name="T107">:</text:span></text:p>
      <text:p text:style-name="P112" loext:marker-style-name="T107"><text:span text:style-name="T107">            </text:span><text:span text:style-name="T108">return</text:span><text:span text:style-name="T107"> (</text:span><text:span text:style-name="T112">image</text:span><text:span text:style-name="T107">, </text:span><text:span text:style-name="T114">tmin</text:span><text:span text:style-name="T107">, </text:span><text:span text:style-name="T114">tmax</text:span><text:span text:style-name="T107">, </text:span><text:span text:style-name="T114">tavg</text:span><text:span text:style-name="T107">)</text:span></text:p>
      <text:p text:style-name="P113" loext:marker-style-name="T107"/>
      <text:p text:style-name="P112" loext:marker-style-name="T107"><text:span text:style-name="T107">        </text:span><text:span text:style-name="T114">result</text:span><text:span text:style-name="T107"> </text:span><text:span text:style-name="T113">=</text:span><text:span text:style-name="T107"> </text:span><text:span text:style-name="T109">HeatMapBuilder</text:span><text:span text:style-name="T107">.</text:span><text:span text:style-name="T110">overlay</text:span><text:span text:style-name="T107">(</text:span><text:span text:style-name="T112">image</text:span><text:span text:style-name="T107">, </text:span><text:span text:style-name="T114">heatmap</text:span><text:span text:style-name="T107">)</text:span></text:p>
      <text:p text:style-name="P113" loext:marker-style-name="T107"/>
      <text:p text:style-name="P112" loext:marker-style-name="T107"><text:span text:style-name="T107">        </text:span><text:span text:style-name="T108">return</text:span><text:span text:style-name="T107"> (result, tmin, tmax, tavg)</text:span></text:p>
      <text:p text:style-name="P117" loext:marker-style-name="T127"/>
      <text:p text:style-name="P111" loext:marker-style-name="T106"><text:span text:style-name="T106">session_selector.py</text:span><text:span text:style-name="T106"/></text:p>
      <text:p text:style-name="P119" loext:marker-style-name="T129"/>
      <text:p text:style-name="P112" loext:marker-style-name="T107"><text:span text:style-name="T108">import</text:span><text:span text:style-name="T107"> </text:span><text:span text:style-name="T109">tkinter</text:span><text:span text:style-name="T107"> </text:span><text:span text:style-name="T108">as</text:span><text:span text:style-name="T107"> </text:span><text:span text:style-name="T109">tk</text:span></text:p>
      <text:p text:style-name="P112" loext:marker-style-name="T107"><text:span text:style-name="T108">from</text:span><text:span text:style-name="T107"> </text:span><text:span text:style-name="T109">tkinter</text:span><text:span text:style-name="T107"> </text:span><text:span text:style-name="T108">import</text:span><text:span text:style-name="T107"> </text:span><text:span text:style-name="T109">ttk</text:span></text:p>
      <text:p text:style-name="P112" loext:marker-style-name="T107"><text:span text:style-name="T108">from</text:span><text:span text:style-name="T107"> </text:span><text:span text:style-name="T109">database</text:span><text:span text:style-name="T107"> </text:span><text:span text:style-name="T108">import</text:span><text:span text:style-name="T107"> </text:span><text:span text:style-name="T109">DatabaseManager</text:span></text:p>
      <text:p text:style-name="P112" loext:marker-style-name="T107"><text:span text:style-name="T108">from</text:span><text:span text:style-name="T107"> </text:span><text:span text:style-name="T109">gui</text:span><text:span text:style-name="T107"> </text:span><text:span text:style-name="T108">import</text:span><text:span text:style-name="T107"> </text:span><text:span text:style-name="T109">ThermalMonitorApp</text:span></text:p>
      <text:p text:style-name="P113" loext:marker-style-name="T107"/>
      <text:p text:style-name="P112" loext:marker-style-name="T107"><text:span text:style-name="T116">class</text:span><text:span text:style-name="T107"> </text:span><text:span text:style-name="T109">SessionSelector</text:span><text:span text:style-name="T107">:</text:span></text:p>
      <text:p text:style-name="P113" loext:marker-style-name="T107"/>
      <text:p text:style-name="P112" loext:marker-style-name="T107"><text:span text:style-name="T107">    </text:span><text:span text:style-name="T116">def</text:span><text:span text:style-name="T107"> </text:span><text:span text:style-name="T117">__init__</text:span><text:span text:style-name="T107">(</text:span><text:span text:style-name="T114">self</text:span><text:span text:style-name="T107">, </text:span><text:span text:style-name="T112">settings</text:span><text:span text:style-name="T107">):</text:span></text:p>
      <text:p text:style-name="P112" loext:marker-style-name="T107"><text:span text:style-name="T107">        </text:span><text:span text:style-name="T114">self</text:span><text:span text:style-name="T107">.</text:span><text:span text:style-name="T114">settings</text:span><text:span text:style-name="T107"> </text:span><text:span text:style-name="T113">=</text:span><text:span text:style-name="T107"> </text:span><text:span text:style-name="T112">settings</text:span></text:p>
      <text:p text:style-name="P112" loext:marker-style-name="T107"><text:span text:style-name="T107">        </text:span><text:span text:style-name="T114">self</text:span><text:span text:style-name="T107">.</text:span><text:span text:style-name="T114">db</text:span><text:span text:style-name="T107"> </text:span><text:span text:style-name="T113">=</text:span><text:span text:style-name="T107"> </text:span><text:span text:style-name="T109">DatabaseManager</text:span><text:span text:style-name="T107">(</text:span><text:span text:style-name="T112">settings</text:span><text:span text:style-name="T107">)</text:span></text:p>
      <text:p text:style-name="P113" loext:marker-style-name="T107"/>
      <text:p text:style-name="P112" loext:marker-style-name="T107"><text:span text:style-name="T107">        </text:span><text:span text:style-name="T114">self</text:span><text:span text:style-name="T107">.</text:span><text:span text:style-name="T114">root</text:span><text:span text:style-name="T107"> </text:span><text:span text:style-name="T113">=</text:span><text:span text:style-name="T107"> </text:span><text:span text:style-name="T109">tk</text:span><text:span text:style-name="T107">.</text:span><text:span text:style-name="T109">Tk</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4">title</text:span><text:span text:style-name="T107">(</text:span><text:span text:style-name="T111">"</text:span><text:span text:style-name="T119">Выбор</text:span><text:span text:style-name="T111"> </text:span><text:span text:style-name="T119">сессии</text:span><text:span text:style-name="T111">"</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4">geometry</text:span><text:span text:style-name="T107">(</text:span><text:span text:style-name="T111">"700x500"</text:span><text:span text:style-name="T107">)</text:span></text:p>
      <text:p text:style-name="P113" loext:marker-style-name="T107"/>
      <text:p text:style-name="P112" loext:marker-style-name="T107"><text:span text:style-name="T107">        </text:span><text:span text:style-name="T114">self</text:span><text:span text:style-name="T107">.</text:span><text:span text:style-name="T114">sessions</text:span><text:span text:style-name="T107"> </text:span><text:span text:style-name="T113">=</text:span><text:span text:style-name="T107"> </text:span><text:span text:style-name="T109">tk</text:span><text:span text:style-name="T107">.</text:span><text:span text:style-name="T109">Listbox</text:span><text:span text:style-name="T107">(</text:span><text:span text:style-name="T114">self</text:span><text:span text:style-name="T107">.</text:span><text:span text:style-name="T114">root</text:span><text:span text:style-name="T107">)</text:span></text:p>
      <text:p text:style-name="P112" loext:marker-style-name="T107"><text:span text:style-name="T107">        </text:span><text:span text:style-name="T114">self</text:span><text:span text:style-name="T107">.</text:span><text:span text:style-name="T114">sessions</text:span><text:span text:style-name="T107">.</text:span><text:span text:style-name="T114">pack</text:span><text:span text:style-name="T107">(</text:span><text:span text:style-name="T112">fill</text:span><text:span text:style-name="T113">=</text:span><text:span text:style-name="T111">"both"</text:span><text:span text:style-name="T107">, </text:span><text:span text:style-name="T112">expand</text:span><text:span text:style-name="T113">=</text:span><text:span text:style-name="T118">True</text:span><text:span text:style-name="T107">, </text:span><text:span text:style-name="T112">padx</text:span><text:span text:style-name="T113">=</text:span><text:span text:style-name="T120">10</text:span><text:span text:style-name="T107">, </text:span><text:span text:style-name="T112">pady</text:span><text:span text:style-name="T113">=</text:span><text:span text:style-name="T120">10</text:span><text:span text:style-name="T107">)</text:span></text:p>
      <text:p text:style-name="P113" loext:marker-style-name="T107"/>
      <text:p text:style-name="P112" loext:marker-style-name="T107"><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 </text:span><text:span text:style-name="T112">text</text:span><text:span text:style-name="T113">=</text:span><text:span text:style-name="T111">"</text:span><text:span text:style-name="T119">Открыть</text:span><text:span text:style-name="T111">"</text:span><text:span text:style-name="T107">, </text:span><text:span text:style-name="T112">command</text:span><text:span text:style-name="T113">=</text:span><text:span text:style-name="T114">self</text:span><text:span text:style-name="T107">.</text:span><text:span text:style-name="T110">open_session</text:span><text:span text:style-name="T107">).</text:span><text:span text:style-name="T114">pack</text:span><text:span text:style-name="T107">(</text:span><text:span text:style-name="T112">fill</text:span><text:span text:style-name="T113">=</text:span><text:span text:style-name="T111">"x"</text:span><text:span text:style-name="T107">, </text:span><text:span text:style-name="T112">padx</text:span><text:span text:style-name="T113">=</text:span><text:span text:style-name="T120">10</text:span><text:span text:style-name="T107">, </text:span><text:span text:style-name="T112">pady</text:span><text:span text:style-name="T113">=</text:span><text:span text:style-name="T120">5</text:span><text:span text:style-name="T107">)</text:span></text:p>
      <text:p text:style-name="P112" loext:marker-style-name="T107"><text:span text:style-name="T107">        </text:span><text:span text:style-name="T109">ttk</text:span><text:span text:style-name="T107">.</text:span><text:span text:style-name="T109">Button</text:span><text:span text:style-name="T107">(</text:span><text:span text:style-name="T114">self</text:span><text:span text:style-name="T107">.</text:span><text:span text:style-name="T114">root</text:span><text:span text:style-name="T107">, </text:span><text:span text:style-name="T112">text</text:span><text:span text:style-name="T113">=</text:span><text:span text:style-name="T111">"</text:span><text:span text:style-name="T119">Создать</text:span><text:span text:style-name="T111"> </text:span><text:span text:style-name="T119">новую</text:span><text:span text:style-name="T111"> </text:span><text:span text:style-name="T119">сессию</text:span><text:span text:style-name="T111">"</text:span><text:span text:style-name="T107">, </text:span><text:span text:style-name="T112">command</text:span><text:span text:style-name="T113">=</text:span><text:span text:style-name="T114">self</text:span><text:span text:style-name="T107">.</text:span><text:span text:style-name="T110">create_session</text:span><text:span text:style-name="T107">).</text:span><text:span text:style-name="T114">pack</text:span><text:span text:style-name="T107">(</text:span><text:span text:style-name="T112">fill</text:span><text:span text:style-name="T113">=</text:span><text:span text:style-name="T111">"x"</text:span><text:span text:style-name="T107">, </text:span><text:span text:style-name="T112">padx</text:span><text:span text:style-name="T113">=</text:span><text:span text:style-name="T120">10</text:span><text:span text:style-name="T107">, </text:span><text:span text:style-name="T112">pady</text:span><text:span text:style-name="T113">=</text:span><text:span text:style-name="T120">5</text:span><text:span text:style-name="T107">)</text:span></text:p>
      <text:p text:style-name="P113" loext:marker-style-name="T107"/>
      <text:p text:style-name="P112" loext:marker-style-name="T107"><text:span text:style-name="T107">        </text:span><text:span text:style-name="T114">self</text:span><text:span text:style-name="T107">.</text:span><text:span text:style-name="T110">load_sessions</text:span><text:span text:style-name="T107">()</text:span></text:p>
      <text:p text:style-name="P113" loext:marker-style-name="T107"/>
      <text:p text:style-name="P112" loext:marker-style-name="T107"><text:soft-page-break/><text:span text:style-name="T107">    </text:span><text:span text:style-name="T116">def</text:span><text:span text:style-name="T107"> </text:span><text:span text:style-name="T110">load_sessions</text:span><text:span text:style-name="T107">(</text:span><text:span text:style-name="T114">self</text:span><text:span text:style-name="T107">):</text:span></text:p>
      <text:p text:style-name="P112" loext:marker-style-name="T107"><text:span text:style-name="T107">        </text:span><text:span text:style-name="T114">self</text:span><text:span text:style-name="T107">.</text:span><text:span text:style-name="T114">sessions</text:span><text:span text:style-name="T107">.</text:span><text:span text:style-name="T110">delete</text:span><text:span text:style-name="T107">(</text:span><text:span text:style-name="T120">0</text:span><text:span text:style-name="T107">, </text:span><text:span text:style-name="T109">tk</text:span><text:span text:style-name="T107">.</text:span><text:span text:style-name="T114">END</text:span><text:span text:style-name="T107">)</text:span></text:p>
      <text:p text:style-name="P112" loext:marker-style-name="T107"><text:span text:style-name="T107">        </text:span><text:span text:style-name="T108">for</text:span><text:span text:style-name="T107"> </text:span><text:span text:style-name="T114">s</text:span><text:span text:style-name="T107"> </text:span><text:span text:style-name="T108">in</text:span><text:span text:style-name="T107"> </text:span><text:span text:style-name="T114">self</text:span><text:span text:style-name="T107">.</text:span><text:span text:style-name="T114">db</text:span><text:span text:style-name="T107">.</text:span><text:span text:style-name="T110">get_sessions</text:span><text:span text:style-name="T107">():</text:span></text:p>
      <text:p text:style-name="P112" loext:marker-style-name="T107"><text:span text:style-name="T107">            </text:span><text:span text:style-name="T114">self</text:span><text:span text:style-name="T107">.</text:span><text:span text:style-name="T114">sessions</text:span><text:span text:style-name="T107">.</text:span><text:span text:style-name="T110">insert</text:span><text:span text:style-name="T107">(</text:span><text:span text:style-name="T109">tk</text:span><text:span text:style-name="T107">.</text:span><text:span text:style-name="T114">END</text:span><text:span text:style-name="T107">, </text:span><text:span text:style-name="T116">f</text:span><text:span text:style-name="T111">"</text:span><text:span text:style-name="T119">Сессия</text:span><text:span text:style-name="T111"> №</text:span><text:span text:style-name="T116">{</text:span><text:span text:style-name="T114">s</text:span><text:span text:style-name="T107">[</text:span><text:span text:style-name="T111">'id'</text:span><text:span text:style-name="T107">]</text:span><text:span text:style-name="T116">}</text:span><text:span text:style-name="T111"> | </text:span><text:span text:style-name="T116">{</text:span><text:span text:style-name="T114">s</text:span><text:span text:style-name="T107">[</text:span><text:span text:style-name="T111">'created_at'</text:span><text:span text:style-name="T107">]</text:span><text:span text:style-name="T116">}</text:span><text:span text:style-name="T111">"</text:span><text:span text:style-name="T107">)</text:span></text:p>
      <text:p text:style-name="P113" loext:marker-style-name="T107"/>
      <text:p text:style-name="P112" loext:marker-style-name="T107"><text:span text:style-name="T107">    </text:span><text:span text:style-name="T116">def</text:span><text:span text:style-name="T107"> </text:span><text:span text:style-name="T110">create_session</text:span><text:span text:style-name="T107">(</text:span><text:span text:style-name="T114">self</text:span><text:span text:style-name="T107">):</text:span></text:p>
      <text:p text:style-name="P112" loext:marker-style-name="T107"><text:span text:style-name="T107">        </text:span><text:span text:style-name="T114">session_id</text:span><text:span text:style-name="T107"> </text:span><text:span text:style-name="T113">=</text:span><text:span text:style-name="T107"> </text:span><text:span text:style-name="T114">self</text:span><text:span text:style-name="T107">.</text:span><text:span text:style-name="T114">db</text:span><text:span text:style-name="T107">.</text:span><text:span text:style-name="T110">create_session</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0">destroy</text:span><text:span text:style-name="T107">()</text:span></text:p>
      <text:p text:style-name="P112" loext:marker-style-name="T107"><text:span text:style-name="T107">        </text:span><text:span text:style-name="T109">ThermalMonitorApp</text:span><text:span text:style-name="T107">(</text:span><text:span text:style-name="T114">self</text:span><text:span text:style-name="T107">.</text:span><text:span text:style-name="T114">settings</text:span><text:span text:style-name="T107">, </text:span><text:span text:style-name="T114">session_id</text:span><text:span text:style-name="T107">, </text:span><text:span text:style-name="T112">is_new_session</text:span><text:span text:style-name="T113">=</text:span><text:span text:style-name="T118">True</text:span><text:span text:style-name="T107">).</text:span><text:span text:style-name="T110">run</text:span><text:span text:style-name="T107">()</text:span></text:p>
      <text:p text:style-name="P113" loext:marker-style-name="T107"/>
      <text:p text:style-name="P112" loext:marker-style-name="T107"><text:span text:style-name="T107">    </text:span><text:span text:style-name="T116">def</text:span><text:span text:style-name="T107"> </text:span><text:span text:style-name="T110">open_session</text:span><text:span text:style-name="T107">(</text:span><text:span text:style-name="T114">self</text:span><text:span text:style-name="T107">):</text:span></text:p>
      <text:p text:style-name="P112" loext:marker-style-name="T107"><text:span text:style-name="T107">        </text:span><text:span text:style-name="T114">sel</text:span><text:span text:style-name="T107"> </text:span><text:span text:style-name="T113">=</text:span><text:span text:style-name="T107"> </text:span><text:span text:style-name="T114">self</text:span><text:span text:style-name="T107">.</text:span><text:span text:style-name="T114">sessions</text:span><text:span text:style-name="T107">.</text:span><text:span text:style-name="T110">curselection</text:span><text:span text:style-name="T107">()</text:span></text:p>
      <text:p text:style-name="P112" loext:marker-style-name="T107"><text:span text:style-name="T107">        </text:span><text:span text:style-name="T108">if</text:span><text:span text:style-name="T107"> </text:span><text:span text:style-name="T121">not</text:span><text:span text:style-name="T107"> </text:span><text:span text:style-name="T114">sel</text:span><text:span text:style-name="T107">:</text:span></text:p>
      <text:p text:style-name="P112" loext:marker-style-name="T107"><text:span text:style-name="T107">            </text:span><text:span text:style-name="T108">return</text:span></text:p>
      <text:p text:style-name="P112" loext:marker-style-name="T107"><text:span text:style-name="T107">        </text:span><text:span text:style-name="T114">session</text:span><text:span text:style-name="T107"> </text:span><text:span text:style-name="T113">=</text:span><text:span text:style-name="T107"> </text:span><text:span text:style-name="T114">self</text:span><text:span text:style-name="T107">.</text:span><text:span text:style-name="T114">db</text:span><text:span text:style-name="T107">.</text:span><text:span text:style-name="T110">get_sessions</text:span><text:span text:style-name="T107">()[</text:span><text:span text:style-name="T114">sel</text:span><text:span text:style-name="T107">[</text:span><text:span text:style-name="T120">0</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0">destroy</text:span><text:span text:style-name="T107">()</text:span></text:p>
      <text:p text:style-name="P112" loext:marker-style-name="T107"><text:span text:style-name="T107">        </text:span><text:span text:style-name="T109">ThermalMonitorApp</text:span><text:span text:style-name="T107">(</text:span><text:span text:style-name="T114">self</text:span><text:span text:style-name="T107">.</text:span><text:span text:style-name="T114">settings</text:span><text:span text:style-name="T107">, </text:span><text:span text:style-name="T114">session</text:span><text:span text:style-name="T107">[</text:span><text:span text:style-name="T111">"id"</text:span><text:span text:style-name="T107">], </text:span><text:span text:style-name="T112">is_new_session</text:span><text:span text:style-name="T113">=</text:span><text:span text:style-name="T118">False</text:span><text:span text:style-name="T107">).</text:span><text:span text:style-name="T110">run</text:span><text:span text:style-name="T107">()</text:span></text:p>
      <text:p text:style-name="P113" loext:marker-style-name="T107"/>
      <text:p text:style-name="P112" loext:marker-style-name="T107"><text:span text:style-name="T107">    </text:span><text:span text:style-name="T116">def</text:span><text:span text:style-name="T107"> </text:span><text:span text:style-name="T110">run</text:span><text:span text:style-name="T107">(</text:span><text:span text:style-name="T114">self</text:span><text:span text:style-name="T107">):</text:span></text:p>
      <text:p text:style-name="P112" loext:marker-style-name="T107"><text:span text:style-name="T107">        </text:span><text:span text:style-name="T114">self</text:span><text:span text:style-name="T107">.</text:span><text:span text:style-name="T114">root</text:span><text:span text:style-name="T107">.</text:span><text:span text:style-name="T110">mainloop</text:span><text:span text:style-name="T107">()</text:span></text:p>
      <text:p text:style-name="P119" loext:marker-style-name="T129"/>
      <text:p text:style-name="P111" loext:marker-style-name="T106"><text:span text:style-name="T106">image_processor.py</text:span><text:span text:style-name="T106"/></text:p>
      <text:p text:style-name="P117" loext:marker-style-name="T127"/>
      <text:p text:style-name="P112" loext:marker-style-name="T107"><text:span text:style-name="T108">from</text:span><text:span text:style-name="T107"> </text:span><text:span text:style-name="T109">PIL</text:span><text:span text:style-name="T107"> </text:span><text:span text:style-name="T108">import</text:span><text:span text:style-name="T107"> </text:span><text:span text:style-name="T109">Image</text:span></text:p>
      <text:p text:style-name="P112" loext:marker-style-name="T107"><text:span text:style-name="T108">from</text:span><text:span text:style-name="T107"> </text:span><text:span text:style-name="T109">io</text:span><text:span text:style-name="T107"> </text:span><text:span text:style-name="T108">import</text:span><text:span text:style-name="T107"> </text:span><text:span text:style-name="T109">BytesIO</text:span></text:p>
      <text:p text:style-name="P113" loext:marker-style-name="T107"/>
      <text:p text:style-name="P112" loext:marker-style-name="T107"><text:span text:style-name="T116">class</text:span><text:span text:style-name="T107"> </text:span><text:span text:style-name="T109">ImageProcessor</text:span><text:span text:style-name="T107">:</text:span></text:p>
      <text:p text:style-name="P113" loext:marker-style-name="T107"/>
      <text:p text:style-name="P112" loext:marker-style-name="T107"><text:span text:style-name="T107">    </text:span><text:span text:style-name="T110">@</text:span><text:span text:style-name="T109">staticmethod</text:span></text:p>
      <text:p text:style-name="P112" loext:marker-style-name="T107"><text:span text:style-name="T107">    </text:span><text:span text:style-name="T116">def</text:span><text:span text:style-name="T107"> </text:span><text:span text:style-name="T110">load_image</text:span><text:span text:style-name="T107">(</text:span><text:span text:style-name="T112">frame</text:span><text:span text:style-name="T107">):</text:span></text:p>
      <text:p text:style-name="P112" loext:marker-style-name="T107"><text:span text:style-name="T107">        </text:span><text:span text:style-name="T114">image</text:span><text:span text:style-name="T107"> </text:span><text:span text:style-name="T113">=</text:span><text:span text:style-name="T107"> </text:span><text:span text:style-name="T109">Image</text:span><text:span text:style-name="T107">.</text:span><text:span text:style-name="T110">open</text:span><text:span text:style-name="T107">(</text:span><text:span text:style-name="T109">BytesIO</text:span><text:span text:style-name="T107">(</text:span><text:span text:style-name="T112">frame</text:span><text:span text:style-name="T107">)).</text:span><text:span text:style-name="T110">convert</text:span><text:span text:style-name="T107">(</text:span><text:span text:style-name="T111">"RGB"</text:span><text:span text:style-name="T107">)</text:span></text:p>
      <text:p text:style-name="P113" loext:marker-style-name="T107"/>
      <text:p text:style-name="P112" loext:marker-style-name="T107"><text:span text:style-name="T107">        </text:span><text:span text:style-name="T108">return</text:span><text:span text:style-name="T107"> </text:span><text:span text:style-name="T114">image</text:span></text:p>
      <text:p text:style-name="P121" loext:marker-style-name="T106"/>
      <text:p text:style-name="P111" loext:marker-style-name="T106"><text:span text:style-name="T106">database.py</text:span><text:span text:style-name="T106"/></text:p>
      <text:p text:style-name="P117" loext:marker-style-name="T127"/>
      <text:p text:style-name="P112" loext:marker-style-name="T107"><text:span text:style-name="T108">import</text:span><text:span text:style-name="T107"> </text:span><text:span text:style-name="T109">mysql</text:span><text:span text:style-name="T107">.</text:span><text:span text:style-name="T109">connector</text:span></text:p>
      <text:p text:style-name="P113" loext:marker-style-name="T107"/>
      <text:p text:style-name="P112" loext:marker-style-name="T107"><text:span text:style-name="T116">class</text:span><text:span text:style-name="T107"> </text:span><text:span text:style-name="T109">DatabaseManager</text:span><text:span text:style-name="T107">:</text:span></text:p>
      <text:p text:style-name="P113" loext:marker-style-name="T107"/>
      <text:p text:style-name="P112" loext:marker-style-name="T107"><text:span text:style-name="T107">    </text:span><text:span text:style-name="T116">def</text:span><text:span text:style-name="T107"> </text:span><text:span text:style-name="T117">__init__</text:span><text:span text:style-name="T107">(</text:span><text:span text:style-name="T114">self</text:span><text:span text:style-name="T107">, </text:span><text:span text:style-name="T112">c</text:span><text:span text:style-name="T107">):</text:span></text:p>
      <text:p text:style-name="P113" loext:marker-style-name="T107"/>
      <text:p text:style-name="P112" loext:marker-style-name="T107"><text:span text:style-name="T107">        </text:span><text:span text:style-name="T114">self</text:span><text:span text:style-name="T107">.</text:span><text:span text:style-name="T114">connection</text:span><text:span text:style-name="T107"> </text:span><text:span text:style-name="T113">=</text:span><text:span text:style-name="T107"> </text:span><text:span text:style-name="T109">mysql</text:span><text:span text:style-name="T107">.</text:span><text:span text:style-name="T109">connector</text:span><text:span text:style-name="T107">.</text:span><text:span text:style-name="T110">connect</text:span><text:span text:style-name="T107">(</text:span></text:p>
      <text:p text:style-name="P112" loext:marker-style-name="T107"><text:span text:style-name="T107">            </text:span><text:span text:style-name="T112">host</text:span><text:span text:style-name="T113">=</text:span><text:span text:style-name="T112">c</text:span><text:span text:style-name="T107">[</text:span><text:span text:style-name="T111">"mysql_host"</text:span><text:span text:style-name="T107">],</text:span></text:p>
      <text:p text:style-name="P112" loext:marker-style-name="T107"><text:span text:style-name="T107">            </text:span><text:span text:style-name="T112">port</text:span><text:span text:style-name="T113">=</text:span><text:span text:style-name="T112">c</text:span><text:span text:style-name="T107">[</text:span><text:span text:style-name="T111">"mysql_port"</text:span><text:span text:style-name="T107">],</text:span></text:p>
      <text:p text:style-name="P112" loext:marker-style-name="T107"><text:span text:style-name="T107">            </text:span><text:span text:style-name="T112">user</text:span><text:span text:style-name="T113">=</text:span><text:span text:style-name="T112">c</text:span><text:span text:style-name="T107">[</text:span><text:span text:style-name="T111">"mysql_user"</text:span><text:span text:style-name="T107">],</text:span></text:p>
      <text:p text:style-name="P112" loext:marker-style-name="T107"><text:span text:style-name="T107">            </text:span><text:span text:style-name="T112">password</text:span><text:span text:style-name="T113">=</text:span><text:span text:style-name="T112">c</text:span><text:span text:style-name="T107">[</text:span><text:span text:style-name="T111">"mysql_password"</text:span><text:span text:style-name="T107">],</text:span></text:p>
      <text:p text:style-name="P112" loext:marker-style-name="T107"><text:span text:style-name="T107">            </text:span><text:span text:style-name="T112">database</text:span><text:span text:style-name="T113">=</text:span><text:span text:style-name="T112">c</text:span><text:span text:style-name="T107">[</text:span><text:span text:style-name="T111">"mysql_database"</text:span><text:span text:style-name="T107">]</text:span></text:p>
      <text:p text:style-name="P112" loext:marker-style-name="T107"><text:span text:style-name="T107">        )</text:span><text:span text:style-name="T107"/></text:p>
      <text:p text:style-name="P113" loext:marker-style-name="T107"/>
      <text:p text:style-name="P112" loext:marker-style-name="T107"><text:span text:style-name="T107">        </text:span><text:span text:style-name="T114">self</text:span><text:span text:style-name="T107">.</text:span><text:span text:style-name="T114">cursor</text:span><text:span text:style-name="T107"> </text:span><text:span text:style-name="T113">=</text:span><text:span text:style-name="T107"> </text:span><text:span text:style-name="T114">self</text:span><text:span text:style-name="T107">.</text:span><text:span text:style-name="T114">connection</text:span><text:span text:style-name="T107">.</text:span><text:span text:style-name="T110">cursor</text:span><text:span text:style-name="T107">(</text:span></text:p>
      <text:p text:style-name="P112" loext:marker-style-name="T107"><text:span text:style-name="T107">            </text:span><text:span text:style-name="T112">dictionary</text:span><text:span text:style-name="T113">=</text:span><text:span text:style-name="T118">True</text:span></text:p>
      <text:p text:style-name="P112" loext:marker-style-name="T107"><text:span text:style-name="T107">        )</text:span><text:span text:style-name="T107"/></text:p>
      <text:p text:style-name="P113" loext:marker-style-name="T107"/>
      <text:p text:style-name="P112" loext:marker-style-name="T107"><text:span text:style-name="T107">    </text:span><text:span text:style-name="T116">def</text:span><text:span text:style-name="T107"> </text:span><text:span text:style-name="T110">create_session</text:span><text:span text:style-name="T107">(</text:span><text:span text:style-name="T114">self</text:span><text:span text:style-name="T107">):</text:span></text:p>
      <text:p text:style-name="P113" loext:marker-style-name="T107"/>
      <text:p text:style-name="P112" loext:marker-style-name="T107"><text:span text:style-name="T107">        </text:span><text:span text:style-name="T114">self</text:span><text:span text:style-name="T107">.</text:span><text:span text:style-name="T114">cursor</text:span><text:span text:style-name="T107">.</text:span><text:span text:style-name="T110">execute</text:span><text:span text:style-name="T107">(</text:span></text:p>
      <text:p text:style-name="P112" loext:marker-style-name="T107"><text:span text:style-name="T107">            </text:span><text:span text:style-name="T111">"""</text:span></text:p>
      <text:p text:style-name="P112" loext:marker-style-name="T107"><text:span text:style-name="T111">            INSERT INTO sessions(created_at)</text:span><text:span text:style-name="T107"/></text:p>
      <text:p text:style-name="P112" loext:marker-style-name="T107"><text:span text:style-name="T111">            VALUES(NOW())</text:span><text:span text:style-name="T107"/></text:p>
      <text:p text:style-name="P112" loext:marker-style-name="T107"><text:span text:style-name="T111">            """</text:span><text:span text:style-name="T107"/></text:p>
      <text:p text:style-name="P112" loext:marker-style-name="T107"><text:span text:style-name="T107">        )</text:span><text:span text:style-name="T107"/></text:p>
      <text:p text:style-name="P113" loext:marker-style-name="T107"/>
      <text:p text:style-name="P112" loext:marker-style-name="T107"><text:span text:style-name="T107">        </text:span><text:span text:style-name="T114">self</text:span><text:span text:style-name="T107">.</text:span><text:span text:style-name="T114">connection</text:span><text:span text:style-name="T107">.</text:span><text:span text:style-name="T110">commit</text:span><text:span text:style-name="T107">()</text:span></text:p>
      <text:p text:style-name="P113" loext:marker-style-name="T107"/>
      <text:p text:style-name="P112" loext:marker-style-name="T107"><text:span text:style-name="T107">        </text:span><text:span text:style-name="T108">return</text:span><text:span text:style-name="T107"> </text:span><text:span text:style-name="T114">self</text:span><text:span text:style-name="T107">.</text:span><text:span text:style-name="T114">cursor</text:span><text:span text:style-name="T107">.</text:span><text:span text:style-name="T114">lastrowid</text:span></text:p>
      <text:p text:style-name="P113" loext:marker-style-name="T107"><text:soft-page-break/></text:p>
      <text:p text:style-name="P112" loext:marker-style-name="T107"><text:span text:style-name="T107">    </text:span><text:span text:style-name="T116">def</text:span><text:span text:style-name="T107"> </text:span><text:span text:style-name="T110">get_sessions</text:span><text:span text:style-name="T107">(</text:span><text:span text:style-name="T114">self</text:span><text:span text:style-name="T107">):</text:span></text:p>
      <text:p text:style-name="P113" loext:marker-style-name="T107"/>
      <text:p text:style-name="P112" loext:marker-style-name="T107"><text:span text:style-name="T107">        </text:span><text:span text:style-name="T114">self</text:span><text:span text:style-name="T107">.</text:span><text:span text:style-name="T114">cursor</text:span><text:span text:style-name="T107">.</text:span><text:span text:style-name="T110">execute</text:span><text:span text:style-name="T107">(</text:span></text:p>
      <text:p text:style-name="P112" loext:marker-style-name="T107"><text:span text:style-name="T107">            </text:span><text:span text:style-name="T111">"""</text:span></text:p>
      <text:p text:style-name="P112" loext:marker-style-name="T107"><text:span text:style-name="T111">            SELECT *</text:span><text:span text:style-name="T107"/></text:p>
      <text:p text:style-name="P112" loext:marker-style-name="T107"><text:span text:style-name="T111">            FROM sessions</text:span><text:span text:style-name="T107"/></text:p>
      <text:p text:style-name="P112" loext:marker-style-name="T107"><text:span text:style-name="T111">            ORDER BY id DESC</text:span><text:span text:style-name="T107"/></text:p>
      <text:p text:style-name="P112" loext:marker-style-name="T107"><text:span text:style-name="T111">            """</text:span><text:span text:style-name="T107"/></text:p>
      <text:p text:style-name="P112" loext:marker-style-name="T107"><text:span text:style-name="T107">        )</text:span><text:span text:style-name="T107"/></text:p>
      <text:p text:style-name="P113" loext:marker-style-name="T107"/>
      <text:p text:style-name="P112" loext:marker-style-name="T107"><text:span text:style-name="T107">        </text:span><text:span text:style-name="T108">return</text:span><text:span text:style-name="T107"> </text:span><text:span text:style-name="T114">self</text:span><text:span text:style-name="T107">.</text:span><text:span text:style-name="T114">cursor</text:span><text:span text:style-name="T107">.</text:span><text:span text:style-name="T110">fetchall</text:span><text:span text:style-name="T107">()</text:span></text:p>
      <text:p text:style-name="P113" loext:marker-style-name="T107"/>
      <text:p text:style-name="P112" loext:marker-style-name="T107"><text:span text:style-name="T107">    </text:span><text:span text:style-name="T116">def</text:span><text:span text:style-name="T107"> </text:span><text:span text:style-name="T110">create_measurement</text:span><text:span text:style-name="T107">(</text:span><text:span text:style-name="T114">self</text:span><text:span text:style-name="T107">,</text:span><text:span text:style-name="T112">session_id</text:span><text:span text:style-name="T107">,</text:span><text:span text:style-name="T112">timestamp</text:span><text:span text:style-name="T107">,</text:span><text:span text:style-name="T112">image_path</text:span><text:span text:style-name="T107">):</text:span></text:p>
      <text:p text:style-name="P113" loext:marker-style-name="T107"/>
      <text:p text:style-name="P112" loext:marker-style-name="T107"><text:span text:style-name="T107">        </text:span><text:span text:style-name="T114">self</text:span><text:span text:style-name="T107">.</text:span><text:span text:style-name="T114">cursor</text:span><text:span text:style-name="T107">.</text:span><text:span text:style-name="T110">execute</text:span><text:span text:style-name="T107">(</text:span></text:p>
      <text:p text:style-name="P112" loext:marker-style-name="T107"><text:span text:style-name="T107">            </text:span><text:span text:style-name="T111">"""</text:span></text:p>
      <text:p text:style-name="P112" loext:marker-style-name="T107"><text:span text:style-name="T111">            INSERT INTO measurements</text:span><text:span text:style-name="T107"/></text:p>
      <text:p text:style-name="P112" loext:marker-style-name="T107"><text:span text:style-name="T111">            (session_id, timestamp, image_path)</text:span><text:span text:style-name="T107"/></text:p>
      <text:p text:style-name="P112" loext:marker-style-name="T107"><text:span text:style-name="T111">            VALUES(</text:span><text:span text:style-name="T116">%s</text:span><text:span text:style-name="T111">,</text:span><text:span text:style-name="T116">%s</text:span><text:span text:style-name="T111">,</text:span><text:span text:style-name="T116">%s</text:span><text:span text:style-name="T111">)</text:span></text:p>
      <text:p text:style-name="P112" loext:marker-style-name="T107"><text:span text:style-name="T111">            """</text:span><text:span text:style-name="T107">,</text:span></text:p>
      <text:p text:style-name="P112" loext:marker-style-name="T107"><text:span text:style-name="T107">            (</text:span><text:span text:style-name="T112">session_id</text:span><text:span text:style-name="T107">, </text:span><text:span text:style-name="T112">timestamp</text:span><text:span text:style-name="T107">, </text:span><text:span text:style-name="T112">image_path</text:span><text:span text:style-name="T107">))</text:span></text:p>
      <text:p text:style-name="P113" loext:marker-style-name="T107"/>
      <text:p text:style-name="P112" loext:marker-style-name="T107"><text:span text:style-name="T107">        </text:span><text:span text:style-name="T114">self</text:span><text:span text:style-name="T107">.</text:span><text:span text:style-name="T114">connection</text:span><text:span text:style-name="T107">.</text:span><text:span text:style-name="T110">commit</text:span><text:span text:style-name="T107">()</text:span></text:p>
      <text:p text:style-name="P112" loext:marker-style-name="T107"><text:span text:style-name="T107">        </text:span><text:span text:style-name="T107"/></text:p>
      <text:p text:style-name="P112" loext:marker-style-name="T107"><text:span text:style-name="T107">        </text:span><text:span text:style-name="T108">return</text:span><text:span text:style-name="T107"> </text:span><text:span text:style-name="T114">self</text:span><text:span text:style-name="T107">.</text:span><text:span text:style-name="T114">cursor</text:span><text:span text:style-name="T107">.</text:span><text:span text:style-name="T114">lastrowid</text:span></text:p>
      <text:p text:style-name="P113" loext:marker-style-name="T107"/>
      <text:p text:style-name="P112" loext:marker-style-name="T107"><text:span text:style-name="T107">    </text:span><text:span text:style-name="T116">def</text:span><text:span text:style-name="T107"> </text:span><text:span text:style-name="T110">insert_points</text:span><text:span text:style-name="T107">(</text:span><text:span text:style-name="T114">self</text:span><text:span text:style-name="T107">, </text:span><text:span text:style-name="T112">measurement_id</text:span><text:span text:style-name="T107">, </text:span><text:span text:style-name="T112">points</text:span><text:span text:style-name="T107">):</text:span></text:p>
      <text:p text:style-name="P112" loext:marker-style-name="T107"><text:span text:style-name="T107">        </text:span><text:span text:style-name="T114">rows</text:span><text:span text:style-name="T107"> </text:span><text:span text:style-name="T113">=</text:span><text:span text:style-name="T107"> []</text:span></text:p>
      <text:p text:style-name="P113" loext:marker-style-name="T107"/>
      <text:p text:style-name="P112" loext:marker-style-name="T107"><text:span text:style-name="T107">        </text:span><text:span text:style-name="T108">for</text:span><text:span text:style-name="T107"> </text:span><text:span text:style-name="T114">p</text:span><text:span text:style-name="T107"> </text:span><text:span text:style-name="T108">in</text:span><text:span text:style-name="T107"> </text:span><text:span text:style-name="T112">points</text:span><text:span text:style-name="T107">:</text:span></text:p>
      <text:p text:style-name="P112" loext:marker-style-name="T107"><text:span text:style-name="T107">            </text:span><text:span text:style-name="T114">rows</text:span><text:span text:style-name="T107">.</text:span><text:span text:style-name="T110">append</text:span><text:span text:style-name="T107">((</text:span><text:span text:style-name="T112">measurement_id</text:span><text:span text:style-name="T107">, </text:span><text:span text:style-name="T114">p</text:span><text:span text:style-name="T107">[</text:span><text:span text:style-name="T111">"x"</text:span><text:span text:style-name="T107">], </text:span><text:span text:style-name="T114">p</text:span><text:span text:style-name="T107">[</text:span><text:span text:style-name="T111">"y"</text:span><text:span text:style-name="T107">], </text:span><text:span text:style-name="T114">p</text:span><text:span text:style-name="T107">[</text:span><text:span text:style-name="T111">"temp"</text:span><text:span text:style-name="T107">]))</text:span></text:p>
      <text:p text:style-name="P113" loext:marker-style-name="T107"/>
      <text:p text:style-name="P112" loext:marker-style-name="T107"><text:span text:style-name="T107">        </text:span><text:span text:style-name="T114">self</text:span><text:span text:style-name="T107">.</text:span><text:span text:style-name="T114">cursor</text:span><text:span text:style-name="T107">.</text:span><text:span text:style-name="T110">executemany</text:span><text:span text:style-name="T107">(</text:span></text:p>
      <text:p text:style-name="P112" loext:marker-style-name="T107"><text:span text:style-name="T107">            </text:span><text:span text:style-name="T111">"""</text:span></text:p>
      <text:p text:style-name="P112" loext:marker-style-name="T107"><text:span text:style-name="T111">            INSERT INTO temperature_points</text:span><text:span text:style-name="T107"/></text:p>
      <text:p text:style-name="P112" loext:marker-style-name="T107"><text:span text:style-name="T111">            (</text:span><text:span text:style-name="T107"/></text:p>
      <text:p text:style-name="P112" loext:marker-style-name="T107"><text:span text:style-name="T111">                measurement_id,</text:span><text:span text:style-name="T107"/></text:p>
      <text:p text:style-name="P112" loext:marker-style-name="T107"><text:span text:style-name="T111">                pos_x,</text:span><text:span text:style-name="T107"/></text:p>
      <text:p text:style-name="P112" loext:marker-style-name="T107"><text:span text:style-name="T111">                pos_y,</text:span><text:span text:style-name="T107"/></text:p>
      <text:p text:style-name="P112" loext:marker-style-name="T107"><text:span text:style-name="T111">                temperature</text:span><text:span text:style-name="T107"/></text:p>
      <text:p text:style-name="P112" loext:marker-style-name="T107"><text:span text:style-name="T111">            )</text:span><text:span text:style-name="T107"/></text:p>
      <text:p text:style-name="P112" loext:marker-style-name="T107"><text:span text:style-name="T111">            VALUES(</text:span><text:span text:style-name="T116">%s</text:span><text:span text:style-name="T111">,</text:span><text:span text:style-name="T116">%s</text:span><text:span text:style-name="T111">,</text:span><text:span text:style-name="T116">%s</text:span><text:span text:style-name="T111">,</text:span><text:span text:style-name="T116">%s</text:span><text:span text:style-name="T111">)</text:span></text:p>
      <text:p text:style-name="P112" loext:marker-style-name="T107"><text:span text:style-name="T111">            """</text:span><text:span text:style-name="T107">, </text:span><text:span text:style-name="T114">rows</text:span><text:span text:style-name="T107">)</text:span></text:p>
      <text:p text:style-name="P113" loext:marker-style-name="T107"/>
      <text:p text:style-name="P112" loext:marker-style-name="T107"><text:span text:style-name="T107">        </text:span><text:span text:style-name="T114">self</text:span><text:span text:style-name="T107">.</text:span><text:span text:style-name="T114">connection</text:span><text:span text:style-name="T107">.</text:span><text:span text:style-name="T110">commit</text:span><text:span text:style-name="T107">()</text:span></text:p>
      <text:p text:style-name="P113" loext:marker-style-name="T107"/>
      <text:p text:style-name="P112" loext:marker-style-name="T107"><text:span text:style-name="T107">    </text:span><text:span text:style-name="T116">def</text:span><text:span text:style-name="T107"> </text:span><text:span text:style-name="T110">get_measurements</text:span><text:span text:style-name="T107">(</text:span><text:span text:style-name="T114">self</text:span><text:span text:style-name="T107">, </text:span><text:span text:style-name="T112">session_id</text:span><text:span text:style-name="T107">):</text:span></text:p>
      <text:p text:style-name="P113" loext:marker-style-name="T107"/>
      <text:p text:style-name="P112" loext:marker-style-name="T107"><text:span text:style-name="T107">        </text:span><text:span text:style-name="T114">self</text:span><text:span text:style-name="T107">.</text:span><text:span text:style-name="T114">cursor</text:span><text:span text:style-name="T107">.</text:span><text:span text:style-name="T110">execute</text:span><text:span text:style-name="T107">(</text:span></text:p>
      <text:p text:style-name="P112" loext:marker-style-name="T107"><text:span text:style-name="T107">            </text:span><text:span text:style-name="T111">"""</text:span></text:p>
      <text:p text:style-name="P112" loext:marker-style-name="T107"><text:span text:style-name="T111">            SELECT *</text:span><text:span text:style-name="T107"/></text:p>
      <text:p text:style-name="P112" loext:marker-style-name="T107"><text:span text:style-name="T111">            FROM measurements</text:span><text:span text:style-name="T107"/></text:p>
      <text:p text:style-name="P112" loext:marker-style-name="T107"><text:span text:style-name="T111">            WHERE session_id=</text:span><text:span text:style-name="T116">%s</text:span></text:p>
      <text:p text:style-name="P112" loext:marker-style-name="T107"><text:span text:style-name="T111">            ORDER BY timestamp DESC</text:span><text:span text:style-name="T107"/></text:p>
      <text:p text:style-name="P112" loext:marker-style-name="T107"><text:span text:style-name="T111">            """</text:span><text:span text:style-name="T107">,</text:span></text:p>
      <text:p text:style-name="P112" loext:marker-style-name="T107"><text:span text:style-name="T107">            (</text:span><text:span text:style-name="T112">session_id</text:span><text:span text:style-name="T107">,))</text:span></text:p>
      <text:p text:style-name="P113" loext:marker-style-name="T107"/>
      <text:p text:style-name="P112" loext:marker-style-name="T107"><text:span text:style-name="T107">        </text:span><text:span text:style-name="T108">return</text:span><text:span text:style-name="T107"> </text:span><text:span text:style-name="T114">self</text:span><text:span text:style-name="T107">.</text:span><text:span text:style-name="T114">cursor</text:span><text:span text:style-name="T107">.</text:span><text:span text:style-name="T110">fetchall</text:span><text:span text:style-name="T107">()</text:span></text:p>
      <text:p text:style-name="P113" loext:marker-style-name="T107"/>
      <text:p text:style-name="P112" loext:marker-style-name="T107"><text:span text:style-name="T107">    </text:span><text:span text:style-name="T116">def</text:span><text:span text:style-name="T107"> </text:span><text:span text:style-name="T110">get_points</text:span><text:span text:style-name="T107">(</text:span><text:span text:style-name="T114">self</text:span><text:span text:style-name="T107">, </text:span><text:span text:style-name="T114">measurement_id</text:span><text:span text:style-name="T107">):</text:span></text:p>
      <text:p text:style-name="P113" loext:marker-style-name="T107"/>
      <text:p text:style-name="P112" loext:marker-style-name="T107"><text:span text:style-name="T107">        </text:span><text:span text:style-name="T118">self</text:span><text:span text:style-name="T107">.cursor.execute(</text:span></text:p>
      <text:p text:style-name="P112" loext:marker-style-name="T107"><text:span text:style-name="T107">            </text:span><text:span text:style-name="T111">"""</text:span></text:p>
      <text:p text:style-name="P112" loext:marker-style-name="T107"><text:span text:style-name="T111">            SELECT</text:span><text:span text:style-name="T107"/></text:p>
      <text:p text:style-name="P112" loext:marker-style-name="T107"><text:soft-page-break/><text:span text:style-name="T111">                pos_x,</text:span><text:span text:style-name="T107"/></text:p>
      <text:p text:style-name="P112" loext:marker-style-name="T107"><text:span text:style-name="T111">                pos_y,</text:span><text:span text:style-name="T107"/></text:p>
      <text:p text:style-name="P112" loext:marker-style-name="T107"><text:span text:style-name="T111">                temperature</text:span><text:span text:style-name="T107"/></text:p>
      <text:p text:style-name="P112" loext:marker-style-name="T107"><text:span text:style-name="T111">            FROM temperature_points</text:span><text:span text:style-name="T107"/></text:p>
      <text:p text:style-name="P112" loext:marker-style-name="T107"><text:span text:style-name="T111">            WHERE measurement_id=</text:span><text:span text:style-name="T116">%s</text:span></text:p>
      <text:p text:style-name="P112" loext:marker-style-name="T107"><text:span text:style-name="T111">            """</text:span><text:span text:style-name="T107">, (measurement_id,))</text:span></text:p>
      <text:p text:style-name="P113" loext:marker-style-name="T107"/>
      <text:p text:style-name="P112" loext:marker-style-name="T107"><text:span text:style-name="T107">        </text:span><text:span text:style-name="T108">return</text:span><text:span text:style-name="T107"> </text:span><text:span text:style-name="T118">self</text:span><text:span text:style-name="T107">.cursor.fetchall()</text:span></text:p>
      <text:p text:style-name="P113" loext:marker-style-name="T107"/>
      <text:p text:style-name="P112" loext:marker-style-name="T107"><text:span text:style-name="T107">    </text:span><text:span text:style-name="T116">def</text:span><text:span text:style-name="T107"> </text:span><text:span text:style-name="T110">get_last_image</text:span><text:span text:style-name="T107">(</text:span><text:span text:style-name="T114">self</text:span><text:span text:style-name="T107">, </text:span><text:span text:style-name="T114">session_id</text:span><text:span text:style-name="T107">):</text:span></text:p>
      <text:p text:style-name="P113" loext:marker-style-name="T107"/>
      <text:p text:style-name="P112" loext:marker-style-name="T107"><text:span text:style-name="T107">        </text:span><text:span text:style-name="T118">self</text:span><text:span text:style-name="T107">.cursor.execute(</text:span></text:p>
      <text:p text:style-name="P112" loext:marker-style-name="T107"><text:span text:style-name="T107">            </text:span><text:span text:style-name="T111">"""</text:span></text:p>
      <text:p text:style-name="P112" loext:marker-style-name="T107"><text:span text:style-name="T111">            SELECT image_path</text:span><text:span text:style-name="T107"/></text:p>
      <text:p text:style-name="P112" loext:marker-style-name="T107"><text:span text:style-name="T111">            FROM measurements</text:span><text:span text:style-name="T107"/></text:p>
      <text:p text:style-name="P112" loext:marker-style-name="T107"><text:span text:style-name="T111">            WHERE session_id=</text:span><text:span text:style-name="T116">%s</text:span></text:p>
      <text:p text:style-name="P112" loext:marker-style-name="T107"><text:span text:style-name="T111">            ORDER BY timestamp DESC</text:span><text:span text:style-name="T107"/></text:p>
      <text:p text:style-name="P112" loext:marker-style-name="T107"><text:span text:style-name="T111">            LIMIT 1</text:span><text:span text:style-name="T107"/></text:p>
      <text:p text:style-name="P112" loext:marker-style-name="T107"><text:span text:style-name="T111">            """</text:span><text:span text:style-name="T107">, (session_id,))</text:span></text:p>
      <text:p text:style-name="P113" loext:marker-style-name="T107"/>
      <text:p text:style-name="P112" loext:marker-style-name="T107"><text:span text:style-name="T107">        row </text:span><text:span text:style-name="T113">=</text:span><text:span text:style-name="T107"> </text:span><text:span text:style-name="T118">self</text:span><text:span text:style-name="T107">.cursor.fetchone()</text:span></text:p>
      <text:p text:style-name="P113" loext:marker-style-name="T107"/>
      <text:p text:style-name="P112" loext:marker-style-name="T107"><text:span text:style-name="T107">        </text:span><text:span text:style-name="T108">return</text:span><text:span text:style-name="T107"> (row[</text:span><text:span text:style-name="T111">"image_path"</text:span><text:span text:style-name="T107">] </text:span><text:span text:style-name="T108">if</text:span><text:span text:style-name="T107"> row </text:span><text:span text:style-name="T108">else</text:span><text:span text:style-name="T107"> </text:span><text:span text:style-name="T121">None</text:span><text:span text:style-name="T107">)</text:span></text:p>
      <text:p text:style-name="P113" loext:marker-style-name="T107"/>
      <text:p text:style-name="P112" loext:marker-style-name="T107"><text:span text:style-name="T107">    </text:span><text:span text:style-name="T116">def</text:span><text:span text:style-name="T107"> </text:span><text:span text:style-name="T110">close</text:span><text:span text:style-name="T107">(</text:span><text:span text:style-name="T114">self</text:span><text:span text:style-name="T107">):</text:span></text:p>
      <text:p text:style-name="P113" loext:marker-style-name="T107"/>
      <text:p text:style-name="P112" loext:marker-style-name="T107"><text:span text:style-name="T107">        </text:span><text:span text:style-name="T108">try</text:span><text:span text:style-name="T107">:</text:span></text:p>
      <text:p text:style-name="P112" loext:marker-style-name="T107"><text:span text:style-name="T107">            </text:span><text:span text:style-name="T118">self</text:span><text:span text:style-name="T107">.cursor.close()</text:span></text:p>
      <text:p text:style-name="P112" loext:marker-style-name="T107"><text:span text:style-name="T107">            </text:span><text:span text:style-name="T118">self</text:span><text:span text:style-name="T107">.connection.close()</text:span></text:p>
      <text:p text:style-name="P113" loext:marker-style-name="T107"/>
      <text:p text:style-name="P112" loext:marker-style-name="T107"><text:span text:style-name="T107">        </text:span><text:span text:style-name="T108">except</text:span><text:span text:style-name="T107"> </text:span><text:span text:style-name="T109">Exception</text:span><text:span text:style-name="T107">:</text:span></text:p>
      <text:p text:style-name="P112" loext:marker-style-name="T107"><text:span text:style-name="T107">            </text:span><text:span text:style-name="T108">pass</text:span></text:p>
      <text:p text:style-name="P113" loext:marker-style-name="T107"/>
      <text:p text:style-name="P112" loext:marker-style-name="T107"><text:span text:style-name="T107">    </text:span><text:span text:style-name="T116">def</text:span><text:span text:style-name="T107"> </text:span><text:span text:style-name="T110">get_session_points</text:span><text:span text:style-name="T107">(</text:span><text:span text:style-name="T114">self</text:span><text:span text:style-name="T107">,</text:span><text:span text:style-name="T114">session_id</text:span><text:span text:style-name="T107">):</text:span></text:p>
      <text:p text:style-name="P113" loext:marker-style-name="T107"/>
      <text:p text:style-name="P112" loext:marker-style-name="T107"><text:span text:style-name="T107">        </text:span><text:span text:style-name="T118">self</text:span><text:span text:style-name="T107">.cursor.execute(</text:span></text:p>
      <text:p text:style-name="P112" loext:marker-style-name="T107"><text:span text:style-name="T107">            </text:span><text:span text:style-name="T111">"""</text:span></text:p>
      <text:p text:style-name="P112" loext:marker-style-name="T107"><text:span text:style-name="T111">            SELECT</text:span><text:span text:style-name="T107"/></text:p>
      <text:p text:style-name="P112" loext:marker-style-name="T107"><text:span text:style-name="T111">                m.id AS measurement_id,</text:span><text:span text:style-name="T107"/></text:p>
      <text:p text:style-name="P112" loext:marker-style-name="T107"><text:span text:style-name="T111">                m.timestamp,</text:span><text:span text:style-name="T107"/></text:p>
      <text:p text:style-name="P112" loext:marker-style-name="T107"><text:span text:style-name="T111">                p.pos_x,</text:span><text:span text:style-name="T107"/></text:p>
      <text:p text:style-name="P112" loext:marker-style-name="T107"><text:span text:style-name="T111">                p.pos_y,</text:span><text:span text:style-name="T107"/></text:p>
      <text:p text:style-name="P112" loext:marker-style-name="T107"><text:span text:style-name="T111">                p.temperature</text:span><text:span text:style-name="T107"/></text:p>
      <text:p text:style-name="P112" loext:marker-style-name="T107"><text:span text:style-name="T111">            FROM measurements m</text:span><text:span text:style-name="T107"/></text:p>
      <text:p text:style-name="P112" loext:marker-style-name="T107"><text:span text:style-name="T111">            JOIN temperature_points p</text:span><text:span text:style-name="T107"/></text:p>
      <text:p text:style-name="P112" loext:marker-style-name="T107"><text:span text:style-name="T111">                ON p.measurement_id = m.id</text:span><text:span text:style-name="T107"/></text:p>
      <text:p text:style-name="P112" loext:marker-style-name="T107"><text:span text:style-name="T111">            WHERE m.session_id=</text:span><text:span text:style-name="T116">%s</text:span></text:p>
      <text:p text:style-name="P112" loext:marker-style-name="T107"><text:span text:style-name="T111">            ORDER BY m.timestamp</text:span><text:span text:style-name="T107"/></text:p>
      <text:p text:style-name="P112" loext:marker-style-name="T107"><text:span text:style-name="T111">            """</text:span><text:span text:style-name="T107">,(session_id,))</text:span></text:p>
      <text:p text:style-name="P112" loext:marker-style-name="T107"><text:span text:style-name="T107">        </text:span><text:span text:style-name="T107"/></text:p>
      <text:p text:style-name="P112" loext:marker-style-name="T107"><text:span text:style-name="T107">        </text:span><text:span text:style-name="T108">return</text:span><text:span text:style-name="T107"> </text:span><text:span text:style-name="T118">self</text:span><text:span text:style-name="T107">.cursor.fetchall()</text:span></text:p>
      <text:p text:style-name="P117" loext:marker-style-name="T127"/>
      <text:p text:style-name="P111" loext:marker-style-name="T127"><text:span text:style-name="T106">esp32_client.py</text:span><text:span text:style-name="T127"/></text:p>
      <text:p text:style-name="P113" loext:marker-style-name="T107"/>
      <text:p text:style-name="P112" loext:marker-style-name="T107"><text:span text:style-name="T108">import</text:span><text:span text:style-name="T107"> </text:span><text:span text:style-name="T109">requests</text:span></text:p>
      <text:p text:style-name="P112" loext:marker-style-name="T107"><text:span text:style-name="T108">from</text:span><text:span text:style-name="T107"> </text:span><text:span text:style-name="T109">logger</text:span><text:span text:style-name="T107"> </text:span><text:span text:style-name="T108">import</text:span><text:span text:style-name="T107"> </text:span><text:span text:style-name="T114">logger</text:span></text:p>
      <text:p text:style-name="P113" loext:marker-style-name="T107"/>
      <text:p text:style-name="P112" loext:marker-style-name="T107"><text:span text:style-name="T116">class</text:span><text:span text:style-name="T107"> </text:span><text:span text:style-name="T109">ESP32Client</text:span><text:span text:style-name="T107">:</text:span></text:p>
      <text:p text:style-name="P112" loext:marker-style-name="T107"><text:span text:style-name="T107">    </text:span><text:span text:style-name="T116">def</text:span><text:span text:style-name="T107"> </text:span><text:span text:style-name="T117">__init__</text:span><text:span text:style-name="T107">(</text:span><text:span text:style-name="T114">self</text:span><text:span text:style-name="T107">, </text:span><text:span text:style-name="T112">ip</text:span><text:span text:style-name="T107">): </text:span><text:span text:style-name="T114">self</text:span><text:span text:style-name="T107">.</text:span><text:span text:style-name="T114">ip</text:span><text:span text:style-name="T113">=</text:span><text:span text:style-name="T112">ip</text:span></text:p>
      <text:p text:style-name="P113" loext:marker-style-name="T107"/>
      <text:p text:style-name="P112" loext:marker-style-name="T107"><text:span text:style-name="T107">    </text:span><text:span text:style-name="T116">def</text:span><text:span text:style-name="T107"> </text:span><text:span text:style-name="T110">get_frame</text:span><text:span text:style-name="T107">(</text:span><text:span text:style-name="T114">self</text:span><text:span text:style-name="T107">):</text:span></text:p>
      <text:p text:style-name="P113" loext:marker-style-name="T107"/>
      <text:p text:style-name="P112" loext:marker-style-name="T107"><text:span text:style-name="T107">        </text:span><text:span text:style-name="T114">url</text:span><text:span text:style-name="T107"> </text:span><text:span text:style-name="T113">=</text:span><text:span text:style-name="T107"> </text:span><text:span text:style-name="T116">f</text:span><text:span text:style-name="T111">"http://</text:span><text:span text:style-name="T116">{</text:span><text:span text:style-name="T114">self</text:span><text:span text:style-name="T107">.</text:span><text:span text:style-name="T114">ip</text:span><text:span text:style-name="T116">}</text:span><text:span text:style-name="T111">/image"</text:span></text:p>
      <text:p text:style-name="P113" loext:marker-style-name="T107"/>
      <text:p text:style-name="P112" loext:marker-style-name="T107"><text:span text:style-name="T107">        </text:span><text:span text:style-name="T114">r</text:span><text:span text:style-name="T107"> </text:span><text:span text:style-name="T113">=</text:span><text:span text:style-name="T107"> </text:span><text:span text:style-name="T109">requests</text:span><text:span text:style-name="T107">.</text:span><text:span text:style-name="T110">get</text:span><text:span text:style-name="T107">(</text:span><text:span text:style-name="T114">url</text:span><text:span text:style-name="T107">, </text:span><text:span text:style-name="T112">timeout</text:span><text:span text:style-name="T113">=</text:span><text:span text:style-name="T107">(</text:span><text:span text:style-name="T120">15</text:span><text:span text:style-name="T107">))</text:span></text:p>
      <text:p text:style-name="P113" loext:marker-style-name="T107"><text:soft-page-break/></text:p>
      <text:p text:style-name="P112" loext:marker-style-name="T107"><text:span text:style-name="T107">        </text:span><text:span text:style-name="T114">logger</text:span><text:span text:style-name="T107">.</text:span><text:span text:style-name="T110">error</text:span><text:span text:style-name="T107">(</text:span><text:span text:style-name="T116">f</text:span><text:span text:style-name="T111">"ESP32 response: </text:span><text:span text:style-name="T116">{</text:span><text:span text:style-name="T114">r</text:span><text:span text:style-name="T107">.</text:span><text:span text:style-name="T114">status_code</text:span><text:span text:style-name="T116">}</text:span><text:span text:style-name="T111">"</text:span><text:span text:style-name="T107">)</text:span></text:p>
      <text:p text:style-name="P113" loext:marker-style-name="T107"/>
      <text:p text:style-name="P112" loext:marker-style-name="T107"><text:span text:style-name="T107">        </text:span><text:span text:style-name="T108">return</text:span><text:span text:style-name="T107"> </text:span><text:span text:style-name="T114">r</text:span><text:span text:style-name="T107">.</text:span><text:span text:style-name="T114">content</text:span></text:p>
      <text:p text:style-name="P120" loext:marker-style-name="T130"/>
      <text:p text:style-name="P111" loext:marker-style-name="T127"><text:span text:style-name="T106">cam_server.ino</text:span><text:span text:style-name="T127"/></text:p>
      <text:p text:style-name="P112" loext:marker-style-name="T107"><text:span text:style-name="T108">#include</text:span><text:span text:style-name="T121"> </text:span><text:span text:style-name="T111">&lt;Arduino.h&gt;</text:span></text:p>
      <text:p text:style-name="P112" loext:marker-style-name="T107"><text:span text:style-name="T108">#include</text:span><text:span text:style-name="T121"> </text:span><text:span text:style-name="T111">&lt;WebServer.h&gt;</text:span></text:p>
      <text:p text:style-name="P112" loext:marker-style-name="T107"><text:span text:style-name="T108">#include</text:span><text:span text:style-name="T121"> </text:span><text:span text:style-name="T111">&lt;WiFi.h&gt;</text:span></text:p>
      <text:p text:style-name="P112" loext:marker-style-name="T107"><text:span text:style-name="T108">#include</text:span><text:span text:style-name="T121"> </text:span><text:span text:style-name="T111">&lt;esp_camera.h&gt;</text:span></text:p>
      <text:p text:style-name="P112" loext:marker-style-name="T107"><text:span text:style-name="T108">#include</text:span><text:span text:style-name="T121"> </text:span><text:span text:style-name="T111">&lt;esp_wifi.h&gt;</text:span></text:p>
      <text:p text:style-name="P112" loext:marker-style-name="T107"><text:span text:style-name="T108">#include</text:span><text:span text:style-name="T121"> </text:span><text:span text:style-name="T111">&lt;soc/rtc_cntl_reg.h&gt;</text:span></text:p>
      <text:p text:style-name="P112" loext:marker-style-name="T107"><text:span text:style-name="T108">#include</text:span><text:span text:style-name="T121"> </text:span><text:span text:style-name="T111">&lt;soc/soc.h&gt;</text:span></text:p>
      <text:p text:style-name="P113" loext:marker-style-name="T107"/>
      <text:p text:style-name="P112" loext:marker-style-name="T107"><text:span text:style-name="T122">// wifi</text:span><text:span text:style-name="T107"/></text:p>
      <text:p text:style-name="P112" loext:marker-style-name="T107"><text:span text:style-name="T108">#define</text:span><text:span text:style-name="T121"> WIFI_SSID </text:span><text:span text:style-name="T111">"ESP32-CAM"</text:span></text:p>
      <text:p text:style-name="P112" loext:marker-style-name="T107"><text:span text:style-name="T108">#define</text:span><text:span text:style-name="T121"> WIFI_PASS </text:span><text:span text:style-name="T111">"12345678"</text:span></text:p>
      <text:p text:style-name="P113" loext:marker-style-name="T107"/>
      <text:p text:style-name="P112" loext:marker-style-name="T107"><text:span text:style-name="T122">// camera pins Ai Thinker</text:span><text:span text:style-name="T107"/></text:p>
      <text:p text:style-name="P112" loext:marker-style-name="T107"><text:span text:style-name="T108">#define</text:span><text:span text:style-name="T121"> PWDN_GPIO_NUM </text:span><text:span text:style-name="T120">32</text:span></text:p>
      <text:p text:style-name="P112" loext:marker-style-name="T107"><text:span text:style-name="T108">#define</text:span><text:span text:style-name="T121"> RESET_GPIO_NUM </text:span><text:span text:style-name="T113">-</text:span><text:span text:style-name="T120">1</text:span></text:p>
      <text:p text:style-name="P112" loext:marker-style-name="T107"><text:span text:style-name="T108">#define</text:span><text:span text:style-name="T121"> XCLK_GPIO_NUM </text:span><text:span text:style-name="T120">0</text:span></text:p>
      <text:p text:style-name="P112" loext:marker-style-name="T107"><text:span text:style-name="T108">#define</text:span><text:span text:style-name="T121"> SIOD_GPIO_NUM </text:span><text:span text:style-name="T120">26</text:span></text:p>
      <text:p text:style-name="P112" loext:marker-style-name="T107"><text:span text:style-name="T108">#define</text:span><text:span text:style-name="T121"> SIOC_GPIO_NUM </text:span><text:span text:style-name="T120">27</text:span></text:p>
      <text:p text:style-name="P113" loext:marker-style-name="T107"/>
      <text:p text:style-name="P112" loext:marker-style-name="T107"><text:span text:style-name="T108">#define</text:span><text:span text:style-name="T121"> Y9_GPIO_NUM </text:span><text:span text:style-name="T120">35</text:span></text:p>
      <text:p text:style-name="P112" loext:marker-style-name="T107"><text:span text:style-name="T108">#define</text:span><text:span text:style-name="T121"> Y8_GPIO_NUM </text:span><text:span text:style-name="T120">34</text:span></text:p>
      <text:p text:style-name="P112" loext:marker-style-name="T107"><text:span text:style-name="T108">#define</text:span><text:span text:style-name="T121"> Y7_GPIO_NUM </text:span><text:span text:style-name="T120">39</text:span></text:p>
      <text:p text:style-name="P112" loext:marker-style-name="T107"><text:span text:style-name="T108">#define</text:span><text:span text:style-name="T121"> Y6_GPIO_NUM </text:span><text:span text:style-name="T120">36</text:span></text:p>
      <text:p text:style-name="P112" loext:marker-style-name="T107"><text:span text:style-name="T108">#define</text:span><text:span text:style-name="T121"> Y5_GPIO_NUM </text:span><text:span text:style-name="T120">21</text:span></text:p>
      <text:p text:style-name="P112" loext:marker-style-name="T107"><text:span text:style-name="T108">#define</text:span><text:span text:style-name="T121"> Y4_GPIO_NUM </text:span><text:span text:style-name="T120">19</text:span></text:p>
      <text:p text:style-name="P112" loext:marker-style-name="T107"><text:span text:style-name="T108">#define</text:span><text:span text:style-name="T121"> Y3_GPIO_NUM </text:span><text:span text:style-name="T120">18</text:span></text:p>
      <text:p text:style-name="P112" loext:marker-style-name="T107"><text:span text:style-name="T108">#define</text:span><text:span text:style-name="T121"> Y2_GPIO_NUM </text:span><text:span text:style-name="T120">5</text:span></text:p>
      <text:p text:style-name="P112" loext:marker-style-name="T107"><text:span text:style-name="T108">#define</text:span><text:span text:style-name="T121"> VSYNC_GPIO_NUM </text:span><text:span text:style-name="T120">25</text:span></text:p>
      <text:p text:style-name="P112" loext:marker-style-name="T107"><text:span text:style-name="T108">#define</text:span><text:span text:style-name="T121"> HREF_GPIO_NUM </text:span><text:span text:style-name="T120">23</text:span></text:p>
      <text:p text:style-name="P112" loext:marker-style-name="T107"><text:span text:style-name="T108">#define</text:span><text:span text:style-name="T121"> PCLK_GPIO_NUM </text:span><text:span text:style-name="T120">22</text:span></text:p>
      <text:p text:style-name="P113" loext:marker-style-name="T107"/>
      <text:p text:style-name="P112" loext:marker-style-name="T107"><text:span text:style-name="T122">// camera init</text:span><text:span text:style-name="T107"/></text:p>
      <text:p text:style-name="P112" loext:marker-style-name="T107"><text:span text:style-name="T116">bool</text:span><text:span text:style-name="T107"> </text:span><text:span text:style-name="T110">cameraInit</text:span><text:span text:style-name="T107">(</text:span><text:span text:style-name="T109">framesize_t</text:span><text:span text:style-name="T107"> </text:span><text:span text:style-name="T112">frame_size</text:span><text:span text:style-name="T107">, </text:span><text:span text:style-name="T109">pixformat_t</text:span><text:span text:style-name="T107"> </text:span><text:span text:style-name="T112">pixel_format</text:span><text:span text:style-name="T107">, </text:span><text:span text:style-name="T116">int</text:span><text:span text:style-name="T107"> </text:span><text:span text:style-name="T112">jpeg_quality</text:span><text:span text:style-name="T107">) {</text:span></text:p>
      <text:p text:style-name="P112" loext:marker-style-name="T107"><text:span text:style-name="T107">    </text:span><text:span text:style-name="T110">esp_wifi_set_ps</text:span><text:span text:style-name="T107">(WIFI_PS_NONE);</text:span><text:span text:style-name="T122">              // no power save</text:span></text:p>
      <text:p text:style-name="P112" loext:marker-style-name="T107"><text:span text:style-name="T107">    </text:span><text:span text:style-name="T110">WRITE_PERI_REG</text:span><text:span text:style-name="T107">(RTC_CNTL_BROWN_OUT_REG, </text:span><text:span text:style-name="T120">0</text:span><text:span text:style-name="T107">);</text:span><text:span text:style-name="T122">  // disable brownout</text:span></text:p>
      <text:p text:style-name="P113" loext:marker-style-name="T107"/>
      <text:p text:style-name="P112" loext:marker-style-name="T107"><text:span text:style-name="T107">    </text:span><text:span text:style-name="T109">camera_config_t</text:span><text:span text:style-name="T107"> </text:span><text:span text:style-name="T114">config</text:span><text:span text:style-name="T107">;</text:span></text:p>
      <text:p text:style-name="P112" loext:marker-style-name="T107"><text:span text:style-name="T107">    </text:span><text:span text:style-name="T114">config</text:span><text:span text:style-name="T107">.</text:span><text:span text:style-name="T114">ledc_channel</text:span><text:span text:style-name="T107"> </text:span><text:span text:style-name="T113">=</text:span><text:span text:style-name="T107"> LEDC_CHANNEL_0;</text:span></text:p>
      <text:p text:style-name="P112" loext:marker-style-name="T107"><text:span text:style-name="T107">    </text:span><text:span text:style-name="T114">config</text:span><text:span text:style-name="T107">.</text:span><text:span text:style-name="T114">ledc_timer</text:span><text:span text:style-name="T107"> </text:span><text:span text:style-name="T113">=</text:span><text:span text:style-name="T107"> LEDC_TIMER_0;</text:span></text:p>
      <text:p text:style-name="P112" loext:marker-style-name="T107"><text:span text:style-name="T107">    </text:span><text:span text:style-name="T114">config</text:span><text:span text:style-name="T107">.</text:span><text:span text:style-name="T114">pin_d0</text:span><text:span text:style-name="T107"> </text:span><text:span text:style-name="T113">=</text:span><text:span text:style-name="T107"> </text:span><text:span text:style-name="T121">Y2_GPIO_NUM</text:span><text:span text:style-name="T107">;</text:span></text:p>
      <text:p text:style-name="P112" loext:marker-style-name="T107"><text:span text:style-name="T107">    </text:span><text:span text:style-name="T114">config</text:span><text:span text:style-name="T107">.</text:span><text:span text:style-name="T114">pin_d1</text:span><text:span text:style-name="T107"> </text:span><text:span text:style-name="T113">=</text:span><text:span text:style-name="T107"> </text:span><text:span text:style-name="T121">Y3_GPIO_NUM</text:span><text:span text:style-name="T107">;</text:span></text:p>
      <text:p text:style-name="P112" loext:marker-style-name="T107"><text:span text:style-name="T107">    </text:span><text:span text:style-name="T114">config</text:span><text:span text:style-name="T107">.</text:span><text:span text:style-name="T114">pin_d2</text:span><text:span text:style-name="T107"> </text:span><text:span text:style-name="T113">=</text:span><text:span text:style-name="T107"> </text:span><text:span text:style-name="T121">Y4_GPIO_NUM</text:span><text:span text:style-name="T107">;</text:span></text:p>
      <text:p text:style-name="P112" loext:marker-style-name="T107"><text:span text:style-name="T107">    </text:span><text:span text:style-name="T114">config</text:span><text:span text:style-name="T107">.</text:span><text:span text:style-name="T114">pin_d3</text:span><text:span text:style-name="T107"> </text:span><text:span text:style-name="T113">=</text:span><text:span text:style-name="T107"> </text:span><text:span text:style-name="T121">Y5_GPIO_NUM</text:span><text:span text:style-name="T107">;</text:span></text:p>
      <text:p text:style-name="P112" loext:marker-style-name="T107"><text:span text:style-name="T107">    </text:span><text:span text:style-name="T114">config</text:span><text:span text:style-name="T107">.</text:span><text:span text:style-name="T114">pin_d4</text:span><text:span text:style-name="T107"> </text:span><text:span text:style-name="T113">=</text:span><text:span text:style-name="T107"> </text:span><text:span text:style-name="T121">Y6_GPIO_NUM</text:span><text:span text:style-name="T107">;</text:span></text:p>
      <text:p text:style-name="P112" loext:marker-style-name="T107"><text:span text:style-name="T107">    </text:span><text:span text:style-name="T114">config</text:span><text:span text:style-name="T107">.</text:span><text:span text:style-name="T114">pin_d5</text:span><text:span text:style-name="T107"> </text:span><text:span text:style-name="T113">=</text:span><text:span text:style-name="T107"> </text:span><text:span text:style-name="T121">Y7_GPIO_NUM</text:span><text:span text:style-name="T107">;</text:span></text:p>
      <text:p text:style-name="P112" loext:marker-style-name="T107"><text:span text:style-name="T107">    </text:span><text:span text:style-name="T114">config</text:span><text:span text:style-name="T107">.</text:span><text:span text:style-name="T114">pin_d6</text:span><text:span text:style-name="T107"> </text:span><text:span text:style-name="T113">=</text:span><text:span text:style-name="T107"> </text:span><text:span text:style-name="T121">Y8_GPIO_NUM</text:span><text:span text:style-name="T107">;</text:span></text:p>
      <text:p text:style-name="P112" loext:marker-style-name="T107"><text:span text:style-name="T107">    </text:span><text:span text:style-name="T114">config</text:span><text:span text:style-name="T107">.</text:span><text:span text:style-name="T114">pin_d7</text:span><text:span text:style-name="T107"> </text:span><text:span text:style-name="T113">=</text:span><text:span text:style-name="T107"> </text:span><text:span text:style-name="T121">Y9_GPIO_NUM</text:span><text:span text:style-name="T107">;</text:span></text:p>
      <text:p text:style-name="P112" loext:marker-style-name="T107"><text:span text:style-name="T107">    </text:span><text:span text:style-name="T114">config</text:span><text:span text:style-name="T107">.</text:span><text:span text:style-name="T114">pin_xclk</text:span><text:span text:style-name="T107"> </text:span><text:span text:style-name="T113">=</text:span><text:span text:style-name="T107"> </text:span><text:span text:style-name="T121">XCLK_GPIO_NUM</text:span><text:span text:style-name="T107">;</text:span></text:p>
      <text:p text:style-name="P112" loext:marker-style-name="T107"><text:span text:style-name="T107">    </text:span><text:span text:style-name="T114">config</text:span><text:span text:style-name="T107">.</text:span><text:span text:style-name="T114">pin_pclk</text:span><text:span text:style-name="T107"> </text:span><text:span text:style-name="T113">=</text:span><text:span text:style-name="T107"> </text:span><text:span text:style-name="T121">PCLK_GPIO_NUM</text:span><text:span text:style-name="T107">;</text:span></text:p>
      <text:p text:style-name="P112" loext:marker-style-name="T107"><text:span text:style-name="T107">    </text:span><text:span text:style-name="T114">config</text:span><text:span text:style-name="T107">.</text:span><text:span text:style-name="T114">pin_vsync</text:span><text:span text:style-name="T107"> </text:span><text:span text:style-name="T113">=</text:span><text:span text:style-name="T107"> </text:span><text:span text:style-name="T121">VSYNC_GPIO_NUM</text:span><text:span text:style-name="T107">;</text:span></text:p>
      <text:p text:style-name="P112" loext:marker-style-name="T107"><text:span text:style-name="T107">    </text:span><text:span text:style-name="T114">config</text:span><text:span text:style-name="T107">.</text:span><text:span text:style-name="T114">pin_href</text:span><text:span text:style-name="T107"> </text:span><text:span text:style-name="T113">=</text:span><text:span text:style-name="T107"> </text:span><text:span text:style-name="T121">HREF_GPIO_NUM</text:span><text:span text:style-name="T107">;</text:span></text:p>
      <text:p text:style-name="P112" loext:marker-style-name="T107"><text:span text:style-name="T107">    </text:span><text:span text:style-name="T114">config</text:span><text:span text:style-name="T107">.</text:span><text:span text:style-name="T114">pin_sccb_sda</text:span><text:span text:style-name="T107"> </text:span><text:span text:style-name="T113">=</text:span><text:span text:style-name="T107"> </text:span><text:span text:style-name="T121">SIOD_GPIO_NUM</text:span><text:span text:style-name="T107">;</text:span></text:p>
      <text:p text:style-name="P112" loext:marker-style-name="T107"><text:span text:style-name="T107">    </text:span><text:span text:style-name="T114">config</text:span><text:span text:style-name="T107">.</text:span><text:span text:style-name="T114">pin_sccb_scl</text:span><text:span text:style-name="T107"> </text:span><text:span text:style-name="T113">=</text:span><text:span text:style-name="T107"> </text:span><text:span text:style-name="T121">SIOC_GPIO_NUM</text:span><text:span text:style-name="T107">;</text:span></text:p>
      <text:p text:style-name="P112" loext:marker-style-name="T107"><text:span text:style-name="T107">    </text:span><text:span text:style-name="T114">config</text:span><text:span text:style-name="T107">.</text:span><text:span text:style-name="T114">pin_pwdn</text:span><text:span text:style-name="T107"> </text:span><text:span text:style-name="T113">=</text:span><text:span text:style-name="T107"> </text:span><text:span text:style-name="T121">PWDN_GPIO_NUM</text:span><text:span text:style-name="T107">;</text:span></text:p>
      <text:p text:style-name="P112" loext:marker-style-name="T107"><text:span text:style-name="T107">    </text:span><text:span text:style-name="T114">config</text:span><text:span text:style-name="T107">.</text:span><text:span text:style-name="T114">pin_reset</text:span><text:span text:style-name="T107"> </text:span><text:span text:style-name="T113">=</text:span><text:span text:style-name="T107"> </text:span><text:span text:style-name="T121">RESET_GPIO_NUM</text:span><text:span text:style-name="T107">;</text:span></text:p>
      <text:p text:style-name="P112" loext:marker-style-name="T107"><text:span text:style-name="T107">    </text:span><text:span text:style-name="T114">config</text:span><text:span text:style-name="T107">.</text:span><text:span text:style-name="T114">xclk_freq_hz</text:span><text:span text:style-name="T107"> </text:span><text:span text:style-name="T113">=</text:span><text:span text:style-name="T107"> </text:span><text:span text:style-name="T120">20000000</text:span><text:span text:style-name="T107">;</text:span></text:p>
      <text:p text:style-name="P112" loext:marker-style-name="T107"><text:span text:style-name="T107">    </text:span><text:span text:style-name="T114">config</text:span><text:span text:style-name="T107">.</text:span><text:span text:style-name="T114">frame_size</text:span><text:span text:style-name="T107"> </text:span><text:span text:style-name="T113">=</text:span><text:span text:style-name="T107"> FRAMESIZE_UXGA;</text:span></text:p>
      <text:p text:style-name="P112" loext:marker-style-name="T107"><text:span text:style-name="T107">    </text:span><text:span text:style-name="T114">config</text:span><text:span text:style-name="T107">.</text:span><text:span text:style-name="T114">pixel_format</text:span><text:span text:style-name="T107"> </text:span><text:span text:style-name="T113">=</text:span><text:span text:style-name="T107"> PIXFORMAT_JPEG;</text:span><text:span text:style-name="T122">  // for streaming</text:span></text:p>
      <text:p text:style-name="P112" loext:marker-style-name="T107"><text:span text:style-name="T122">    //config.pixel_format = PIXFORMAT_RGB565; // for face detection/recognition</text:span><text:span text:style-name="T107"/></text:p>
      <text:p text:style-name="P112" loext:marker-style-name="T107"><text:span text:style-name="T107">    </text:span><text:span text:style-name="T114">config</text:span><text:span text:style-name="T107">.</text:span><text:span text:style-name="T114">grab_mode</text:span><text:span text:style-name="T107"> </text:span><text:span text:style-name="T113">=</text:span><text:span text:style-name="T107"> CAMERA_GRAB_WHEN_EMPTY;</text:span></text:p>
      <text:p text:style-name="P112" loext:marker-style-name="T107"><text:span text:style-name="T107">    </text:span><text:span text:style-name="T114">config</text:span><text:span text:style-name="T107">.</text:span><text:span text:style-name="T114">fb_location</text:span><text:span text:style-name="T107"> </text:span><text:span text:style-name="T113">=</text:span><text:span text:style-name="T107"> CAMERA_FB_IN_PSRAM;</text:span></text:p>
      <text:p text:style-name="P112" loext:marker-style-name="T107"><text:soft-page-break/><text:span text:style-name="T107">    </text:span><text:span text:style-name="T114">config</text:span><text:span text:style-name="T107">.</text:span><text:span text:style-name="T114">jpeg_quality</text:span><text:span text:style-name="T107"> </text:span><text:span text:style-name="T113">=</text:span><text:span text:style-name="T107"> </text:span><text:span text:style-name="T120">12</text:span><text:span text:style-name="T107">;</text:span></text:p>
      <text:p text:style-name="P112" loext:marker-style-name="T107"><text:span text:style-name="T107">    </text:span><text:span text:style-name="T114">config</text:span><text:span text:style-name="T107">.</text:span><text:span text:style-name="T114">fb_count</text:span><text:span text:style-name="T107"> </text:span><text:span text:style-name="T113">=</text:span><text:span text:style-name="T107"> </text:span><text:span text:style-name="T120">1</text:span><text:span text:style-name="T107">;</text:span></text:p>
      <text:p text:style-name="P112" loext:marker-style-name="T107"><text:span text:style-name="T107">    </text:span><text:span text:style-name="T107"/></text:p>
      <text:p text:style-name="P112" loext:marker-style-name="T107"><text:span text:style-name="T107">    </text:span><text:span text:style-name="T108">if</text:span><text:span text:style-name="T107"> (</text:span><text:span text:style-name="T114">config</text:span><text:span text:style-name="T107">.</text:span><text:span text:style-name="T114">pixel_format</text:span><text:span text:style-name="T107"> </text:span><text:span text:style-name="T113">==</text:span><text:span text:style-name="T107"> PIXFORMAT_JPEG) </text:span><text:span text:style-name="T114">{</text:span></text:p>
      <text:p text:style-name="P112" loext:marker-style-name="T107"><text:span text:style-name="T114">      </text:span><text:span text:style-name="T108">if</text:span><text:span text:style-name="T114"> (</text:span><text:span text:style-name="T110">psramFound</text:span><text:span text:style-name="T114">()) {</text:span></text:p>
      <text:p text:style-name="P112" loext:marker-style-name="T107"><text:span text:style-name="T114">        config.jpeg_quality </text:span><text:span text:style-name="T113">=</text:span><text:span text:style-name="T114"> </text:span><text:span text:style-name="T120">10</text:span><text:span text:style-name="T114">;</text:span></text:p>
      <text:p text:style-name="P112" loext:marker-style-name="T107"><text:span text:style-name="T114">        config.fb_count </text:span><text:span text:style-name="T113">=</text:span><text:span text:style-name="T114"> </text:span><text:span text:style-name="T120">2</text:span><text:span text:style-name="T114">;</text:span></text:p>
      <text:p text:style-name="P112" loext:marker-style-name="T107"><text:span text:style-name="T114">        config.grab_mode </text:span><text:span text:style-name="T113">=</text:span><text:span text:style-name="T114"> CAMERA_GRAB_LATEST;</text:span></text:p>
      <text:p text:style-name="P112" loext:marker-style-name="T107"><text:span text:style-name="T114">      } </text:span><text:span text:style-name="T108">else</text:span><text:span text:style-name="T114"> {</text:span></text:p>
      <text:p text:style-name="P112" loext:marker-style-name="T107"><text:span text:style-name="T122">        // Limit the frame size when PSRAM is not available</text:span><text:span text:style-name="T107"/></text:p>
      <text:p text:style-name="P112" loext:marker-style-name="T107"><text:span text:style-name="T114">        config.frame_size </text:span><text:span text:style-name="T113">=</text:span><text:span text:style-name="T114"> FRAMESIZE_SVGA;</text:span></text:p>
      <text:p text:style-name="P112" loext:marker-style-name="T107"><text:span text:style-name="T114">        config.fb_location </text:span><text:span text:style-name="T113">=</text:span><text:span text:style-name="T114"> CAMERA_FB_IN_DRAM;</text:span></text:p>
      <text:p text:style-name="P112" loext:marker-style-name="T107"><text:span text:style-name="T114">      }</text:span><text:span text:style-name="T107"/></text:p>
      <text:p text:style-name="P112" loext:marker-style-name="T107"><text:span text:style-name="T114">    }</text:span><text:span text:style-name="T107"> </text:span><text:span text:style-name="T108">else</text:span><text:span text:style-name="T107"> </text:span><text:span text:style-name="T114">{</text:span></text:p>
      <text:p text:style-name="P112" loext:marker-style-name="T107"><text:span text:style-name="T122">      // Best option for face detection/recognition</text:span><text:span text:style-name="T107"/></text:p>
      <text:p text:style-name="P112" loext:marker-style-name="T107"><text:span text:style-name="T114">      config.frame_size </text:span><text:span text:style-name="T113">=</text:span><text:span text:style-name="T114"> FRAMESIZE_240X240;</text:span></text:p>
      <text:p text:style-name="P112" loext:marker-style-name="T107"><text:span text:style-name="T114">    }</text:span><text:span text:style-name="T107"/></text:p>
      <text:p text:style-name="P112" loext:marker-style-name="T107"><text:span text:style-name="T107">    </text:span><text:span text:style-name="T107"/></text:p>
      <text:p text:style-name="P112" loext:marker-style-name="T107"><text:span text:style-name="T107">    </text:span><text:span text:style-name="T108">return</text:span><text:span text:style-name="T107"> </text:span><text:span text:style-name="T110">esp_camera_init</text:span><text:span text:style-name="T107">(</text:span><text:span text:style-name="T113">&amp;</text:span><text:span text:style-name="T114">config</text:span><text:span text:style-name="T107">) </text:span><text:span text:style-name="T113">==</text:span><text:span text:style-name="T107"> ESP_OK;</text:span></text:p>
      <text:p text:style-name="P112" loext:marker-style-name="T107"><text:span text:style-name="T107">}</text:span><text:span text:style-name="T107"/></text:p>
      <text:p text:style-name="P113" loext:marker-style-name="T107"/>
      <text:p text:style-name="P112" loext:marker-style-name="T107"><text:span text:style-name="T109">WebServer</text:span><text:span text:style-name="T107"> </text:span><text:span text:style-name="T114">server</text:span><text:span text:style-name="T107">(</text:span><text:span text:style-name="T120">80</text:span><text:span text:style-name="T107">);</text:span></text:p>
      <text:p text:style-name="P113" loext:marker-style-name="T107"/>
      <text:p text:style-name="P112" loext:marker-style-name="T107"><text:span text:style-name="T116">void</text:span><text:span text:style-name="T107"> </text:span><text:span text:style-name="T110">setup</text:span><text:span text:style-name="T107">() {</text:span></text:p>
      <text:p text:style-name="P112" loext:marker-style-name="T107"><text:span text:style-name="T107">    </text:span><text:span text:style-name="T114">Serial</text:span><text:span text:style-name="T107">.</text:span><text:span text:style-name="T110">begin</text:span><text:span text:style-name="T107">(</text:span><text:span text:style-name="T120">115200</text:span><text:span text:style-name="T107">);</text:span></text:p>
      <text:p text:style-name="P112" loext:marker-style-name="T107"><text:span text:style-name="T107">    </text:span><text:span text:style-name="T114">Serial</text:span><text:span text:style-name="T107">.</text:span><text:span text:style-name="T110">println</text:span><text:span text:style-name="T107">();</text:span></text:p>
      <text:p text:style-name="P113" loext:marker-style-name="T107"/>
      <text:p text:style-name="P112" loext:marker-style-name="T107"><text:span text:style-name="T122">    // camera</text:span><text:span text:style-name="T107"/></text:p>
      <text:p text:style-name="P112" loext:marker-style-name="T107"><text:span text:style-name="T107">    </text:span><text:span text:style-name="T108">if</text:span><text:span text:style-name="T107"> (</text:span><text:span text:style-name="T113">!</text:span><text:span text:style-name="T110">cameraInit</text:span><text:span text:style-name="T107">(FRAMESIZE_VGA, PIXFORMAT_JPEG, </text:span><text:span text:style-name="T120">4</text:span><text:span text:style-name="T107">)) </text:span><text:span text:style-name="T114">{</text:span></text:p>
      <text:p text:style-name="P112" loext:marker-style-name="T107"><text:span text:style-name="T114">        Serial.</text:span><text:span text:style-name="T110">println</text:span><text:span text:style-name="T114">(</text:span><text:span text:style-name="T111">"Camera error"</text:span><text:span text:style-name="T114">);</text:span></text:p>
      <text:p text:style-name="P112" loext:marker-style-name="T107"><text:span text:style-name="T114">        </text:span><text:span text:style-name="T108">for</text:span><text:span text:style-name="T114"> (;;);</text:span></text:p>
      <text:p text:style-name="P112" loext:marker-style-name="T107"><text:span text:style-name="T114">    }</text:span><text:span text:style-name="T107"/></text:p>
      <text:p text:style-name="P113" loext:marker-style-name="T107"/>
      <text:p text:style-name="P112" loext:marker-style-name="T107"><text:span text:style-name="T122">    // wifi</text:span><text:span text:style-name="T107"/></text:p>
      <text:p text:style-name="P112" loext:marker-style-name="T107"><text:span text:style-name="T107">    </text:span><text:span text:style-name="T114">WiFi</text:span><text:span text:style-name="T107">.</text:span><text:span text:style-name="T110">softAP</text:span><text:span text:style-name="T107">(</text:span><text:span text:style-name="T121">WIFI_SSID</text:span><text:span text:style-name="T107">, </text:span><text:span text:style-name="T121">WIFI_PASS</text:span><text:span text:style-name="T107">);</text:span></text:p>
      <text:p text:style-name="P112" loext:marker-style-name="T107"><text:span text:style-name="T107">  </text:span><text:span text:style-name="T107"/></text:p>
      <text:p text:style-name="P112" loext:marker-style-name="T107"><text:span text:style-name="T107">    </text:span><text:span text:style-name="T114">server</text:span><text:span text:style-name="T107">.</text:span><text:span text:style-name="T110">on</text:span><text:span text:style-name="T107">(</text:span><text:span text:style-name="T111">"/image"</text:span><text:span text:style-name="T107">, []() {</text:span></text:p>
      <text:p text:style-name="P112" loext:marker-style-name="T107"><text:span text:style-name="T107">        </text:span><text:span text:style-name="T114">Serial</text:span><text:span text:style-name="T107">.</text:span><text:span text:style-name="T110">println</text:span><text:span text:style-name="T107">(</text:span><text:span text:style-name="T111">"HTTP request received"</text:span><text:span text:style-name="T107">);</text:span></text:p>
      <text:p text:style-name="P112" loext:marker-style-name="T107"><text:span text:style-name="T107">        </text:span><text:span text:style-name="T107"/></text:p>
      <text:p text:style-name="P112" loext:marker-style-name="T107"><text:span text:style-name="T107">        </text:span><text:span text:style-name="T109">camera_fb_t</text:span><text:span text:style-name="T113">*</text:span><text:span text:style-name="T107"> fb </text:span><text:span text:style-name="T113">=</text:span><text:span text:style-name="T107"> </text:span><text:span text:style-name="T110">esp_camera_fb_get</text:span><text:span text:style-name="T107">();</text:span></text:p>
      <text:p text:style-name="P112" loext:marker-style-name="T107"><text:span text:style-name="T107">        </text:span><text:span text:style-name="T109">sensor_t</text:span><text:span text:style-name="T107"> </text:span><text:span text:style-name="T113">*</text:span><text:span text:style-name="T107">s </text:span><text:span text:style-name="T113">=</text:span><text:span text:style-name="T107"> </text:span><text:span text:style-name="T110">esp_camera_sensor_get</text:span><text:span text:style-name="T107">();</text:span></text:p>
      <text:p text:style-name="P112" loext:marker-style-name="T107"><text:span text:style-name="T107">        </text:span><text:span text:style-name="T107"/></text:p>
      <text:p text:style-name="P112" loext:marker-style-name="T107"><text:span text:style-name="T107">        </text:span><text:span text:style-name="T108">if</text:span><text:span text:style-name="T107"> (</text:span><text:span text:style-name="T114">s</text:span><text:span text:style-name="T107">-&gt;</text:span><text:span text:style-name="T114">id</text:span><text:span text:style-name="T107">.</text:span><text:span text:style-name="T114">PID</text:span><text:span text:style-name="T107"> </text:span><text:span text:style-name="T113">==</text:span><text:span text:style-name="T107"> OV3660_PID) </text:span><text:span text:style-name="T114">{</text:span></text:p>
      <text:p text:style-name="P112" loext:marker-style-name="T107"><text:span text:style-name="T114">            s-&gt;</text:span><text:span text:style-name="T110">set_vflip</text:span><text:span text:style-name="T114">(s, </text:span><text:span text:style-name="T120">1</text:span><text:span text:style-name="T114">);</text:span><text:span text:style-name="T122">        // flip it back</text:span></text:p>
      <text:p text:style-name="P112" loext:marker-style-name="T107"><text:span text:style-name="T114">            s-&gt;</text:span><text:span text:style-name="T110">set_brightness</text:span><text:span text:style-name="T114">(s, </text:span><text:span text:style-name="T120">1</text:span><text:span text:style-name="T114">);</text:span><text:span text:style-name="T122">   // up the brightness just a bit</text:span></text:p>
      <text:p text:style-name="P112" loext:marker-style-name="T107"><text:span text:style-name="T114">            s-&gt;</text:span><text:span text:style-name="T110">set_saturation</text:span><text:span text:style-name="T114">(s, </text:span><text:span text:style-name="T113">-</text:span><text:span text:style-name="T120">2</text:span><text:span text:style-name="T114">);</text:span><text:span text:style-name="T122">  // lower the saturation</text:span></text:p>
      <text:p text:style-name="P112" loext:marker-style-name="T107"><text:span text:style-name="T114">        }</text:span><text:span text:style-name="T107"/></text:p>
      <text:p text:style-name="P112" loext:marker-style-name="T107"><text:span text:style-name="T107">        </text:span><text:span text:style-name="T108">if</text:span><text:span text:style-name="T107"> (fb) </text:span><text:span text:style-name="T114">{</text:span></text:p>
      <text:p text:style-name="P112" loext:marker-style-name="T107"><text:span text:style-name="T114">            server.</text:span><text:span text:style-name="T110">setContentLength</text:span><text:span text:style-name="T114">(fb-&gt;len);</text:span></text:p>
      <text:p text:style-name="P112" loext:marker-style-name="T107"><text:span text:style-name="T114">            server.</text:span><text:span text:style-name="T110">send</text:span><text:span text:style-name="T114">(</text:span><text:span text:style-name="T120">200</text:span><text:span text:style-name="T114">, </text:span><text:span text:style-name="T111">"image/jpeg"</text:span><text:span text:style-name="T114">, </text:span><text:span text:style-name="T111">""</text:span><text:span text:style-name="T114">);</text:span></text:p>
      <text:p text:style-name="P112" loext:marker-style-name="T107"><text:span text:style-name="T114">            server.</text:span><text:span text:style-name="T110">sendContent</text:span><text:span text:style-name="T114">((</text:span><text:span text:style-name="T121">const</text:span><text:span text:style-name="T114"> </text:span><text:span text:style-name="T116">char</text:span><text:span text:style-name="T113">*</text:span><text:span text:style-name="T114">)fb-&gt;buf, fb-&gt;len);</text:span></text:p>
      <text:p text:style-name="P112" loext:marker-style-name="T107"><text:span text:style-name="T114">        }</text:span><text:span text:style-name="T107"/></text:p>
      <text:p text:style-name="P112" loext:marker-style-name="T107"><text:span text:style-name="T107">        </text:span><text:span text:style-name="T110">esp_camera_fb_return</text:span><text:span text:style-name="T107">(fb);</text:span></text:p>
      <text:p text:style-name="P112" loext:marker-style-name="T107"><text:span text:style-name="T107">    });</text:span><text:span text:style-name="T107"/></text:p>
      <text:p text:style-name="P112" loext:marker-style-name="T107"><text:span text:style-name="T107">    </text:span><text:span text:style-name="T114">server</text:span><text:span text:style-name="T107">.</text:span><text:span text:style-name="T110">begin</text:span><text:span text:style-name="T107">();</text:span></text:p>
      <text:p text:style-name="P113" loext:marker-style-name="T107"/>
      <text:p text:style-name="P112" loext:marker-style-name="T107"><text:span text:style-name="T107">}</text:span><text:span text:style-name="T107"/></text:p>
      <text:p text:style-name="P113" loext:marker-style-name="T107"/>
      <text:p text:style-name="P112" loext:marker-style-name="T107"><text:soft-page-break/><text:span text:style-name="T116">void</text:span><text:span text:style-name="T107"> </text:span><text:span text:style-name="T110">loop</text:span><text:span text:style-name="T107">() {</text:span></text:p>
      <text:p text:style-name="P113" loext:marker-style-name="T107"/>
      <text:p text:style-name="P112" loext:marker-style-name="T107"><text:span text:style-name="T107">    </text:span><text:span text:style-name="T114">server</text:span><text:span text:style-name="T107">.</text:span><text:span text:style-name="T110">handleClient</text:span><text:span text:style-name="T107">();</text:span></text:p>
      <text:p text:style-name="P112" loext:marker-style-name="T107"><text:span text:style-name="T107">    </text:span><text:span text:style-name="T107"/></text:p>
      <text:p text:style-name="P112" loext:marker-style-name="T107"><text:span text:style-name="T107">}</text:span><text:span text:style-name="T107"/></text:p>
      <text:p text:style-name="P117" loext:marker-style-name="T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OST type A" svg:font-family="'GOST type A'" style:font-family-generic="swiss"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00%" fo:text-align="lef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mm" fo:margin-bottom="2.12m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mm" fo:margin-bottom="3.53mm" style:contextual-spacing="false" fo:keep-with-next="always"/>
      <style:text-properties fo:font-size="14pt" style:font-size-asian="14pt" style:font-size-complex="14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4.23mm" fo:margin-bottom="15.17mm" style:contextual-spacing="false" fo:line-height="150%" fo:text-align="center" style:justify-single-word="false" fo:keep-with-next="always"/>
      <style:text-properties fo:font-size="14pt" fo:font-weight="bold" style:letter-kerning="true" style:font-size-asian="14pt" style:language-asian="en" style:country-asian="US" style:font-weight-asian="bold"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left="20mm" fo:margin-top="4.23mm" fo:margin-bottom="8.11mm" style:contextual-spacing="false" fo:line-height="150%" fo:keep-together="always" fo:keep-with-next="always"/>
      <style:text-properties fo:font-size="14pt" fo:font-weight="bold" style:font-name-asian="F" style:font-family-generic-asian="system" style:font-pitch-asian="variable" style:font-size-asian="14pt" style:language-asian="en" style:country-asian="US" style:font-weight-asian="bold"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left="20mm" fo:margin-top="8.11mm" fo:margin-bottom="8.11mm" style:contextual-spacing="false" fo:line-height="150%" fo:text-align="justify" style:justify-single-word="false" fo:keep-together="always" fo:keep-with-next="always" loext:word-spacing-minimum="75%" loext:word-spacing-maximum="133%"/>
      <style:text-properties fo:font-size="14pt" fo:font-weight="bold" style:font-name-asian="F" style:font-family-generic-asian="system" style:font-pitch-asian="variable" style:font-size-asian="14pt" style:font-weight-asian="bold"/>
    </style:style>
    <style:style style:name="Heading_20_4" style:display-name="Heading 4" style:family="paragraph" style:parent-style-name="Heading_20_3" style:next-style-name="Standard" loext:linked-style-name="Заголовок_20_4_20_Знак" style:default-outline-level="4" style:list-style-name="" style:class="chapter">
      <style:text-properties fo:font-style="italic" style:font-name-asian="Arial" style:font-family-asian="Arial" style:font-family-generic-asian="system" style:font-pitch-asian="variable" style:language-asian="en" style:country-asian="US" style:font-style-asian="italic" style:language-complex="hi" style:country-complex="IN"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71mm" fo:margin-bottom="0mm" style:contextual-spacing="false" fo:keep-together="always" fo:keep-with-next="always"/>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mm" style:type="center"/>
          <style:tab-stop style:position="165.01m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mm" style:type="center"/>
          <style:tab-stop style:position="165.01mm" style:type="right"/>
        </style:tab-stops>
      </style:paragraph-properties>
    </style:style>
    <style:style style:name="Чертежный" style:family="paragraph">
      <style:paragraph-properties fo:margin-top="0mm" fo:margin-bottom="0mm" style:contextual-spacing="false" fo:line-height="100%" fo:text-align="justify" style:justify-single-word="false" fo:orphans="2" fo:widows="2" style:writing-mode="lr-tb" loext:word-spacing-minimum="75%" loext:word-spacing-maximum="133%"/>
      <style:text-properties style:font-name="ISOCPEUR" fo:font-family="ISOCPEUR" style:font-family-generic="swiss" style:font-pitch="variable" fo:font-size="14pt" fo:language="uk" fo:country="UA" fo:font-style="italic"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mm" fo:margin-bottom="0mm" style:contextual-spacing="false" fo:line-height="100%" fo:text-align="left" style:justify-single-word="false" fo:orphans="2" fo:widows="2"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12.7mm" fo:margin-top="0mm" fo:margin-bottom="0mm" style:contextual-spacing="true"/>
    </style:style>
    <style:style style:name="Body_20_Text_20_Indent_20_2" style:display-name="Body Text Indent 2" style:family="paragraph" style:parent-style-name="Standard" loext:linked-style-name="Основной_20_текст_20_с_20_отступом_20_2_20_Знак">
      <style:paragraph-properties fo:margin-left="14.11mm" fo:text-align="justify" style:justify-single-word="false" loext:word-spacing-minimum="75%" loext:word-spacing-maximum="133%"/>
      <style:text-properties fo:font-size="14pt" style:font-size-asian="14pt" style:font-size-complex="14pt"/>
    </style:style>
    <style:style style:name="Contents_20_1" style:display-name="Contents 1" style:family="paragraph" style:parent-style-name="Standard" style:next-style-name="Standard" loext:linked-style-name="Оглавление_20_1_20_Знак" style:auto-update="true" style:class="index">
      <style:paragraph-properties fo:margin-top="6.35mm" fo:margin-bottom="0mm" style:contextual-spacing="false"/>
      <style:text-properties fo:text-transform="uppercase" style:font-name="Cambria" fo:font-family="Cambria"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top="4.23mm" fo:margin-bottom="0mm" style:contextual-spacing="false"/>
      <style:text-properties style:font-name="Calibri" fo:font-family="Calibri" style:font-family-generic="roman" style:font-pitch="variable"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line-height="150%">
        <style:tab-stops>
          <style:tab-stop style:position="174.82mm" style:type="right" style:leader-style="dotted" style:leader-text="."/>
        </style:tab-stops>
      </style:paragraph-properties>
      <style:text-properties fo:font-size="14pt" style:font-size-asian="14pt"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4.23mm" fo:margin-bottom="0mm" style:contextual-spacing="false" fo:line-height="107%" fo:keep-together="always"/>
      <style:text-properties fo:color="#365f91" loext:opacity="100%" style:font-name="Cambria" fo:font-family="Cambria" style:font-family-generic="roman" style:font-pitch="variable" fo:font-weight="normal" style:letter-kerning="false"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ГОСТ_20_Обычный_20_текст" style:display-name="ГОСТ Обычный текст" style:family="paragraph" style:parent-style-name="Standard" loext:linked-style-name="ГОСТ_20_Обычный_20_текст_20_Знак">
      <loext:graphic-properties draw:fill="solid" draw:fill-color="#ffffff"/>
      <style:paragraph-properties fo:line-height="150%" fo:text-align="justify" style:justify-single-word="false" fo:text-indent="12.51mm" style:auto-text-indent="false" fo:background-color="#ffffff" loext:word-spacing-minimum="75%" loext:word-spacing-maximum="133%"/>
      <style:text-properties fo:color="#000000" loext:opacity="100%" fo:font-size="14pt" style:font-name-asian="Calibri2" style:font-family-asian="Calibri" style:font-family-generic-asian="system" style:font-pitch-asian="variable" style:font-size-asian="14pt" style:font-size-complex="14pt" style:font-weight-complex="bold">
        <loext:char-complex-color loext:theme-type="dark1" loext:color-type="theme"/>
      </style:text-properties>
    </style:style>
    <style:style style:name="ГОСТ_20_Заголовок_20_1" style:display-name="ГОСТ Заголовок 1" style:family="paragraph" style:parent-style-name="Heading_20_1" style:next-style-name="ГОСТ_20_Обычный_20_текст" loext:linked-style-name="ГОСТ_20_Заголовок_20_1_20_Знак" style:auto-update="true" style:default-outline-level="2" style:list-style-name="">
      <style:paragraph-properties fo:margin-left="20mm" fo:margin-top="4.23mm" fo:margin-bottom="0mm" style:contextual-spacing="false" fo:text-align="justify" style:justify-single-word="false" fo:keep-together="always" loext:word-spacing-minimum="75%" loext:word-spacing-maximum="133%"/>
      <style:text-properties fo:color="#000000" loext:opacity="100%" style:letter-kerning="false" style:font-size-complex="14pt" style:font-weight-complex="normal">
        <loext:char-complex-color loext:theme-type="dark1" loext:color-type="theme"/>
      </style:text-properties>
    </style:style>
    <style:style style:name="ГОСТ_20_Заголовок_20_2" style:display-name="ГОСТ Заголовок 2" style:family="paragraph" style:parent-style-name="Heading_20_2" style:next-style-name="ГОСТ_20_Обычный_20_текст" loext:linked-style-name="ГОСТ_20_Заголовок_20_2_20_Знак">
      <style:paragraph-properties fo:text-align="justify" style:justify-single-word="false" loext:word-spacing-minimum="75%" loext:word-spacing-maximum="133%"/>
      <style:text-properties fo:color="#000000" loext:opacity="100%" style:font-name-asian="Times New Roman1" style:font-family-asian="'Times New Roman'" style:font-family-generic-asian="system" style:font-pitch-asian="variable" style:font-weight-complex="bold">
        <loext:char-complex-color loext:theme-type="dark1" loext:color-type="theme"/>
      </style:text-properties>
    </style:style>
    <style:style style:name="ГОСТ_20_Заголовок_20_3" style:display-name="ГОСТ Заголовок 3" style:family="paragraph" style:parent-style-name="Heading_20_3" style:next-style-name="ГОСТ_20_Обычный_20_текст" loext:linked-style-name="ГОСТ_20_Заголовок_20_3_20_Char">
      <style:paragraph-properties fo:margin-top="4.23mm" fo:margin-bottom="8.11mm" style:contextual-spacing="false" fo:text-align="center" style:justify-single-word="false" fo:keep-together="auto" fo:keep-with-next="auto" loext:word-spacing-minimum="75%" loext:word-spacing-maximum="133%"/>
      <style:text-properties fo:color="#000000" loext:opacity="100%" style:font-name-asian="Times New Roman1" style:font-family-asian="'Times New Roman'" style:font-family-generic-asian="system" style:font-pitch-asian="variable" style:font-size-complex="13.5pt" style:font-weight-complex="bold">
        <loext:char-complex-color loext:theme-type="dark1" loext:color-type="theme"/>
      </style:text-properties>
    </style:style>
    <style:style style:name="ГОСТ_20_Заголовок_20_4" style:display-name="ГОСТ Заголовок 4" style:family="paragraph" style:parent-style-name="Heading_20_4" style:next-style-name="ГОСТ_20_Обычный_20_текст" loext:linked-style-name="ГОСТ_20_Заголовок_20_4_20_Знак" style:auto-update="true" style:list-style-name="WWNum1" style:list-level="4">
      <style:paragraph-properties fo:margin-left="17.5mm" fo:margin-top="4.23mm" fo:margin-bottom="8.11mm" style:contextual-spacing="false" fo:text-indent="-7.5mm" style:auto-text-indent="false"/>
      <style:text-properties fo:color="#000000" loext:opacity="100%" fo:font-style="normal" style:font-style-asian="normal">
        <loext:char-complex-color loext:theme-type="dark1" loext:color-type="theme"/>
      </style:text-properties>
    </style:style>
    <style:style style:name="Marginalia" style:family="paragraph" style:parent-style-name="Standard" loext:linked-style-name="Текст_20_примечания_20_Знак"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Normal_20__28_Web_29_" style:display-name="Normal (Web)" style:family="paragraph" style:parent-style-name="Standard">
      <style:paragraph-properties fo:margin-top="4.94mm" fo:margin-bottom="4.94mm" style:contextual-spacing="false"/>
    </style:style>
    <style:style style:name="ГлавныйЗаголовок" style:family="paragraph" style:parent-style-name="Heading_20_1" loext:linked-style-name="ГлавныйЗаголовок_20_Знак">
      <style:paragraph-properties fo:margin-left="62.44mm" fo:margin-top="4.23mm" fo:margin-bottom="0mm" style:contextual-spacing="false" fo:keep-together="always" fo:text-indent="12.49mm" style:auto-text-indent="false"/>
      <style:text-properties style:font-size-complex="14pt" style:font-weight-complex="normal"/>
    </style:style>
    <style:style style:name="ГлавныйПодзаголовок" style:family="paragraph" style:parent-style-name="Heading_20_2" loext:linked-style-name="ГлавныйПодзаголовок_20_Знак">
      <style:paragraph-properties fo:text-indent="6.35mm" style:auto-text-indent="false"/>
      <style:text-properties fo:font-weight="normal" style:font-weight-asian="normal" style:font-size-complex="14pt"/>
    </style:style>
    <style:style style:name="ГлавныйПодПодЗаголовок" style:family="paragraph" style:parent-style-name="Heading_20_3" loext:linked-style-name="ГлавныйПодПодЗаголовок_20_Знак">
      <style:text-properties fo:font-weight="normal" style:font-weight-asian="normal" style:font-size-complex="14pt"/>
    </style:style>
    <style:style style:name="ГлавныйПодПодПодЗаголовок" style:family="paragraph" style:parent-style-name="Heading_20_4" loext:linked-style-name="ГлавныйПодПодПодЗаголовок_20_Знак">
      <style:paragraph-properties fo:margin-left="12.49mm"/>
    </style:style>
    <style:style style:name="western" style:family="paragraph" style:parent-style-name="Standard">
      <style:paragraph-properties fo:margin-top="4.94mm" fo:margin-bottom="2.5mm" style:contextual-spacing="false" fo:line-height="115%"/>
      <style:text-properties fo:color="#000000" loext:opacity="100%" style:font-name="Liberation Serif" fo:font-family="'Liberation Serif'" style:font-family-generic="roman" style:font-pitch="variable" style:font-name-complex="Liberation Serif1" style:font-family-complex="'Liberation Serif'" style:font-family-generic-complex="system" style:font-pitch-complex="variable"/>
    </style:style>
    <style:style style:name="Text_20_body_20_indent" style:display-name="Text body indent" style:family="paragraph" style:parent-style-name="Standard" loext:linked-style-name="Основной_20_текст_20_с_20_отступом_20_Знак" style:class="text">
      <style:paragraph-properties fo:margin-left="4.99mm" fo:margin-top="0mm" fo:margin-bottom="2.12mm" style:contextual-spacing="false"/>
    </style:style>
    <style:style style:name="_5f_Текст" style:display-name="_Текст" style:family="paragraph" style:parent-style-name="Standard" loext:linked-style-name="_5f_Текст_20_Знак">
      <style:paragraph-properties fo:line-height="150%" fo:text-align="justify" style:justify-single-word="false" fo:text-indent="15.01mm" style:auto-text-indent="false" loext:word-spacing-minimum="75%" loext:word-spacing-maximum="133%"/>
      <style:text-properties fo:font-size="14pt" style:font-name-asian="Calibri2" style:font-family-asian="Calibri" style:font-family-generic-asian="system" style:font-pitch-asian="variable" style:font-size-asian="14pt" style:language-asian="en" style:country-asian="US" style:font-size-complex="14pt"/>
    </style:style>
    <style:style style:name="_5f_СписЛитер" style:display-name="_СписЛитер" style:family="paragraph" style:parent-style-name="Standard" style:list-style-name="WWNum2">
      <style:paragraph-properties fo:margin-left="16mm" fo:text-indent="-6mm" style:auto-text-indent="false"/>
      <style:text-properties fo:font-size="9pt" style:font-size-asian="9pt" style:language-asian="en" style:country-asian="US" style:font-size-complex="10pt"/>
    </style:style>
    <style:style style:name="article-render_5f__5f_block" style:display-name="article-render__block" style:family="paragraph" style:parent-style-name="Standard">
      <style:paragraph-properties fo:margin-top="4.94mm" fo:margin-bottom="4.94mm" style:contextual-spacing="false"/>
    </style:style>
    <style:style style:name="_2d_Список" style:display-name="-Список" style:family="paragraph" style:parent-style-name="List_20_Paragraph" loext:linked-style-name="_2d_Список_20_Знак">
      <style:paragraph-properties fo:margin-left="22.7mm" fo:line-height="150%" fo:text-align="justify" style:justify-single-word="false" loext:word-spacing-minimum="75%" loext:word-spacing-maximum="133%"/>
      <style:text-properties fo:font-size="14pt" style:font-size-asian="14pt" style:font-size-complex="14pt"/>
    </style:style>
    <style:style style:name="Table_20_Paragraph" style:display-name="Table Paragraph" style:family="paragraph" style:parent-style-name="Standard">
      <style:paragraph-properties fo:line-height="115%" fo:orphans="0" fo:widows="0"/>
      <style:text-properties style:language-asian="en" style:country-asian="US" style:font-size-complex="11pt"/>
    </style:style>
    <style:style style:name="HTML_20_Preformatted" style:display-name="HTML Preformatted" style:family="paragraph" style:parent-style-name="Standard" loext:linked-style-name="Стандартный_20_HTML_20_Знак">
      <style:paragraph-properties>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Приложение_20_Код" style:display-name="Приложение Код" style:family="paragraph" style:parent-style-name="Standard" loext:linked-style-name="Приложение_20_Код_20_Знак">
      <style:paragraph-properties fo:line-height="90%"/>
      <style:text-properties fo:font-size="9pt" style:font-name-asian="Calibri2" style:font-family-asian="Calibri" style:font-family-generic-asian="system" style:font-pitch-asian="variable" style:font-size-asian="9pt" style:language-asian="en" style:country-asian="US" style:font-size-complex="11pt"/>
    </style:style>
    <style:style style:name="_35_._20_Осн._20_текст" style:display-name="5. Осн. текст" style:family="paragraph" style:parent-style-name="Standard" loext:linked-style-name="_35_._20_Осн._20_текст_20_Знак">
      <style:paragraph-properties fo:line-height="150%" fo:text-align="justify" style:justify-single-word="false" fo:text-indent="12.51mm" style:auto-text-indent="false" loext:word-spacing-minimum="75%" loext:word-spacing-maximum="133%"/>
      <style:text-properties fo:font-size="14pt" style:font-size-asian="14pt" style:font-size-complex="14pt"/>
    </style:style>
    <style:style style:name="_36_._20_Марк._20_список" style:display-name="6. Марк. список" style:family="paragraph" style:parent-style-name="List_20_Paragraph" loext:linked-style-name="_36_._20_Марк._20_список_20_Знак" style:list-style-name="WWNum10">
      <style:paragraph-properties fo:margin-left="0mm" fo:margin-top="0mm" fo:margin-bottom="2.12mm" style:contextual-spacing="true" fo:line-height="150%" fo:text-align="justify" style:justify-single-word="false" fo:hyphenation-ladder-count="no-limit" fo:hyphenation-keep="auto" loext:hyphenation-keep-type="column" loext:hyphenation-keep-line="false" fo:text-indent="15.01mm" style:auto-text-indent="false" loext:word-spacing-minimum="75%" loext:word-spacing-maximum="133%"/>
      <style:text-properties fo:font-size="14pt" style:letter-kerning="true" style:font-name-asian="NSimSun" style:font-family-asian="NSimSun" style:font-family-generic-asian="system" style:font-pitch-asian="variable" style:font-size-asian="14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_5f_Заголовок_20_2" style:display-name="_Заголовок 2" style:family="paragraph" style:default-outline-level="2" style:list-style-name="">
      <style:paragraph-properties fo:margin-left="5.01mm" fo:margin-right="1.99mm" fo:margin-top="4.23mm" fo:margin-bottom="4.23mm" style:contextual-spacing="false" fo:line-height="150%" fo:text-align="justify" style:justify-single-word="false" fo:orphans="2" fo:widows="2" fo:hyphenation-ladder-count="no-limit" fo:hyphenation-keep="auto" loext:hyphenation-keep-type="column" loext:hyphenation-keep-line="false" fo:text-indent="2.5mm" style:auto-text-indent="false" style:writing-mode="lr-tb" loext:word-spacing-minimum="75%" loext:word-spacing-maximum="133%"/>
      <style:text-properties style:font-name="Times New Roman" fo:font-family="'Times New Roman'" style:font-family-generic="roman" style:font-pitch="variable" fo:font-size="14pt" style:font-name-asian="MS Mincho" style:font-family-asian="'MS Mincho'"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Стиль2" style:family="paragraph" style:parent-style-name="Standard">
      <style:paragraph-properties fo:margin-top="2.12mm" fo:margin-bottom="0mm" style:contextual-spacing="false" fo:line-height="150%" fo:text-align="justify" style:justify-single-word="false" fo:text-indent="10mm" style:auto-text-indent="false" loext:word-spacing-minimum="75%" loext:word-spacing-maximum="133%"/>
      <style:text-properties style:font-name-asian="MS Mincho" style:font-family-asian="'MS Mincho'" style:font-family-generic-asian="system" style:font-pitch-asian="variable"/>
    </style:style>
    <style:style style:name="_32_._20_Список_20_2" style:display-name="2. Список 2" style:family="paragraph" style:parent-style-name="Standard" loext:linked-style-name="_32_._20_Список_20_2_20_Знак" style:default-outline-level="2" style:list-style-name="">
      <style:paragraph-properties fo:margin-top="4.23mm" fo:margin-bottom="4.23mm" style:contextual-spacing="false" fo:line-height="150%" fo:text-align="justify" style:justify-single-word="false" fo:hyphenation-ladder-count="no-limit" fo:hyphenation-keep="auto" loext:hyphenation-keep-type="column" loext:hyphenation-keep-line="false" fo:keep-with-next="always" loext:word-spacing-minimum="75%" loext:word-spacing-maximum="133%">
        <style:tab-stops>
          <style:tab-stop style:position="17.52mm"/>
        </style:tab-stops>
      </style:paragraph-properties>
      <style:text-properties fo:font-size="14pt" style:letter-kerning="true" style:font-size-asian="14pt" style:font-size-complex="14pt" fo:hyphenate="false" fo:hyphenation-remain-char-count="2" fo:hyphenation-push-char-count="2" loext:hyphenation-no-caps="false" loext:hyphenation-no-last-word="false" loext:hyphenation-word-char-count="5" loext:hyphenation-zone="no-limit"/>
    </style:style>
    <style:style style:name="_34_._20_Нум._20_список" style:display-name="4. Нум. список" style:family="paragraph" style:parent-style-name="_35_._20_Осн._20_текст" loext:linked-style-name="_34_._20_Нум._20_список_20_Знак" style:list-style-name="WWNum11">
      <style:paragraph-properties fo:margin-left="0mm" fo:text-indent="15.01mm" style:auto-text-indent="false">
        <style:tab-stops>
          <style:tab-stop style:position="15.01mm"/>
        </style:tab-stops>
      </style:paragraph-properties>
      <style:text-properties style:font-name-asian="NSimSun" style:font-family-asian="NSimSun" style:font-family-generic-asian="system" style:font-pitch-asian="variable" style:language-asian="en" style:country-asian="US" style:language-complex="hi" style:country-complex="IN"/>
    </style:style>
    <style:style style:name="Default" style:family="paragraph">
      <style:paragraph-properties fo:margin-top="0mm" fo:margin-bottom="0mm" style:contextual-spacing="false" fo:line-height="100%" fo:text-align="lef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Standard" style:next-style-name="Standard" style:auto-update="true" style:class="index">
      <style:paragraph-properties fo:margin-left="8.47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2.7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6.93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1.17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5.4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29.63mm"/>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msonormal" style:family="paragraph" style:parent-style-name="Standard">
      <style:paragraph-properties fo:margin-top="4.94mm" fo:margin-bottom="4.94mm" style:contextual-spacing="false"/>
    </style:style>
    <style:style style:name="sc1" style:family="paragraph" style:parent-style-name="Standard">
      <style:paragraph-properties fo:margin-top="4.94mm" fo:margin-bottom="4.94mm" style:contextual-spacing="false"/>
      <style:text-properties fo:color="#008000" loext:opacity="100%"/>
    </style:style>
    <style:style style:name="sc2" style:family="paragraph" style:parent-style-name="Standard">
      <style:paragraph-properties fo:margin-top="4.94mm" fo:margin-bottom="4.94mm" style:contextual-spacing="false"/>
      <style:text-properties fo:color="#ff0000" loext:opacity="100%"/>
    </style:style>
    <style:style style:name="sc3" style:family="paragraph" style:parent-style-name="Standard">
      <style:paragraph-properties fo:margin-top="4.94mm" fo:margin-bottom="4.94mm" style:contextual-spacing="false"/>
      <style:text-properties fo:color="#808080" loext:opacity="100%"/>
    </style:style>
    <style:style style:name="sc4" style:family="paragraph" style:parent-style-name="Standard">
      <style:paragraph-properties fo:margin-top="4.94mm" fo:margin-bottom="4.94mm" style:contextual-spacing="false"/>
      <style:text-properties fo:color="#808080" loext:opacity="100%"/>
    </style:style>
    <style:style style:name="sc5" style:family="paragraph" style:parent-style-name="Standard">
      <style:paragraph-properties fo:margin-top="4.94mm" fo:margin-bottom="4.94mm" style:contextual-spacing="false"/>
      <style:text-properties fo:color="#0000ff" loext:opacity="100%" fo:font-weight="bold" style:font-weight-asian="bold" style:font-weight-complex="bold"/>
    </style:style>
    <style:style style:name="sc8" style:family="paragraph" style:parent-style-name="Standard">
      <style:paragraph-properties fo:margin-top="4.94mm" fo:margin-bottom="4.94mm" style:contextual-spacing="false"/>
      <style:text-properties fo:font-weight="bold" style:font-weight-asian="bold" style:font-weight-complex="bold"/>
    </style:style>
    <style:style style:name="sc9" style:family="paragraph" style:parent-style-name="Standard">
      <style:paragraph-properties fo:margin-top="4.94mm" fo:margin-bottom="4.94mm" style:contextual-spacing="false"/>
      <style:text-properties fo:color="#ff00ff" loext:opacity="100%"/>
    </style:style>
    <style:style style:name="sc10" style:family="paragraph" style:parent-style-name="Standard">
      <style:paragraph-properties fo:margin-top="4.94mm" fo:margin-bottom="4.94mm" style:contextual-spacing="false"/>
      <style:text-properties fo:color="#000080" loext:opacity="100%" fo:font-weight="bold" style:font-weight-asian="bold" style:font-weight-complex="bold"/>
    </style:style>
    <style:style style:name="sc14" style:family="paragraph" style:parent-style-name="Standard">
      <style:paragraph-properties fo:margin-top="4.94mm" fo:margin-bottom="4.94mm" style:contextual-spacing="false"/>
      <style:text-properties fo:color="#880088" loext:opacity="100%" fo:font-weight="bold" style:font-weight-asian="bold" style:font-weight-complex="bold"/>
    </style:style>
    <style:style style:name="sc15" style:family="paragraph" style:parent-style-name="Standard">
      <style:paragraph-properties fo:margin-top="4.94mm" fo:margin-bottom="4.94mm" style:contextual-spacing="false"/>
      <style:text-properties fo:color="#ff8000" loext:opacity="100%" fo:font-style="italic" style:font-style-asian="italic" style:font-style-complex="italic"/>
    </style:style>
    <style:style style:name="sc16" style:family="paragraph" style:parent-style-name="Standard">
      <style:paragraph-properties fo:margin-top="4.94mm" fo:margin-bottom="4.94mm" style:contextual-spacing="false"/>
      <style:text-properties fo:color="#808080" loext:opacity="100%"/>
    </style:style>
    <style:style style:name="sc17" style:family="paragraph" style:parent-style-name="Standard">
      <style:paragraph-properties fo:margin-top="4.94mm" fo:margin-bottom="4.94mm" style:contextual-spacing="false"/>
      <style:text-properties fo:color="#808080" loext:opacity="100%"/>
    </style:style>
    <style:style style:name="Стиль1" style:family="paragraph" style:parent-style-name="Contents_20_1" loext:linked-style-name="Стиль1_20_Знак">
      <style:paragraph-properties fo:margin-top="0mm" fo:margin-bottom="0mm" style:contextual-spacing="false" fo:line-height="150%">
        <style:tab-stops>
          <style:tab-stop style:position="174.82mm" style:type="right" style:leader-style="dotted" style:leader-text="."/>
        </style:tab-stops>
      </style:paragraph-properties>
      <style:text-properties style:font-name="Times New Roman" fo:font-family="'Times New Roman'" style:font-family-generic="roman" style:font-pitch="variable" fo:font-size="14pt" fo:font-weight="normal" style:font-size-asian="14pt" style:font-weight-asian="normal" style:font-size-complex="14pt" style:font-weight-complex="normal"/>
    </style:style>
    <style:style style:name="Intense_20_Quote" style:display-name="Intense Quote" style:family="paragraph" style:parent-style-name="Standard" style:next-style-name="Standard" loext:linked-style-name="Выделенная_20_цитата_20_Знак">
      <style:paragraph-properties fo:margin-left="15.24mm" fo:margin-right="15.24mm" fo:margin-top="6.35mm" fo:margin-bottom="6.35mm" style:contextual-spacing="false" fo:text-align="center" style:justify-single-word="false" fo:padding-left="0mm" fo:padding-right="0mm" fo:padding-top="3.53mm" fo:padding-bottom="3.53mm" fo:border-left="none" fo:border-right="none" fo:border-top="0.51pt solid #4f81bd" fo:border-bottom="0.51pt solid #4f81bd"/>
      <style:text-properties fo:color="#4f81bd" loext:opacity="100%" fo:font-style="italic" style:font-style-asian="italic" style:font-style-complex="italic">
        <loext:char-complex-color loext:theme-type="accent1" loext:color-type="theme"/>
      </style:text-properties>
    </style:style>
    <style:style style:name="Стиль3" style:family="paragraph" style:parent-style-name="_5f_Текст" loext:linked-style-name="Стиль3_20_Знак">
      <style:text-properties fo:font-size="9pt" fo:language="en" fo:country="US" style:font-size-asian="9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6pt" style:font-weight-complex="bol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ГОСТ_20_Заголовок_20_1_20_Знак" style:display-name="ГОСТ Заголовок 1 Знак" style:family="text" style:parent-style-name="Заголовок_20_1_20_Знак" loext:linked-style-name="ГОСТ_20_Заголовок_20_1">
      <style:text-properties fo:color="#000000" loext:opacity="100%" style:font-name="Times New Roman" fo:font-family="'Times New Roman'"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normal">
        <loext:char-complex-color loext:theme-type="dark1" loext:color-type="theme"/>
      </style:text-properties>
    </style:style>
    <style:style style:name="ГОСТ_20_Заголовок_20_2_20_Знак" style:display-name="ГОСТ Заголовок 2 Знак" style:family="text" style:parent-style-name="Default_20_Paragraph_20_Font" loext:linked-style-name="ГОСТ_20_Заголовок_20_2">
      <style:text-properties fo:color="#000000" loext:opacity="1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3pt" style:font-weight-complex="bold">
        <loext:char-complex-color loext:theme-type="dark1" loext:color-type="theme"/>
      </style:text-properties>
    </style:style>
    <style:style style:name="ГОСТ_20_Обычный_20_текст_20_Знак" style:display-name="ГОСТ Обычный текст Знак" style:family="text" style:parent-style-name="Default_20_Paragraph_20_Font" loext:linked-style-name="ГОСТ_20_Обычный_20_текст">
      <style:text-properties fo:color="#000000" loext:opacity="100%" style:font-name="Times New Roman" fo:font-family="'Times New Roman'" style:font-family-generic="roman" style:font-pitch="variable" fo:font-size="14pt" fo:background-color="#ffffff" style:font-name-asian="Calibri2"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font-weight-complex="bold">
        <loext:char-complex-color loext:theme-type="dark1" loext:color-type="theme"/>
      </style:text-properties>
    </style:style>
    <style:style style:name="ГОСТ_20_Заголовок_20_3_20_Char" style:display-name="ГОСТ Заголовок 3 Char" style:family="text" style:parent-style-name="ГОСТ_20_Заголовок_20_2_20_Знак" loext:linked-style-name="ГОСТ_20_Заголовок_20_3">
      <style:text-properties fo:color="#000000" loext:opacity="1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3.5pt" style:font-weight-complex="bold">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font-weight="bold" style:font-name-asian="F"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fo:font-style="italic" fo:font-weight="bold" style:font-name-asian="Arial" style:font-family-asian="Arial"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2pt" style:language-complex="hi" style:country-complex="IN" style:font-style-complex="italic"/>
    </style:style>
    <style:style style:name="ГОСТ_20_Заголовок_20_4_20_Знак" style:display-name="ГОСТ Заголовок 4 Знак" style:family="text" style:parent-style-name="Заголовок_20_4_20_Знак" loext:linked-style-name="ГОСТ_20_Заголовок_20_4">
      <style:text-properties fo:color="#000000" loext:opacity="100%" style:font-name="Times New Roman" fo:font-family="'Times New Roman'" style:font-family-generic="roman" style:font-pitch="variable" fo:font-size="14pt" fo:font-style="normal" fo:font-weight="bold" style:font-name-asian="Arial" style:font-family-asian="Arial"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italic">
        <loext:char-complex-color loext:theme-type="dark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ГлавныйЗаголовок_20_Знак" style:display-name="ГлавныйЗаголовок Знак" style:family="text" style:parent-style-name="Заголовок_20_1_20_Знак" loext:linked-style-name="ГлавныйЗаголовок">
      <style:text-properties style:font-name="Times New Roman" fo:font-family="'Times New Roman'"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normal"/>
    </style:style>
    <style:style style:name="ГлавныйПодзаголовок_20_Знак" style:display-name="ГлавныйПодзаголовок Знак" style:family="text" style:parent-style-name="Заголовок_20_2_20_Знак" loext:linked-style-name="ГлавныйПодзаголовок">
      <style:text-properties fo:color="#365f91" loext:opacity="100%" style:font-name="Times New Roman" fo:font-family="'Times New Roman'" style:font-family-generic="roman" style:font-pitch="variable" fo:font-size="14pt" fo:font-weight="normal" style:font-name-asian="F"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ГлавныйПодПодЗаголовок_20_Знак" style:display-name="ГлавныйПодПодЗаголовок Знак" style:family="text" style:parent-style-name="Заголовок_20_3_20_Знак" loext:linked-style-name="ГлавныйПодПодЗаголовок">
      <style:text-properties fo:color="#243f60" loext:opacity="100%" style:font-name="Times New Roman" fo:font-family="'Times New Roman'" style:font-family-generic="roman" style:font-pitch="variable" fo:font-size="14pt" fo:font-weight="normal" style:font-name-asian="F"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loext:char-complex-color loext:theme-type="accent1" loext:color-type="theme">
          <loext:transformation loext:type="shade" loext:value="5019"/>
        </loext:char-complex-color>
      </style:text-properties>
    </style:style>
    <style:style style:name="Просмотренная_20_гиперссылка1" style:display-name="Просмотренная гиперссылка1" style:family="text" style:parent-style-name="Default_20_Paragraph_20_Font">
      <style:text-properties fo:color="#954f72" loext:opacity="100%" style:text-underline-style="solid" style:text-underline-width="auto" style:text-underline-color="font-color"/>
    </style:style>
    <style:style style:name="ГлавныйПодПодПодЗаголовок_20_Знак" style:display-name="ГлавныйПодПодПодЗаголовок Знак" style:family="text" style:parent-style-name="Заголовок_20_4_20_Знак" loext:linked-style-name="ГлавныйПодПодПодЗаголовок">
      <style:text-properties fo:color="#365f91" loext:opacity="100%" style:font-name="Times New Roman" fo:font-family="'Times New Roman'" style:font-family-generic="roman" style:font-pitch="variable" fo:font-size="14pt" fo:font-style="italic" fo:font-weight="bold" style:font-name-asian="F" style:font-family-generic-asian="system" style:font-pitch-asian="variable" style:font-size-asian="14pt" style:language-asian="ru" style:country-asian="RU" style:font-style-asian="italic" style:font-weight-asian="bold" style:font-name-complex="F" style:font-family-generic-complex="system" style:font-pitch-complex="variable" style:font-size-complex="12pt" style:language-complex="hi" style:country-complex="IN" style:font-style-complex="italic">
        <loext:char-complex-color loext:theme-type="accent1" loext:color-type="theme">
          <loext:transformation loext:type="shade" loext:value="2509"/>
        </loext:char-complex-color>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Заголовок_20_5_20_Знак" style:display-name="Заголовок 5 Знак" style:family="text" style:parent-style-name="Default_20_Paragraph_20_Font">
      <style:text-properties fo:color="#365f91" loext:opacity="100%" style:font-name="Cambria" fo:font-family="Cambria" style:font-family-generic="roman" style:font-pitch="variable" fo:font-size="12pt" style:font-name-asian="F" style:font-family-generic-asian="system" style:font-pitch-asian="variable" style:font-size-asian="12pt" style:language-asian="ru" style:country-asian="RU"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_5f_Текст_20_Знак" style:display-name="_Текст Знак" style:family="text" loext:linked-style-name="_5f_Текст">
      <style:text-properties style:font-name="Times New Roman" fo:font-family="'Times New Roman'" style:font-family-generic="roman" style:font-pitch="variable" fo:font-size="14pt" style:font-name-asian="Calibri2"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Неразрешенное_20_упоминание2" style:display-name="Неразрешенное упоминание2" style:family="text" style:parent-style-name="Default_20_Paragraph_20_Font">
      <style:text-properties fo:color="#605e5c" loext:opacity="100%" fo:background-color="#e1dfdd"/>
    </style:style>
    <style:style style:name="Неразрешенное_20_упоминание3" style:display-name="Неразрешенное упоминание3" style:family="text" style:parent-style-name="Default_20_Paragraph_20_Font">
      <style:text-properties fo:color="#605e5c" loext:opacity="100%" fo:background-color="#e1dfdd"/>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_2d_Список_20_Знак" style:display-name="-Список Знак" style:family="text" style:parent-style-name="Абзац_20_списка_20_Знак" loext:linked-style-name="_2d_Список">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Page_20_Number" style:display-name="Page Number" style:family="text" style:parent-style-name="Default_20_Paragraph_20_Fon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Приложение_20_Код_20_Знак" style:display-name="Приложение Код Знак" style:family="text" style:parent-style-name="Default_20_Paragraph_20_Font" loext:linked-style-name="Приложение_20_Код">
      <style:text-properties style:font-name="Times New Roman" fo:font-family="'Times New Roman'" style:font-family-generic="roman" style:font-pitch="variable" fo:font-size="9pt" style:font-name-asian="Calibri2" style:font-family-asian="Calibri" style:font-family-generic-asian="system" style:font-pitch-asian="variable" style:font-size-asian="9pt" style:font-name-complex="Times New Roman1" style:font-family-complex="'Times New Roman'" style:font-family-generic-complex="system" style:font-pitch-complex="variable"/>
    </style:style>
    <style:style style:name="pre" style:family="text" style:parent-style-name="Default_20_Paragraph_20_Font"/>
    <style:style style:name="_35_._20_Осн._20_текст_20_Знак" style:display-name="5. Осн. текст Знак" style:family="text" loext:linked-style-name="_35_._20_Осн._20_текст">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sentence"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_36_._20_Марк._20_список_20_Знак" style:display-name="6. Марк. список Знак" style:family="text" loext:linked-style-name="_36_._20_Марк._20_список">
      <style:text-properties style:font-name="Times New Roman" fo:font-family="'Times New Roman'" style:font-family-generic="roman" style:font-pitch="variable" fo:font-size="14pt" style:letter-kerning="true" style:font-name-asian="NSimSun" style:font-family-asian="NSimSun" style:font-family-generic-asian="system" style:font-pitch-asian="variable" style:font-size-asian="14pt" style:language-asian="zh" style:country-asian="CN" style:font-name-complex="Mangal" style:font-family-complex="Mangal" style:font-family-generic-complex="system" style:font-pitch-complex="variable" style:font-size-complex="10.5pt" style:language-complex="hi" style:country-complex="IN"/>
    </style:style>
    <style:style style:name="_32_._20_Список_20_2_20_Знак" style:display-name="2. Список 2 Знак" style:family="text" loext:linked-style-name="_32_._20_Список_20_2">
      <style:text-properties style:font-name="Times New Roman" fo:font-family="'Times New Roman'" style:font-family-generic="roman" style:font-pitch="variable" fo:font-size="14pt" style:letter-kerning="tru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itation" style:family="text" style:parent-style-name="Default_20_Paragraph_20_Font"/>
    <style:style style:name="_34_._20_Нум._20_список_20_Знак" style:display-name="4. Нум. список Знак" style:family="text" loext:linked-style-name="_34_._20_Нум._20_список">
      <style:text-properties style:font-name="Times New Roman" fo:font-family="'Times New Roman'" style:font-family-generic="roman" style:font-pitch="variable" fo:font-size="14pt" style:font-name-asian="NSimSun" style:font-family-asian="NSimSun" style:font-family-generic-asian="system" style:font-pitch-asian="variable" style:font-size-asian="14pt" style:font-name-complex="Times New Roman1" style:font-family-complex="'Times New Roman'" style:font-family-generic-complex="system" style:font-pitch-complex="variable" style:font-size-complex="14pt" style:language-complex="hi" style:country-complex="IN"/>
    </style:style>
    <style:style style:name="Placeholder_20_Text" style:display-name="Placeholder Text" style:family="text" style:parent-style-name="Default_20_Paragraph_20_Font">
      <style:text-properties fo:color="#808080" loext:opacity="100%"/>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2" style:family="text" style:parent-style-name="Default_20_Paragraph_20_Font">
      <style:text-properties fo:color="#00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3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4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81" style:family="text" style:parent-style-name="Default_20_Paragraph_20_Font">
      <style:text-properties fo:color="#00000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41" style:family="text" style:parent-style-name="Default_20_Paragraph_20_Font">
      <style:text-properties fo:color="#880088"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91" style:family="text" style:parent-style-name="Default_20_Paragraph_20_Font">
      <style:text-properties fo:color="#ff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51" style:family="text" style:parent-style-name="Default_20_Paragraph_20_Font">
      <style:text-properties fo:color="#ff8000" loext:opacity="100%" style:font-name="Courier New" fo:font-family="'Courier New'" style:font-family-generic="roman" style:font-pitch="variable" fo:font-size="10pt" fo:font-style="italic" style:font-size-asian="10pt" style:font-style-asian="italic" style:font-name-complex="Courier New1" style:font-family-complex="'Courier New'" style:font-family-generic-complex="system" style:font-pitch-complex="variable" style:font-size-complex="10pt" style:font-style-complex="italic"/>
    </style:style>
    <style:style style:name="sc71" style:family="text" style:parent-style-name="Default_20_Paragraph_20_Font">
      <style:text-properties fo:color="#ff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Оглавление_20_1_20_Знак" style:display-name="Оглавление 1 Знак" style:family="text" style:parent-style-name="Default_20_Paragraph_20_Font">
      <style:text-properties fo:text-transform="uppercase"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Стиль1_20_Знак" style:display-name="Стиль1 Знак" style:family="text" style:parent-style-name="Оглавление_20_1_20_Знак" loext:linked-style-name="Стиль1">
      <style:text-properties fo:text-transform="uppercase" style:font-name="Times New Roman" fo:font-family="'Times New Roman'" style:font-family-generic="roman" style:font-pitch="variable" fo:font-size="14pt"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font-weight-complex="normal"/>
    </style:style>
    <style:style style:name="Выделенная_20_цитата_20_Знак" style:display-name="Выделенная цитата Знак" style:family="text" style:parent-style-name="Default_20_Paragraph_20_Font" loext:linked-style-name="Intense_20_Quote">
      <style:text-properties fo:color="#4f81bd"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style:text-properties>
    </style:style>
    <style:style style:name="Стиль3_20_Знак" style:display-name="Стиль3 Знак" style:family="text" style:parent-style-name="_5f_Текст_20_Знак" loext:linked-style-name="Стиль3">
      <style:text-properties style:font-name="Times New Roman" fo:font-family="'Times New Roman'" style:font-family-generic="roman" style:font-pitch="variable" fo:font-size="9pt" fo:language="en" fo:country="US" style:font-name-asian="Calibri2" style:font-family-asian="Calibri" style:font-family-generic-asian="system" style:font-pitch-asian="variable" style:font-size-asian="9pt" style:font-name-complex="Times New Roman1" style:font-family-complex="'Times New Roman'" style:font-family-generic-complex="system" style:font-pitch-complex="variable" style:font-size-complex="14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style:use-window-font-color="true" loext:opacity="0%" fo:font-size="14pt" style:font-size-asian="14pt"/>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use-window-font-color="true" loext:opacity="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dex_20_Link" style:display-name="Index Link" style:family="text"/>
    <style:style style:name="ListLabel_20_100" style:display-name="ListLabel 100" style:family="text">
      <style:text-properties fo:font-size="14pt" fo:language="en" fo:country="US" style:font-size-asian="14pt" style:font-size-complex="14pt"/>
    </style:style>
    <style:style style:name="ListLabel_20_101" style:display-name="ListLabel 101" style:family="text">
      <style:text-properties fo:font-size="14pt" style:font-size-asian="14pt" style:font-size-complex="14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style:style style:name="Formula" style:family="graphic">
      <style:graphic-properties text:anchor-type="as-char" svg:y="0mm" fo:margin-left="0mm" fo:margin-right="0mm"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Нет_20_списка1" style:display-name="Нет списка1">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Нет_20_списка2" style:display-name="Нет списка2">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7.94mm" fo:margin-left="7.94m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space" fo:text-indent="-12.7mm" fo:margin-left="12.7m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space" fo:text-indent="-12.7mm" fo:margin-left="12.7m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fo:text-indent="-19.05mm" fo:margin-left="19.05m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mm" fo:margin-left="19.05m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mm" fo:margin-left="25.4m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mm" fo:margin-left="31.75m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mm" fo:margin-left="31.75m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8.1mm" fo:margin-left="38.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7.71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30.41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43.1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5.81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8.51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81.21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93.91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6.61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9.3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format="1" text:start-value="4">
        <style:list-level-properties text:list-level-position-and-space-mode="label-alignment">
          <style:list-level-label-alignment text:label-followed-by="space" fo:text-indent="-6.61mm" fo:margin-left="26.63mm"/>
        </style:list-level-properties>
      </text:list-level-style-number>
      <text:list-level-style-number text:level="2" text:style-name="ListLabel_20_20" loext:is-legal="true" loext:num-list-format="%1%.%2%" style:num-format="1" text:display-levels="2">
        <style:list-level-properties text:list-level-position-and-space-mode="label-alignment">
          <style:list-level-label-alignment text:label-followed-by="space" fo:text-indent="-7.41mm" fo:margin-left="27.43mm"/>
        </style:list-level-properties>
      </text:list-level-style-number>
      <text:list-level-style-number text:level="3" text:style-name="ListLabel_20_21" loext:is-legal="true" loext:num-list-format="%1%.%2%.%3%" style:num-format="1" text:display-levels="3">
        <style:list-level-properties text:list-level-position-and-space-mode="label-alignment">
          <style:list-level-label-alignment text:label-followed-by="listtab" fo:text-indent="-12.7mm" fo:margin-left="32.72mm"/>
        </style:list-level-properties>
      </text:list-level-style-number>
      <text:list-level-style-number text:level="4" text:style-name="ListLabel_20_22" loext:is-legal="true" loext:num-list-format="%1%.%2%.%3%.%4%" style:num-format="1" text:display-levels="4">
        <style:list-level-properties text:list-level-position-and-space-mode="label-alignment">
          <style:list-level-label-alignment text:label-followed-by="listtab" fo:text-indent="-12.7mm" fo:margin-left="32.72mm"/>
        </style:list-level-properties>
      </text:list-level-style-number>
      <text:list-level-style-number text:level="5" text:style-name="ListLabel_20_23" loext:is-legal="true" loext:num-list-format="%1%.%2%.%3%.%4%.%5%" style:num-format="1" text:display-levels="5">
        <style:list-level-properties text:list-level-position-and-space-mode="label-alignment">
          <style:list-level-label-alignment text:label-followed-by="listtab" fo:text-indent="-19.05mm" fo:margin-left="39.07mm"/>
        </style:list-level-properties>
      </text:list-level-style-number>
      <text:list-level-style-number text:level="6" text:style-name="ListLabel_20_24" loext:is-legal="true" loext:num-list-format="%1%.%2%.%3%.%4%.%5%.%6%" style:num-format="1" text:display-levels="6">
        <style:list-level-properties text:list-level-position-and-space-mode="label-alignment">
          <style:list-level-label-alignment text:label-followed-by="listtab" fo:text-indent="-19.05mm" fo:margin-left="39.07mm"/>
        </style:list-level-properties>
      </text:list-level-style-number>
      <text:list-level-style-number text:level="7" text:style-name="ListLabel_20_25" loext:is-legal="true" loext:num-list-format="%1%.%2%.%3%.%4%.%5%.%6%.%7%" style:num-format="1" text:display-levels="7">
        <style:list-level-properties text:list-level-position-and-space-mode="label-alignment">
          <style:list-level-label-alignment text:label-followed-by="listtab" fo:text-indent="-25.4mm" fo:margin-left="45.42mm"/>
        </style:list-level-properties>
      </text:list-level-style-number>
      <text:list-level-style-number text:level="8" text:style-name="ListLabel_20_26" loext:is-legal="true" loext:num-list-format="%1%.%2%.%3%.%4%.%5%.%6%.%7%.%8%" style:num-format="1" text:display-levels="8">
        <style:list-level-properties text:list-level-position-and-space-mode="label-alignment">
          <style:list-level-label-alignment text:label-followed-by="listtab" fo:text-indent="-25.4mm" fo:margin-left="45.42mm"/>
        </style:list-level-properties>
      </text:list-level-style-number>
      <text:list-level-style-number text:level="9" text:style-name="ListLabel_20_27" loext:is-legal="true" loext:num-list-format="%1%.%2%.%3%.%4%.%5%.%6%.%7%.%8%.%9%" style:num-format="1" text:display-levels="9">
        <style:list-level-properties text:list-level-position-and-space-mode="label-alignment">
          <style:list-level-label-alignment text:label-followed-by="listtab" fo:text-indent="-31.75mm" fo:margin-left="51.7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space" fo:text-indent="-6.61mm" fo:margin-left="26.63mm"/>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7.41mm" fo:margin-left="27.43mm"/>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12.7mm" fo:margin-left="32.72mm"/>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12.7mm" fo:margin-left="32.72mm"/>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19.05mm" fo:margin-left="39.07mm"/>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19.05mm" fo:margin-left="39.07mm"/>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25.4mm" fo:margin-left="45.42mm"/>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25.4mm" fo:margin-left="45.42mm"/>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31.75mm" fo:margin-left="51.7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format="1" text:start-value="5">
        <style:list-level-properties text:list-level-position-and-space-mode="label-alignment">
          <style:list-level-label-alignment text:label-followed-by="space" fo:text-indent="-6.61mm" fo:margin-left="26.63mm"/>
        </style:list-level-properties>
      </text:list-level-style-number>
      <text:list-level-style-number text:level="2" text:style-name="ListLabel_20_38" loext:is-legal="true" loext:num-list-format="%1%.%2%" style:num-format="1" text:display-levels="2">
        <style:list-level-properties text:list-level-position-and-space-mode="label-alignment">
          <style:list-level-label-alignment text:label-followed-by="space" fo:text-indent="-7.41mm" fo:margin-left="27.43mm"/>
        </style:list-level-properties>
      </text:list-level-style-number>
      <text:list-level-style-number text:level="3" text:style-name="ListLabel_20_39" loext:is-legal="true" loext:num-list-format="%1%.%2%.%3%" style:num-format="1" text:display-levels="3">
        <style:list-level-properties text:list-level-position-and-space-mode="label-alignment">
          <style:list-level-label-alignment text:label-followed-by="space" fo:text-indent="-12.7mm" fo:margin-left="32.72mm"/>
        </style:list-level-properties>
      </text:list-level-style-number>
      <text:list-level-style-number text:level="4" text:style-name="ListLabel_20_40" loext:is-legal="true" loext:num-list-format="%1%.%2%.%3%.%4%" style:num-format="1" text:display-levels="4">
        <style:list-level-properties text:list-level-position-and-space-mode="label-alignment">
          <style:list-level-label-alignment text:label-followed-by="listtab" fo:text-indent="-12.7mm" fo:margin-left="32.72mm"/>
        </style:list-level-properties>
      </text:list-level-style-number>
      <text:list-level-style-number text:level="5" text:style-name="ListLabel_20_41" loext:is-legal="true" loext:num-list-format="%1%.%2%.%3%.%4%.%5%" style:num-format="1" text:display-levels="5">
        <style:list-level-properties text:list-level-position-and-space-mode="label-alignment">
          <style:list-level-label-alignment text:label-followed-by="listtab" fo:text-indent="-19.05mm" fo:margin-left="39.07mm"/>
        </style:list-level-properties>
      </text:list-level-style-number>
      <text:list-level-style-number text:level="6" text:style-name="ListLabel_20_42" loext:is-legal="true" loext:num-list-format="%1%.%2%.%3%.%4%.%5%.%6%" style:num-format="1" text:display-levels="6">
        <style:list-level-properties text:list-level-position-and-space-mode="label-alignment">
          <style:list-level-label-alignment text:label-followed-by="listtab" fo:text-indent="-19.05mm" fo:margin-left="39.07mm"/>
        </style:list-level-properties>
      </text:list-level-style-number>
      <text:list-level-style-number text:level="7" text:style-name="ListLabel_20_43" loext:is-legal="true" loext:num-list-format="%1%.%2%.%3%.%4%.%5%.%6%.%7%" style:num-format="1" text:display-levels="7">
        <style:list-level-properties text:list-level-position-and-space-mode="label-alignment">
          <style:list-level-label-alignment text:label-followed-by="listtab" fo:text-indent="-25.4mm" fo:margin-left="45.42mm"/>
        </style:list-level-properties>
      </text:list-level-style-number>
      <text:list-level-style-number text:level="8" text:style-name="ListLabel_20_44" loext:is-legal="true" loext:num-list-format="%1%.%2%.%3%.%4%.%5%.%6%.%7%.%8%" style:num-format="1" text:display-levels="8">
        <style:list-level-properties text:list-level-position-and-space-mode="label-alignment">
          <style:list-level-label-alignment text:label-followed-by="listtab" fo:text-indent="-25.4mm" fo:margin-left="45.42mm"/>
        </style:list-level-properties>
      </text:list-level-style-number>
      <text:list-level-style-number text:level="9" text:style-name="ListLabel_20_45" loext:is-legal="true" loext:num-list-format="%1%.%2%.%3%.%4%.%5%.%6%.%7%.%8%.%9%" style:num-format="1" text:display-levels="9">
        <style:list-level-properties text:list-level-position-and-space-mode="label-alignment">
          <style:list-level-label-alignment text:label-followed-by="listtab" fo:text-indent="-31.75mm" fo:margin-left="51.7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6.35mm" fo:margin-left="12.7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25.21mm"/>
        </style:list-level-properties>
        <style:text-properties fo:font-family="'Times New Roman'" style:font-style-name="Обычный" style:font-family-generic="roman"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37.91mm"/>
        </style:list-level-properties>
        <style:text-properties fo:font-family="'Courier New'" style:font-style-name="Обычный"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50.61m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63.31mm"/>
        </style:list-level-properties>
        <style:text-properties fo:font-family="Symbol" style:font-style-name="Обычный"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76.01mm"/>
        </style:list-level-properties>
        <style:text-properties fo:font-family="'Courier New'" style:font-style-name="Обычный"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88.71m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101.41mm"/>
        </style:list-level-properties>
        <style:text-properties fo:font-family="Symbol" style:font-style-name="Обычный"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14.11mm"/>
        </style:list-level-properties>
        <style:text-properties fo:font-family="'Courier New'" style:font-style-name="Обычный"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26.81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style:font-style-name="Обычный"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Обычный"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Обычный"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Обычный"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6.35mm" fo:margin-left="21.36m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6.35mm" fo:margin-left="34.06m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3.18mm" fo:margin-left="46.76m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6.35mm" fo:margin-left="59.46m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6.35mm" fo:margin-left="72.16m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3.18mm" fo:margin-left="84.86m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6.35mm" fo:margin-left="97.56m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6.35mm" fo:margin-left="110.26m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3.18mm" fo:margin-left="122.9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space" fo:text-indent="-6.35mm" fo:margin-left="27.71mm"/>
        </style:list-level-properties>
        <style:text-properties fo:font-family="'Times New Roman'" style:font-style-name="Обычный" style:font-family-generic="roman"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40.41mm"/>
        </style:list-level-properties>
        <style:text-properties fo:font-family="'Courier New'" style:font-style-name="Обычный"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53.11m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65.81m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78.51mm"/>
        </style:list-level-properties>
        <style:text-properties fo:font-family="'Courier New'" style:font-style-name="Обычный"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91.21m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103.91m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16.61mm"/>
        </style:list-level-properties>
        <style:text-properties fo:font-family="'Courier New'" style:font-style-name="Обычный"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29.31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6.35mm" fo:margin-left="21.36m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6.35mm" fo:margin-left="34.06m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3.18mm" fo:margin-left="46.76m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6.35mm" fo:margin-left="59.46m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6.35mm" fo:margin-left="72.16m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3.18mm" fo:margin-left="84.86m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6.35mm" fo:margin-left="97.56m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6.35mm" fo:margin-left="110.26m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3.18mm" fo:margin-left="122.9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loext:graphic-properties draw:fill="none"/>
      <style:paragraph-properties fo:text-align="left"/>
      <style:text-properties fo:font-size="12pt"/>
    </style:style>
    <style:style style:name="MP2" style:family="paragraph" style:parent-style-name="Standard">
      <style:paragraph-properties fo:text-align="center" style:justify-single-word="false"/>
    </style:style>
    <style:style style:name="MP3" style:family="paragraph">
      <loext:graphic-properties draw:fill="none"/>
      <style:paragraph-properties fo:text-align="left"/>
    </style:style>
    <style:style style:name="MP4" style:family="paragraph" style:parent-style-name="Footer">
      <style:paragraph-properties fo:text-align="center" style:justify-single-word="false"/>
    </style:style>
    <style:style style:name="MP5" style:family="paragraph" style:parent-style-name="Standard">
      <style:paragraph-properties fo:margin-top="0mm" fo:margin-bottom="2.12mm" style:contextual-spacing="false" fo:text-align="center" style:justify-single-word="false"/>
      <style:text-properties style:font-name="GOST type A" fo:font-size="18pt" fo:font-style="italic" style:font-name-asian="Calibri2" style:font-size-asian="18pt" style:font-style-asian="italic" style:font-size-complex="18pt"/>
    </style:style>
    <style:style style:name="MP6" style:family="paragraph" style:parent-style-name="Чертежный">
      <style:paragraph-properties fo:text-align="center" style:justify-single-word="false" loext:word-spacing-minimum="75%" loext:word-spacing-maximum="133%"/>
    </style:style>
    <style:style style:name="MP7" style:family="paragraph" style:parent-style-name="Чертежный">
      <style:text-properties style:font-name="GOST type A" fo:font-size="12pt" style:font-size-asian="12pt" style:font-size-complex="12pt"/>
    </style:style>
    <style:style style:name="MP8" style:family="paragraph" style:parent-style-name="Чертежный">
      <style:text-properties fo:font-size="9pt" fo:language="ru" fo:country="RU" style:font-size-asian="9pt"/>
    </style:style>
    <style:style style:name="MP9" style:family="paragraph" style:parent-style-name="Чертежный">
      <style:text-properties style:font-name="GOST type A" fo:font-size="12pt" fo:language="ru" fo:country="RU" style:font-size-asian="12pt" style:font-size-complex="12pt"/>
    </style:style>
    <style:style style:name="MP10" style:family="paragraph" style:parent-style-name="Standard">
      <style:paragraph-properties fo:text-align="center" style:justify-single-word="false"/>
      <style:text-properties style:font-name="GOST type A"/>
    </style:style>
    <style:style style:name="MP11" style:family="paragraph" style:parent-style-name="Footer">
      <style:paragraph-properties fo:text-align="right" style:justify-single-word="false"/>
    </style:style>
    <style:style style:name="MP12" style:family="paragraph">
      <loext:graphic-properties draw:fill="none"/>
      <style:paragraph-properties fo:text-align="left"/>
      <style:text-properties fo:font-size="18pt"/>
    </style:style>
    <style:style style:name="MT1" style:family="text">
      <style:text-properties style:font-name="GOST type A" fo:font-style="italic" style:font-style-asian="italic"/>
    </style:style>
    <style:style style:name="MT2" style:family="text">
      <style:text-properties style:font-name="Calibri1" fo:font-size="20pt" style:font-size-asian="20pt"/>
    </style:style>
    <style:style style:name="MT3" style:family="text">
      <style:text-properties style:font-name="GOST type A" fo:font-size="20pt" fo:font-style="italic" style:font-size-asian="20pt" style:font-style-asian="italic" style:font-style-complex="italic"/>
    </style:style>
    <style:style style:name="MT4" style:family="text">
      <style:text-properties style:font-name="GOST type A" fo:font-size="20pt" fo:language="en" fo:country="US" fo:font-style="italic" style:font-size-asian="20pt" style:font-style-asian="italic" style:font-style-complex="italic"/>
    </style:style>
    <style:style style:name="MT5" style:family="text">
      <style:text-properties fo:color="#212529" loext:opacity="100%" fo:font-family="'Segoe UI'" style:font-family-generic="swiss" style:font-pitch="variable" fo:background-color="#ffffff" loext:char-shading-value="0" style:font-family-complex="'Segoe UI'" style:font-family-generic-complex="system" style:font-pitch-complex="variable"/>
    </style:style>
    <style:style style:name="MT6" style:family="text">
      <style:text-properties style:font-name="GOST type A" fo:font-size="18pt" fo:font-style="italic" style:font-name-asian="Calibri2" style:font-size-asian="18pt" style:font-style-asian="italic" style:font-size-complex="18pt"/>
    </style:style>
    <style:style style:name="MT7" style:family="text">
      <style:text-properties style:font-name="GOST type A" fo:font-size="12pt" style:font-size-asian="12pt" style:font-size-complex="12pt"/>
    </style:style>
    <style:style style:name="MT8" style:family="text">
      <style:text-properties style:font-name="GOST type A" fo:font-size="12pt" fo:language="en" fo:country="US" style:font-size-asian="12pt" style:font-size-complex="12pt"/>
    </style:style>
    <style:style style:name="MT9" style:family="text">
      <style:text-properties style:font-name="GOST type A" fo:font-size="12pt" fo:language="ru" fo:country="RU" style:font-size-asian="12pt" style:font-size-complex="12pt"/>
    </style:style>
    <style:style style:name="MT10" style:family="text">
      <style:text-properties style:font-name="GOST type A"/>
    </style:style>
    <style:style style:name="MT11" style:family="text">
      <style:text-properties fo:font-size="9pt" fo:language="ru" fo:country="RU" style:font-size-asian="9pt"/>
    </style:style>
    <style:style style:name="MT12" style:family="text">
      <style:text-properties style:font-name="Times New Roman" fo:font-size="9pt" style:font-size-asian="9pt" style:font-size-complex="9pt"/>
    </style:style>
    <style:style style:name="MT13" style:family="text">
      <style:text-properties style:font-name="GOST type A" fo:font-size="18pt" fo:font-style="italic" style:font-size-asian="18pt" style:font-style-asian="italic" style:font-size-complex="16pt" style:font-style-complex="italic"/>
    </style:style>
    <style:style style:name="MT14" style:family="text">
      <style:text-properties style:font-name="GOST type A" fo:font-style="italic" style:font-style-asian="italic" style:font-size-complex="11pt" style:font-style-complex="italic"/>
    </style:style>
    <style:style style:name="MT15" style:family="text">
      <style:text-properties style:font-name="GOST type A" fo:font-size="24pt" fo:language="en" fo:country="US" fo:font-style="italic" style:font-size-asian="24pt" style:font-style-asian="italic" style:font-size-complex="24pt"/>
    </style:style>
    <style:style style:name="MT16" style:family="text">
      <style:text-properties style:font-name="GOST type A" fo:font-size="26pt" fo:font-style="italic" style:font-size-asian="26pt" style:font-style-asian="italic" style:font-size-complex="26pt"/>
    </style:style>
    <style:style style:name="MT17" style:family="text">
      <style:text-properties fo:font-family="Arial" style:font-family-generic="swiss" style:font-pitch="variable" fo:font-size="26pt" fo:font-style="italic" style:font-size-asian="26pt" style:font-style-asian="italic" style:font-name-complex="Arial" style:font-size-complex="26pt"/>
    </style:style>
    <style:style style:name="MT18" style:family="text">
      <style:text-properties style:font-name="GOST type A" fo:font-size="26pt" fo:language="en" fo:country="US" fo:font-style="italic" style:font-size-asian="26pt" style:font-style-asian="italic" style:font-size-complex="26pt"/>
    </style:style>
    <style:style style:name="Mgr1" style:family="graphic">
      <style:graphic-properties style:writing-mode="lr-tb" loext:decorative="false" fo:margin-left="0mm" fo:margin-right="0.41mm" fo:margin-top="0mm" fo:margin-bottom="0.93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71mm" svg:stroke-color="#000000" draw:stroke-linejoin="miter" draw:fill="none" loext:fill-use-slide-background="false" draw:textarea-vertical-align="top" draw:auto-grow-height="false" fo:min-height="0mm" fo:min-width="0mm" fo:padding-top="1.27mm" fo:padding-bottom="1.27mm" fo:padding-left="2.54mm" fo:padding-right="2.54mm" fo:wrap-option="wrap" loext:decorative="false" style:run-through="background"/>
    </style:style>
    <style:style style:name="Mgr3" style:family="graphic">
      <style:graphic-properties draw:stroke="solid" svg:stroke-width="0.71mm" svg:stroke-color="#000000" draw:stroke-linejoin="round" draw:fill="none" loext:fill-use-slide-background="false" draw:textarea-horizontal-align="center" draw:textarea-vertical-align="top" draw:auto-grow-height="false" fo:padding-top="0mm" fo:padding-bottom="0mm" fo:padding-left="0mm" fo:padding-right="0mm" fo:wrap-option="wrap" loext:decorative="false" style:run-through="background"/>
    </style:style>
    <style:style style:name="Mgr4" style:family="graphic">
      <style:graphic-properties draw:stroke="solid" svg:stroke-width="0.35mm" svg:stroke-color="#000000" draw:stroke-linejoin="round" draw:fill="none" loext:fill-use-slide-background="false" draw:textarea-horizontal-align="center" draw:textarea-vertical-align="top" draw:auto-grow-height="false" fo:padding-top="0mm" fo:padding-bottom="0mm" fo:padding-left="0mm" fo:padding-right="0mm" fo:wrap-option="wrap" loext:decorative="false" style:run-through="background"/>
    </style:style>
    <style:style style:name="Mgr5" style:family="graphic" style:parent-style-name="Frame">
      <style:graphic-properties draw:stroke="none" svg:stroke-width="0mm" draw:fill="none" loext:fill-use-slide-background="false" draw:textarea-vertical-align="top" draw:auto-grow-height="false" fo:min-height="0mm" fo:min-width="0mm" fo:padding-top="0.35mm" fo:padding-bottom="0.35mm" fo:padding-left="0.35mm" fo:padding-right="0.35mm" fo:wrap-option="wrap" loext:decorative="false" style:run-through="background"/>
    </style:style>
    <style:style style:name="Mgr6" style:family="graphic" style:parent-style-name="Frame">
      <style:graphic-properties draw:stroke="none" svg:stroke-width="0mm" draw:fill="none" loext:fill-use-slide-background="false" draw:textarea-vertical-align="middle" draw:auto-grow-height="false" fo:min-height="0mm" fo:min-width="0mm" fo:padding-top="0mm" fo:padding-bottom="0mm" fo:padding-left="0mm" fo:padding-right="0mm" fo:wrap-option="wrap" loext:decorative="false" style:run-through="background"/>
    </style:style>
    <style:style style:name="Mgr7" style:family="graphic">
      <style:graphic-properties style:writing-mode="lr-tb" loext:decorative="false" fo:margin-left="0mm" fo:margin-right="0.67mm" fo:margin-top="0mm" fo:margin-bottom="0.65m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style:writing-mode="lr-tb" loext:decorative="false" style:run-through="background"/>
    </style:style>
    <style:style style:name="Mgr9" style:family="graphic" style:parent-style-name="Frame">
      <style:graphic-properties draw:stroke="none" svg:stroke-width="0mm" draw:fill="none" loext:fill-use-slide-background="false" draw:textarea-vertical-align="middle" draw:auto-grow-height="false" fo:min-height="0mm" fo:min-width="0mm" fo:padding-top="0.35mm" fo:padding-bottom="0.35mm" fo:padding-left="0.35mm" fo:padding-right="0.35mm" fo:wrap-option="wrap" loext:decorative="false" style:run-through="background"/>
    </style:style>
    <style:style style:name="Mgr10" style:family="graphic" style:parent-style-name="Frame">
      <style:graphic-properties draw:stroke="none" svg:stroke-width="0mm" draw:fill="none" loext:fill-use-slide-background="false" draw:textarea-vertical-align="top" draw:auto-grow-height="false" fo:min-height="4.67mm" fo:min-width="23.11mm" fo:padding-top="0.35mm" fo:padding-bottom="0.35mm" fo:padding-left="0.35mm" fo:padding-right="0.35mm" fo:wrap-option="wrap" loext:decorative="false" fo:margin-left="0mm" fo:margin-right="0.02mm" fo:margin-top="0mm" fo:margin-bottom="0m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mm" fo:page-height="297mm" style:num-format="1" style:print-orientation="portrait" fo:margin-top="12.51mm" fo:margin-bottom="22.51mm" fo:margin-left="30mm" fo:margin-right="15.01mm"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7.5mm" fo:margin-left="25.01mm" fo:margin-right="20mm" style:writing-mode="lr-tb" style:layout-grid-color="#c0c0c0" style:layout-grid-lines="2695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8.01mm" fo:margin-bottom="14.01mm" fo:margin-left="25.01mm" fo:margin-right="10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mm" fo:margin-left="0mm" fo:margin-right="0mm" fo:margin-bottom="6mm" style:dynamic-spacing="true"/>
      </style:header-style>
      <style:footer-style>
        <style:header-footer-properties fo:min-height="16mm" fo:margin-left="0mm" fo:margin-right="0mm" fo:margin-top="14.99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header>
        <text:p text:style-name="Header"><draw:g text:anchor-type="char" draw:z-index="67" draw:name="Group 73" draw:style-name="Mgr1"><draw:custom-shape draw:name="Rectangle 74" draw:style-name="Mgr2" draw:text-style-name="MP1" svg:width="185.32mm" svg:height="285.33mm" svg:x="19.44mm" svg:y="6.35m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5" draw:style-name="Mgr3" draw:text-style-name="MP1" svg:x1="29.56mm" svg:y1="276.68mm" svg:x2="29.58mm" svg:y2="291.52mm"><text:p/></draw:line><draw:line draw:name="Line 76" draw:style-name="Mgr3" draw:text-style-name="MP1" svg:x1="19.54mm" svg:y1="276.58mm" svg:x2="204.56mm" svg:y2="276.59mm"><text:p/></draw:line><draw:line draw:name="Line 77" draw:style-name="Mgr3" draw:text-style-name="MP1" svg:x1="39.69mm" svg:y1="276.68mm" svg:x2="39.71mm" svg:y2="291.52mm"><text:p/></draw:line><draw:line draw:name="Line 78" draw:style-name="Mgr3" draw:text-style-name="MP1" svg:x1="65.02mm" svg:y1="276.68mm" svg:x2="65.04mm" svg:y2="291.52mm"><text:p/></draw:line><draw:line draw:name="Line 79" draw:style-name="Mgr3" draw:text-style-name="MP1" svg:x1="80.21mm" svg:y1="276.84mm" svg:x2="80.22mm" svg:y2="291.53mm"><text:p/></draw:line><draw:line draw:name="Line 80" draw:style-name="Mgr3" draw:text-style-name="MP1" svg:x1="90.32mm" svg:y1="276.68mm" svg:x2="90.34mm" svg:y2="291.38mm"><text:p/></draw:line><draw:line draw:name="Line 81" draw:style-name="Mgr3" draw:text-style-name="MP1" svg:x1="194.62mm" svg:y1="276.68mm" svg:x2="194.66mm" svg:y2="291.52mm"><text:p/></draw:line><draw:line draw:name="Line 82" draw:style-name="Mgr4" draw:text-style-name="MP1" svg:x1="19.54mm" svg:y1="281.59mm" svg:x2="90.16mm" svg:y2="281.62mm"><text:p/></draw:line><draw:line draw:name="Line 83" draw:style-name="Mgr3" draw:text-style-name="MP1" svg:x1="19.54mm" svg:y1="286.64mm" svg:x2="90.16mm" svg:y2="286.65mm"><text:p/></draw:line><draw:line draw:name="Line 84" draw:style-name="Mgr4" draw:text-style-name="MP1" svg:x1="194.75mm" svg:y1="281.65mm" svg:x2="204.67mm" svg:y2="281.66mm"><text:p/></draw:line><draw:custom-shape draw:name="Rectangle 85" draw:style-name="Mgr5" draw:text-style-name="MP3" svg:width="9.25mm" svg:height="4.4mm" svg:x="19.93mm" svg:y="286.84mm"><text:p text:style-name="MP2" loext:marker-style-name="MT1"><text:span text:style-name="MT1">Изм.</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Mgr5" draw:text-style-name="MP3" svg:width="9.27mm" svg:height="4.4mm" svg:x="29.99mm" svg:y="286.84mm"><text:p text:style-name="MP2" loext:marker-style-name="MT1"><text:span text:style-name="MT1">Лист</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Mgr5" draw:text-style-name="MP3" svg:width="23.84mm" svg:height="4.4mm" svg:x="40.45mm" svg:y="286.84mm"><text:p text:style-name="MP2" loext:marker-style-name="MT1"><text:span text:style-name="MT1">№ докум.</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Mgr5" draw:text-style-name="MP3" svg:width="14.21mm" svg:height="4.4mm" svg:x="65.62mm" svg:y="286.84mm"><text:p text:style-name="MP2" loext:marker-style-name="MT1"><text:span text:style-name="MT1">Подпись</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Mgr5" draw:text-style-name="MP3" svg:width="9.25mm" svg:height="4.4mm" svg:x="80.65mm" svg:y="286.84mm"><text:p text:style-name="MP2" loext:marker-style-name="MT1"><text:span text:style-name="MT1">Дата</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0" draw:style-name="Mgr5" draw:text-style-name="MP3" svg:width="9.27mm" svg:height="4.4mm" svg:x="195.04mm" svg:y="277.11mm"><text:p text:style-name="Standard" loext:marker-style-name="MT1"><text:span text:style-name="MT1">Лист</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1" draw:style-name="Mgr5" draw:text-style-name="MP3" svg:width="9.27mm" svg:height="6.02mm" svg:x="195.04mm" svg:y="283.63mm"><text:p text:style-name="MP2" loext:marker-style-name="MT1"><text:span text:style-name="MT1"><text:page-number text:select-page="current">64</text:page-numb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2" draw:style-name="Mgr6" draw:text-style-name="MP3" svg:width="102.19mm" svg:height="6.96mm" svg:x="91.2mm" svg:y="280.58mm"><text:p text:style-name="MP4" loext:marker-style-name="MT2"><text:span text:style-name="MT3">ВКР-УлГТУ</text:span><text:span text:style-name="MT4">-</text:span><text:span text:style-name="MT3">09.03.02-</text:span><text:span text:style-name="MT5"> </text:span><text:span text:style-name="MT3">22/2410 -202</text:span><text:span text:style-name="MT4">6</text:span><text:span text:style-name="MT3"> ПЗ</text:span></text:p><text:p text:style-name="MP5" loext:marker-style-name="M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header-first>
        <text:p text:style-name="Header"><draw:g text:anchor-type="char" draw:z-index="68" draw:name="Group 144" draw:style-name="Mgr7"><draw:custom-shape draw:name="Rectangle 94" draw:style-name="Mgr2" draw:text-style-name="MP1" svg:width="185.07mm" svg:height="286.67mm" svg:x="-5.17mm" svg:y="-2.86m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5" draw:style-name="Mgr3" draw:text-style-name="MP1" svg:x1="4.02mm" svg:y1="243.45mm" svg:x2="4.04mm" svg:y2="258.33mm"><text:p/></draw:line><draw:line draw:name="Line 96" draw:style-name="Mgr3" draw:text-style-name="MP1" svg:x1="-5.08mm" svg:y1="243.31mm" svg:x2="179.69mm" svg:y2="243.32mm"><text:p/></draw:line><draw:line draw:name="Line 97" draw:style-name="Mgr3" draw:text-style-name="MP1" svg:x1="15.04mm" svg:y1="243.59mm" svg:x2="15.06mm" svg:y2="283.67mm"><text:p/></draw:line><draw:line draw:name="Line 98" draw:style-name="Mgr3" draw:text-style-name="MP1" svg:x1="40.35mm" svg:y1="243.59mm" svg:x2="40.37mm" svg:y2="283.67mm"><text:p/></draw:line><draw:line draw:name="Line 99" draw:style-name="Mgr3" draw:text-style-name="MP1" svg:x1="55.49mm" svg:y1="243.59mm" svg:x2="55.53mm" svg:y2="283.67mm"><text:p/></draw:line><draw:line draw:name="Line 100" draw:style-name="Mgr3" draw:text-style-name="MP1" svg:x1="65.61mm" svg:y1="243.45mm" svg:x2="65.63mm" svg:y2="283.53mm"><text:p/></draw:line><draw:line draw:name="Line 101" draw:style-name="Mgr3" draw:text-style-name="MP1" svg:x1="141.48mm" svg:y1="258.57mm" svg:x2="141.52mm" svg:y2="268.51mm"><text:p/></draw:line><draw:line draw:name="Line 102" draw:style-name="Mgr4" draw:text-style-name="MP1" svg:x1="-5.08mm" svg:y1="273.7mm" svg:x2="65.45mm" svg:y2="273.72mm"><text:p/></draw:line><draw:line draw:name="Line 103" draw:style-name="Mgr4" draw:text-style-name="MP1" svg:x1="-5.08mm" svg:y1="278.75mm" svg:x2="65.45mm" svg:y2="278.76mm"><text:p/></draw:line><draw:custom-shape draw:name="Rectangle 104" draw:style-name="Mgr5" draw:text-style-name="MP3" svg:width="8.16mm" svg:height="4.44mm" svg:x="-4.68mm" svg:y="253.89mm"><text:p text:style-name="MP6" loext:marker-style-name="MT7"><text:span text:style-name="MT7">Изм.</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5" draw:style-name="Mgr5" draw:text-style-name="MP3" svg:width="10.17mm" svg:height="4.44mm" svg:x="4.55mm" svg:y="253.89mm"><text:p text:style-name="MP6" loext:marker-style-name="MT7"><text:span text:style-name="MT7">Лист</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 draw:style-name="Mgr5" draw:text-style-name="MP3" svg:width="23.8mm" svg:height="4.44mm" svg:x="15.8mm" svg:y="253.89mm"><text:p text:style-name="MP6" loext:marker-style-name="MT7"><text:span text:style-name="MT7">№ докум.</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7" draw:style-name="Mgr5" draw:text-style-name="MP3" svg:width="14.19mm" svg:height="4.44mm" svg:x="40.94mm" svg:y="253.89mm"><text:p text:style-name="MP6" loext:marker-style-name="MT7"><text:span text:style-name="MT7">Подпись</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Mgr5" draw:text-style-name="MP3" svg:width="9.25mm" svg:height="4.44mm" svg:x="55.93mm" svg:y="253.89mm"><text:p text:style-name="MP6" loext:marker-style-name="MT7"><text:span text:style-name="MT7">Дата</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Mgr5" draw:text-style-name="MP3" svg:width="13.64mm" svg:height="4.42mm" svg:x="142.22mm" svg:y="258.87mm"><text:p text:style-name="MP6" loext:marker-style-name="MT7"><text:span text:style-name="MT7">Лист</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Mgr5" draw:text-style-name="MP3" svg:width="13.64mm" svg:height="4.44mm" svg:x="142.22mm" svg:y="264.1mm"><text:p text:style-name="MP6" loext:marker-style-name="MT8"><text:span text:style-name="MT8"><text:page-number text:select-page="current">5</text:page-numb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1" draw:style-name="Mgr6" draw:text-style-name="MP3" svg:width="112.53mm" svg:height="8.99mm" svg:x="66.64mm" svg:y="247.74mm"><text:p text:style-name="MP4" loext:marker-style-name="MT2"><text:span text:style-name="MT3">ВКР-УлГТУ</text:span><text:span text:style-name="MT4">-</text:span><text:span text:style-name="MT3">09.03.02-</text:span><text:span text:style-name="MT5"> </text:span><text:span text:style-name="MT3">22/2410 -202</text:span><text:span text:style-name="MT4">6 </text:span><text:span text:style-name="MT3">ПЗ</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2" draw:style-name="Mgr3" draw:text-style-name="MP1" svg:x1="-5.06mm" svg:y1="258.49mm" svg:x2="179.71mm" svg:y2="258.51mm"><text:p/></draw:line><draw:line draw:name="Line 113" draw:style-name="Mgr3" draw:text-style-name="MP1" svg:x1="-4.94mm" svg:y1="253.45mm" svg:x2="65.59mm" svg:y2="253.47mm"><text:p/></draw:line><draw:line draw:name="Line 114" draw:style-name="Mgr4" draw:text-style-name="MP1" svg:x1="-5.08mm" svg:y1="248.35mm" svg:x2="65.45mm" svg:y2="248.37mm"><text:p/></draw:line><draw:line draw:name="Line 115" draw:style-name="Mgr4" draw:text-style-name="MP1" svg:x1="-5.08mm" svg:y1="268.6mm" svg:x2="65.45mm" svg:y2="268.61mm"><text:p/></draw:line><draw:line draw:name="Line 116" draw:style-name="Mgr4" draw:text-style-name="MP1" svg:x1="-5.08mm" svg:y1="263.5mm" svg:x2="65.45mm" svg:y2="263.52mm"><text:p/></draw:line><draw:custom-shape draw:name="Rectangle 118" draw:style-name="Mgr5" draw:text-style-name="MP3" svg:width="19.66mm" svg:height="4.44mm" svg:x="-4.82mm" svg:y="258.99mm"><text:p text:style-name="Чертежный" loext:marker-style-name="MT7"><text:span text:style-name="MT9">Разраб</text:span><text:span text:style-name="MT7">.</text:span></text:p><text:p text:style-name="MP7" loext:marker-style-name="MT7"/><text:p text:style-name="List_20_Paragraph" loext:marker-style-name="MT10"><text:span text:style-name="MT10">Бакунькина Н.М.</text:span><text:span text:style-name="MT10"/></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Mgr8"><draw:custom-shape draw:name="Rectangle 121" draw:style-name="Mgr5" draw:text-style-name="MP3" svg:width="19.68mm" svg:height="4.44mm" svg:x="-4.82mm" svg:y="263.96mm"><text:p text:style-name="Чертежный" loext:marker-style-name="MT7"><text:span text:style-name="MT7">Провер.</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2" draw:style-name="Mgr5" draw:text-style-name="MP3" svg:width="23.8mm" svg:height="4.44mm" svg:x="15.8mm" svg:y="263.96mm"><text:p text:style-name="Чертежный" loext:marker-style-name="MT9"><text:span text:style-name="MT9">Тамьярова М. В.</text:span><text:span text:style-name="MT9"/></text:p><text:p text:style-name="Чертежный" loext:marker-style-name="MT9"><text:span text:style-name="MT9">..</text:span><text:span text:style-name="MT9"/></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8"><draw:custom-shape draw:name="Rectangle 124" draw:style-name="Mgr5" draw:text-style-name="MP3" svg:width="19.68mm" svg:height="4.44mm" svg:x="-4.82mm" svg:y="269.04mm"><text:p text:style-name="Чертежный" loext:marker-style-name="MT7"><text:span text:style-name="MT7">Консульт.</text:span><text:span text:style-name="MT7"/></text:p><text:p text:style-name="MP8" loext:marker-style-name="MT1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5" draw:style-name="Mgr5" draw:text-style-name="MP3" svg:width="23.8mm" svg:height="4.44mm" svg:x="15.8mm" svg:y="269.04mm"><text:p text:style-name="MP9" loext:marker-style-name="MT9"/><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8"><draw:custom-shape draw:name="Rectangle 127" draw:style-name="Mgr5" draw:text-style-name="MP3" svg:width="19.68mm" svg:height="4.44mm" svg:x="-4.82mm" svg:y="274mm"><text:p text:style-name="Чертежный" loext:marker-style-name="MT7"><text:span text:style-name="MT12"><text:s/></text:span><text:span text:style-name="MT7">Н. Контр.</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8" draw:style-name="Mgr5" draw:text-style-name="MP3" svg:width="23.8mm" svg:height="4.44mm" svg:x="15.8mm" svg:y="274mm"><text:p text:style-name="Чертежный" loext:marker-style-name="MT9"><text:span text:style-name="MT9">Шикина В. Е.</text:span><text:span text:style-name="MT9"/></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8"><draw:custom-shape draw:name="Rectangle 130" draw:style-name="Mgr5" draw:text-style-name="MP3" svg:width="19.68mm" svg:height="4.44mm" svg:x="-4.82mm" svg:y="278.96mm"><text:p text:style-name="Чертежный" loext:marker-style-name="MT7"><text:span text:style-name="MT7"><text:s/>Утв.</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1" draw:style-name="Mgr5" draw:text-style-name="MP3" svg:width="23.8mm" svg:height="4.44mm" svg:x="15.8mm" svg:y="278.96mm"><text:p text:style-name="MP8" loext:marker-style-name="MT1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32" draw:style-name="Mgr3" draw:text-style-name="MP1" svg:x1="126.31mm" svg:y1="258.57mm" svg:x2="126.33mm" svg:y2="283.52mm"><text:p/></draw:line><draw:custom-shape draw:name="Rectangle 133" draw:style-name="Mgr9" draw:text-style-name="MP3" svg:width="58.2mm" svg:height="23.06mm" svg:x="66.9mm" svg:y="259.66mm"><text:p text:style-name="MP2" loext:marker-style-name="MT13"><text:span text:style-name="MT14">Программное обеспечение для управления камерой и обработки данных в системе инфракрасного мониторинга температуры объекта</text:span><text:span text:style-name="MT13"/></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34" draw:style-name="Mgr3" draw:text-style-name="MP1" svg:x1="126.41mm" svg:y1="263.57mm" svg:x2="179.81mm" svg:y2="263.59mm"><text:p/></draw:line><draw:line draw:name="Line 135" draw:style-name="Mgr3" draw:text-style-name="MP1" svg:x1="126.4mm" svg:y1="268.62mm" svg:x2="179.8mm" svg:y2="268.64mm"><text:p/></draw:line><draw:line draw:name="Line 136" draw:style-name="Mgr3" draw:text-style-name="MP1" svg:x1="156.64mm" svg:y1="258.57mm" svg:x2="156.68mm" svg:y2="268.51mm"><text:p/></draw:line><draw:custom-shape draw:name="Rectangle 137" draw:style-name="Mgr5" draw:text-style-name="MP3" svg:width="13.62mm" svg:height="4.42mm" svg:x="127.1mm" svg:y="258.87mm"><text:p text:style-name="MP6" loext:marker-style-name="MT7"><text:span text:style-name="MT7">Ли</text:span><text:span text:style-name="MT9">с</text:span><text:span text:style-name="MT7">т.</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8" draw:style-name="Mgr5" draw:text-style-name="MP3" svg:width="21.54mm" svg:height="4.42mm" svg:x="157.48mm" svg:y="258.87mm"><text:p text:style-name="MP6" loext:marker-style-name="MT7"><text:span text:style-name="MT7">Листов</text:span><text:span text:style-name="M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9" draw:style-name="Mgr5" draw:text-style-name="MP3" svg:width="21.51mm" svg:height="4.42mm" svg:x="157.62mm" svg:y="263.96mm"><text:p text:style-name="MP6" loext:marker-style-name="MT8"><text:span text:style-name="MT8"><text:page-count style:num-format="1">64</text:page-count></text:span></text:p><text:p text:style-name="MP10" loext:marker-style-name="MT10"/><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40" draw:style-name="Mgr4" draw:text-style-name="MP1" svg:x1="131.37mm" svg:y1="263.66mm" svg:x2="131.39mm" svg:y2="268.51mm"><text:p/></draw:line><draw:line draw:name="Line 141" draw:style-name="Mgr4" draw:text-style-name="MP1" svg:x1="136.42mm" svg:y1="263.69mm" svg:x2="136.44mm" svg:y2="268.54mm"><text:p/></draw:line><draw:custom-shape draw:name="Rectangle 142" draw:style-name="Mgr9" draw:text-style-name="MP3" svg:width="51.9mm" svg:height="13.64mm" svg:x="127.1mm" svg:y="269.38mm"><text:p text:style-name="MP2" loext:marker-style-name="MT15"><text:span text:style-name="MT16">ИСТбд </text:span><text:span text:style-name="MT17">–</text:span><text:span text:style-name="MT16"> 4</text:span><text:span text:style-name="MT18">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first>
      <style:footer>
        <text:p text:style-name="MP11"/>
        <text:p text:style-name="Footer"/>
      </style:footer>
      <style:footer-first>
        <text:p text:style-name="Footer"/>
        <text:p text:style-name="Footer"/>
        <text:p text:style-name="Footer"/>
        <text:p text:style-name="Footer"/>
        <text:p text:style-name="Footer"><draw:custom-shape text:anchor-type="char" draw:z-index="69" draw:name="Rectangle 122" draw:style-name="Mgr10" draw:text-style-name="MP12" svg:width="23.8mm" svg:height="5.37mm" svg:x="15.86mm" svg:y="3.32mm"><text:p text:style-name="Чертежный" loext:marker-style-name="MT9"><text:span text:style-name="MT9">Лашманов Н. Н.</text:span><text:span text:style-name="MT9"/></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text:p text:style-name="Footer"/>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Рамка чертежная А4</dc:title>
    <meta:initial-creator>Тагашев И. А.;Тагашев И. И.</meta:initial-creator>
    <meta:keyword>Рамка</meta:keyword>
    <meta:keyword>А4</meta:keyword>
    <dc:creator>Николай Лашманов</dc:creator>
    <meta:editing-cycles>13</meta:editing-cycles>
    <meta:print-date>2026-06-13T23:37:00</meta:print-date>
    <meta:creation-date>2026-06-13T23:32:00</meta:creation-date>
    <dc:date>2026-06-14T07:27:00</dc:date>
    <meta:editing-duration>PT7H53M</meta:editing-duration>
    <meta:generator>LibreOffice/26.2.3.2$Windows_X86_64 LibreOffice_project/70e089b17412e4cb7773e41413306b17a2328c34</meta:generator>
    <meta:document-statistic meta:table-count="28" meta:image-count="8" meta:object-count="34" meta:page-count="64" meta:paragraph-count="1452" meta:word-count="7677" meta:character-count="68906" meta:non-whitespace-character-count="57665"/>
    <meta:user-defined meta:name="AppVersion">16.0000</meta:user-defined>
    <meta:user-defined meta:name="Company">BEST_XP</meta:user-defined>
    <meta:user-defined meta:name="OOXMLCorePropertyCategory">Шаблоны</meta:user-defined>
    <meta:template xlink:type="simple" xlink:actuate="onRequest" xlink:title="Normal.dotm" xlink:href=""/>
  </office:meta>
</office:document-meta>
</file>

<file path=Object 1/content.xml><?xml version="1.0" encoding="utf-8"?>
<math xmlns="http://www.w3.org/1998/Math/MathML" display="block">
  <semantics>
    <mtable>
      <mtr>
        <mtd>
          <mrow>
            <msub>
              <mi>Т</mi>
              <mi mathvariant="italic">об</mi>
            </msub>
            <mtext>=</mtext>
            <mrow>
              <munderover>
                <mo stretchy="false">∑</mo>
                <mrow>
                  <mi>i</mi>
                  <mtext>=</mtext>
                  <mn>1</mn>
                </mrow>
                <mi>n</mi>
              </munderover>
              <msub>
                <mi>t</mi>
                <mi>i</mi>
              </msub>
            </mrow>
            <mi>,</mi>
          </mrow>
        </mtd>
      </mtr>
    </mtable>
    <annotation encoding="StarMath 5.0">stack { {Т} rsub {об} "=" sum from {i "="1} to {n} {{t} rsub {i}} ,  }</annotation>
  </semantics>
</math>
</file>

<file path=Object 10/content.xml><?xml version="1.0" encoding="utf-8"?>
<math xmlns="http://www.w3.org/1998/Math/MathML" display="block">
  <semantics>
    <mtable>
      <mtr>
        <mtd>
          <mrow>
            <msub>
              <mi>З</mi>
              <mi>э</mi>
            </msub>
            <mtext>=</mtext>
            <mrow>
              <munderover>
                <mo stretchy="false">∑</mo>
                <mrow>
                  <mi>i</mi>
                  <mtext>=</mtext>
                  <mn>1</mn>
                </mrow>
                <mi>n</mi>
              </munderover>
              <mrow>
                <msub>
                  <mi>М</mi>
                  <mi>i</mi>
                </msub>
                <msub>
                  <mi>Т</mi>
                  <mi>i</mi>
                </msub>
                <mi>Ц</mi>
              </mrow>
            </mrow>
            <mi>,</mi>
          </mrow>
        </mtd>
      </mtr>
    </mtable>
    <annotation encoding="StarMath 5.0">stack { {З} rsub {э} "=" sum from {i"="1} to {n} {{М} rsub {i}  {Т} rsub {i}  Ц} ,  }</annotation>
  </semantics>
</math>
</file>

<file path=Object 11/content.xml><?xml version="1.0" encoding="utf-8"?>
<math xmlns="http://www.w3.org/1998/Math/MathML" display="block">
  <semantics>
    <msub>
      <mi>М</mi>
      <mi>i</mi>
    </msub>
    <annotation encoding="StarMath 5.0">{М} rsub {i}</annotation>
  </semantics>
</math>
</file>

<file path=Object 12/content.xml><?xml version="1.0" encoding="utf-8"?>
<math xmlns="http://www.w3.org/1998/Math/MathML" display="block">
  <semantics>
    <msub>
      <mi>Т</mi>
      <mi>i</mi>
    </msub>
    <annotation encoding="StarMath 5.0">{Т} rsub {i}</annotation>
  </semantics>
</math>
</file>

<file path=Object 13/content.xml><?xml version="1.0" encoding="utf-8"?>
<math xmlns="http://www.w3.org/1998/Math/MathML" display="block">
  <semantics>
    <msub>
      <mi>З</mi>
      <mi mathvariant="italic">тр</mi>
    </msub>
    <annotation encoding="StarMath 5.0">{З} rsub {тр}</annotation>
  </semantics>
</math>
</file>

<file path=Object 14/content.xml><?xml version="1.0" encoding="utf-8"?>
<math xmlns="http://www.w3.org/1998/Math/MathML" display="block">
  <semantics>
    <mrow>
      <mtable>
        <mtr>
          <mtd>
            <mrow>
              <msub>
                <mi>З</mi>
                <mi>э</mi>
              </msub>
              <mtext>=</mtext>
              <mrow>
                <munderover>
                  <mo stretchy="false">∑</mo>
                  <mrow>
                    <mi>i</mi>
                    <mtext>=</mtext>
                    <mn>1</mn>
                  </mrow>
                  <mi>n</mi>
                </munderover>
                <mrow>
                  <msub>
                    <mi mathvariant="italic">ЧС</mi>
                    <mi>i</mi>
                  </msub>
                  <msub>
                    <mi>Т</mi>
                    <mi>i</mi>
                  </msub>
                </mrow>
              </mrow>
              <mi>,</mi>
            </mrow>
          </mtd>
        </mtr>
      </mtable>
      <mtable>
        <mtr>
          <mtd>
            <mrow>
              <msub>
                <mi>З</mi>
                <mi>э</mi>
              </msub>
              <mtext>=</mtext>
              <mrow>
                <munderover>
                  <mo stretchy="false">∑</mo>
                  <mrow>
                    <mi>i</mi>
                    <mtext>=</mtext>
                    <mn>1</mn>
                  </mrow>
                  <mi>n</mi>
                </munderover>
                <mrow>
                  <msub>
                    <mi>М</mi>
                    <mi>i</mi>
                  </msub>
                  <msub>
                    <mi>Т</mi>
                    <mi>i</mi>
                  </msub>
                  <mi>Ц</mi>
                </mrow>
              </mrow>
              <mi>,</mi>
            </mrow>
          </mtd>
        </mtr>
      </mtable>
    </mrow>
    <annotation encoding="StarMath 5.0">stack { {З} rsub {э} "=" sum from {i"="1} to {n} {{ЧС} rsub {i}  {Т} rsub {i}} ,  } stack { {З} rsub {э} "=" sum from {i"="1} to {n} {{М} rsub {i}  {Т} rsub {i}  Ц} ,  }</annotation>
  </semantics>
</math>
</file>

<file path=Object 15/content.xml><?xml version="1.0" encoding="utf-8"?>
<math xmlns="http://www.w3.org/1998/Math/MathML" display="block">
  <semantics>
    <msub>
      <mi mathvariant="italic">ЧС</mi>
      <mi>i</mi>
    </msub>
    <annotation encoding="StarMath 5.0">{ЧС} rsub {i}</annotation>
  </semantics>
</math>
</file>

<file path=Object 16/content.xml><?xml version="1.0" encoding="utf-8"?>
<math xmlns="http://www.w3.org/1998/Math/MathML" display="block">
  <semantics>
    <msub>
      <mi>Т</mi>
      <mi>i</mi>
    </msub>
    <annotation encoding="StarMath 5.0">{Т} rsub {i}</annotation>
  </semantics>
</math>
</file>

<file path=Object 17/content.xml><?xml version="1.0" encoding="utf-8"?>
<math xmlns="http://www.w3.org/1998/Math/MathML" display="block">
  <semantics>
    <msub>
      <mi>З</mi>
      <mi mathvariant="italic">тр</mi>
    </msub>
    <annotation encoding="StarMath 5.0">{З} rsub {тр}</annotation>
  </semantics>
</math>
</file>

<file path=Object 18/content.xml><?xml version="1.0" encoding="utf-8"?>
<math xmlns="http://www.w3.org/1998/Math/MathML" display="block">
  <semantics>
    <mtable>
      <mtr>
        <mtd>
          <mrow>
            <msub>
              <mi mathvariant="italic">ЧС</mi>
              <mi>i</mi>
            </msub>
            <mtext>=</mtext>
            <mfrac>
              <msub>
                <mi mathvariant="italic">ЗП</mi>
                <mi>i</mi>
              </msub>
              <msub>
                <mi mathvariant="italic">ФРВ</mi>
                <mi>i</mi>
              </msub>
            </mfrac>
            <mi>,</mi>
          </mrow>
        </mtd>
      </mtr>
    </mtable>
    <annotation encoding="StarMath 5.0">stack { {ЧС} rsub {i} "=" {{ЗП} rsub {i}} over {{ФРВ} rsub {i}} ,  }</annotation>
  </semantics>
</math>
</file>

<file path=Object 19/content.xml><?xml version="1.0" encoding="utf-8"?>
<math xmlns="http://www.w3.org/1998/Math/MathML" display="block">
  <semantics>
    <msub>
      <mi mathvariant="italic">ЗП</mi>
      <mi>i</mi>
    </msub>
    <annotation encoding="StarMath 5.0">{ЗП} rsub {i}</annotation>
  </semantics>
</math>
</file>

<file path=Object 2/content.xml><?xml version="1.0" encoding="utf-8"?>
<math xmlns="http://www.w3.org/1998/Math/MathML" display="block">
  <semantics>
    <msub>
      <mi>Т</mi>
      <mi mathvariant="italic">об</mi>
    </msub>
    <annotation encoding="StarMath 5.0">{Т} rsub {об}</annotation>
  </semantics>
</math>
</file>

<file path=Object 20/content.xml><?xml version="1.0" encoding="utf-8"?>
<math xmlns="http://www.w3.org/1998/Math/MathML" display="block">
  <semantics>
    <msub>
      <mi mathvariant="italic">ФРВ</mi>
      <mi>i</mi>
    </msub>
    <annotation encoding="StarMath 5.0">{ФРВ} rsub {i}</annotation>
  </semantics>
</math>
</file>

<file path=Object 21/content.xml><?xml version="1.0" encoding="utf-8"?>
<math xmlns="http://www.w3.org/1998/Math/MathML" display="block"/>
</file>

<file path=Object 22/content.xml><?xml version="1.0" encoding="utf-8"?>
<math xmlns="http://www.w3.org/1998/Math/MathML" display="block">
  <semantics>
    <mtable>
      <mtr>
        <mtd>
          <mrow>
            <mi>П</mi>
            <mtext>=</mtext>
            <mfrac>
              <mrow>
                <msub>
                  <mi>C</mi>
                  <mi mathvariant="italic">пол</mi>
                </msub>
                <msub>
                  <mi>Р</mi>
                  <mi>н</mi>
                </msub>
              </mrow>
              <mn>100</mn>
            </mfrac>
            <mi>,</mi>
          </mrow>
        </mtd>
      </mtr>
    </mtable>
    <annotation encoding="StarMath 5.0">stack { П"=" {{C} rsub {пол}  {Р} rsub {н}} over {100} ,  }</annotation>
  </semantics>
</math>
</file>

<file path=Object 23/content.xml><?xml version="1.0" encoding="utf-8"?>
<math xmlns="http://www.w3.org/1998/Math/MathML" display="block">
  <semantics>
    <msub>
      <mi>C</mi>
      <mi mathvariant="italic">пол</mi>
    </msub>
    <annotation encoding="StarMath 5.0">{C} rsub {пол}</annotation>
  </semantics>
</math>
</file>

<file path=Object 24/content.xml><?xml version="1.0" encoding="utf-8"?>
<math xmlns="http://www.w3.org/1998/Math/MathML" display="block">
  <semantics>
    <msub>
      <mi>Р</mi>
      <mi>н</mi>
    </msub>
    <annotation encoding="StarMath 5.0">{Р} rsub {н}</annotation>
  </semantics>
</math>
</file>

<file path=Object 25/content.xml><?xml version="1.0" encoding="utf-8"?>
<math xmlns="http://www.w3.org/1998/Math/MathML" display="block"/>
</file>

<file path=Object 26/content.xml><?xml version="1.0" encoding="utf-8"?>
<math xmlns="http://www.w3.org/1998/Math/MathML" display="block">
  <semantics>
    <msub>
      <mi>C</mi>
      <mi mathvariant="italic">пр</mi>
    </msub>
    <annotation encoding="StarMath 5.0">{C} rsub {пр}</annotation>
  </semantics>
</math>
</file>

<file path=Object 27/content.xml><?xml version="1.0" encoding="utf-8"?>
<math xmlns="http://www.w3.org/1998/Math/MathML" display="block">
  <semantics>
    <msub>
      <mi>C</mi>
      <mi mathvariant="italic">пол</mi>
    </msub>
    <annotation encoding="StarMath 5.0">{C} rsub {пол}</annotation>
  </semantics>
</math>
</file>

<file path=Object 28/content.xml><?xml version="1.0" encoding="utf-8"?>
<math xmlns="http://www.w3.org/1998/Math/MathML" display="block"/>
</file>

<file path=Object 29/content.xml><?xml version="1.0" encoding="utf-8"?>
<math xmlns="http://www.w3.org/1998/Math/MathML" display="block">
  <semantics>
    <mrow>
      <msub>
        <mi>Э</mi>
        <mi>э</mi>
      </msub>
      <mtext>=</mtext>
      <mfrac>
        <mi>П</mi>
        <msub>
          <mi>C</mi>
          <mi mathvariant="italic">пол</mi>
        </msub>
      </mfrac>
      <mtext> </mtext>
      <mtext> </mtext>
      <mn>100</mn>
      <mtext> </mtext>
      <mtext>%</mtext>
      <mi>,</mi>
    </mrow>
    <annotation encoding="StarMath 5.0">{Э} rsub {э} "=" {П} over {{C} rsub {пол}} " "  " "100" ""%" ,</annotation>
  </semantics>
</math>
</file>

<file path=Object 3/content.xml><?xml version="1.0" encoding="utf-8"?>
<math xmlns="http://www.w3.org/1998/Math/MathML" display="block">
  <semantics>
    <mrow>
      <mi>t</mi>
      <mi>i</mi>
    </mrow>
    <annotation encoding="StarMath 5.0">t i</annotation>
  </semantics>
</math>
</file>

<file path=Object 30/content.xml><?xml version="1.0" encoding="utf-8"?>
<math xmlns="http://www.w3.org/1998/Math/MathML" display="block">
  <semantics>
    <msub>
      <mi>Э</mi>
      <mi>э</mi>
    </msub>
    <annotation encoding="StarMath 5.0">{Э} rsub {э}</annotation>
  </semantics>
</math>
</file>

<file path=Object 31/content.xml><?xml version="1.0" encoding="utf-8"?>
<math xmlns="http://www.w3.org/1998/Math/MathML" display="block">
  <semantics>
    <msub>
      <mi>C</mi>
      <mi mathvariant="italic">пол</mi>
    </msub>
    <annotation encoding="StarMath 5.0">{C} rsub {пол}</annotation>
  </semantics>
</math>
</file>

<file path=Object 32/content.xml><?xml version="1.0" encoding="utf-8"?>
<math xmlns="http://www.w3.org/1998/Math/MathML" display="block">
  <semantics>
    <msub>
      <mi>Э</mi>
      <mi>э</mi>
    </msub>
    <annotation encoding="StarMath 5.0">{Э} rsub {э}</annotation>
  </semantics>
</math>
</file>

<file path=Object 33/content.xml><?xml version="1.0" encoding="utf-8"?>
<math xmlns="http://www.w3.org/1998/Math/MathML" display="block">
  <semantics>
    <mrow>
      <mtext> </mtext>
      <mn>100</mn>
      <mtext> </mtext>
      <mtext>%</mtext>
    </mrow>
    <annotation encoding="StarMath 5.0">" "100" ""%"</annotation>
  </semantics>
</math>
</file>

<file path=Object 34/content.xml><?xml version="1.0" encoding="utf-8"?>
<math xmlns="http://www.w3.org/1998/Math/MathML" display="block">
  <semantics>
    <mrow>
      <mn>27</mn>
      <mtext> </mtext>
      <mtext>%</mtext>
    </mrow>
    <annotation encoding="StarMath 5.0">27" ""%"</annotation>
  </semantics>
</math>
</file>

<file path=Object 4/content.xml><?xml version="1.0" encoding="utf-8"?>
<math xmlns="http://www.w3.org/1998/Math/MathML" display="block">
  <semantics>
    <mrow>
      <mi>n</mi>
      <mtext> </mtext>
    </mrow>
    <annotation encoding="StarMath 5.0">n " "</annotation>
  </semantics>
</math>
</file>

<file path=Object 5/content.xml><?xml version="1.0" encoding="utf-8"?>
<math xmlns="http://www.w3.org/1998/Math/MathML" display="block">
  <semantics>
    <msub>
      <mi>З</mi>
      <mi>м</mi>
    </msub>
    <annotation encoding="StarMath 5.0">{З} rsub {м}</annotation>
  </semantics>
</math>
</file>

<file path=Object 6/content.xml><?xml version="1.0" encoding="utf-8"?>
<math xmlns="http://www.w3.org/1998/Math/MathML" display="block">
  <semantics>
    <mtable>
      <mtr>
        <mtd>
          <mrow>
            <msub>
              <mi>З</mi>
              <mi>м</mi>
            </msub>
            <mtext>=</mtext>
            <mrow>
              <munderover>
                <mo stretchy="false">∑</mo>
                <mrow>
                  <mi>i</mi>
                  <mtext>=</mtext>
                  <mn>1</mn>
                </mrow>
                <mi>n</mi>
              </munderover>
              <mrow>
                <msub>
                  <mi>Р</mi>
                  <mi>i</mi>
                </msub>
                <msub>
                  <mi>Ц</mi>
                  <mi>i</mi>
                </msub>
              </mrow>
            </mrow>
            <mi>,</mi>
          </mrow>
        </mtd>
      </mtr>
    </mtable>
    <annotation encoding="StarMath 5.0">stack { {З} rsub {м} "=" sum from {i"="1} to {n} {{Р} rsub {i}  {Ц} rsub {i}} ,  }</annotation>
  </semantics>
</math>
</file>

<file path=Object 7/content.xml><?xml version="1.0" encoding="utf-8"?>
<math xmlns="http://www.w3.org/1998/Math/MathML" display="block">
  <semantics>
    <msub>
      <mi>P</mi>
      <mi>i</mi>
    </msub>
    <annotation encoding="StarMath 5.0">{P} rsub {i}</annotation>
  </semantics>
</math>
</file>

<file path=Object 8/content.xml><?xml version="1.0" encoding="utf-8"?>
<math xmlns="http://www.w3.org/1998/Math/MathML" display="block">
  <semantics>
    <msub>
      <mi>Ц</mi>
      <mi>i</mi>
    </msub>
    <annotation encoding="StarMath 5.0">{Ц} rsub {i}</annotation>
  </semantics>
</math>
</file>

<file path=Object 9/content.xml><?xml version="1.0" encoding="utf-8"?>
<math xmlns="http://www.w3.org/1998/Math/MathML" display="block">
  <semantics>
    <msub>
      <mi>З</mi>
      <mi>э</mi>
    </msub>
    <annotation encoding="StarMath 5.0">{З} rsub {э}</annotation>
  </semantics>
</math>
</file>