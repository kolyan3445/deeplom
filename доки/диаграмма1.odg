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572cm" fo:min-width="2.768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2cm" fo:min-width="3.15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draw:auto-grow-width="false" draw:fit-to-size="false" style:shrink-to-fit="false" fo:min-height="0.972cm" fo:min-width="1.32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1cm" fo:min-width="3.15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Стили_20_стрелок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8cm" fo:min-width="3.154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Стили_20_стрелок_20_3" draw:marker-end-width="0.3cm" draw:fill="none" draw:textarea-vertical-align="top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9cm" fo:min-width="3.15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draw:auto-grow-width="false" draw:fit-to-size="false" style:shrink-to-fit="false" fo:min-height="0.976cm" fo:min-width="1.327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2cm" fo:min-width="3.15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8cm" fo:min-width="3.153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31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27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27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293cm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73cm" fo:min-width="3.154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73cm" fo:min-width="3.14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1cm" fo:min-width="3.154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cm" fo:min-width="3.154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1cm" fo:min-width="3.149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158cm" fo:min-width="1.72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GOST type A" fo:font-size="11pt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21pt" style:font-size-complex="21pt"/>
    </style:style>
    <style:style style:name="P3" style:family="paragraph">
      <style:paragraph-properties fo:text-align="center"/>
      <style:text-properties style:font-name="GOST type A" fo:font-size="11pt" style:font-size-asian="14pt" style:font-size-complex="14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18pt" style:font-size-complex="18pt"/>
    </style:style>
    <style:style style:name="P5" style:family="paragraph">
      <style:paragraph-properties fo:text-align="center"/>
      <style:text-properties style:font-name="GOST type A" fo:font-size="11pt" style:font-size-asian="13pt" style:font-size-complex="13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16pt" style:font-size-complex="16pt"/>
    </style:style>
    <style:style style:name="P7" style:family="paragraph">
      <style:paragraph-properties fo:text-align="center"/>
      <style:text-properties style:font-name="GOST type A" fo:font-size="11pt"/>
    </style:style>
    <style:style style:name="P8" style:family="paragraph">
      <loext:graphic-properties draw:fill="none"/>
      <style:paragraph-properties fo:text-align="center"/>
      <style:text-properties style:font-name="GOST type A" fo:font-size="14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GOST type A" fo:font-size="11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GOST type A" fo:font-size="14pt" style:font-size-asian="22pt" style:font-size-complex="22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GOST type A" fo:font-size="14pt" style:font-size-asian="22pt" style:font-size-complex="22pt"/>
    </style:style>
    <style:style style:name="T1" style:family="text">
      <style:text-properties fo:font-size="14pt" style:font-size-asian="21pt" style:font-size-complex="21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0.5pt" style:font-size-asian="12pt" style:font-size-complex="12pt"/>
    </style:style>
    <style:style style:name="T4" style:family="text">
      <style:text-properties fo:font-size="14pt" style:font-size-asian="22pt" style:font-size-complex="22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654cm" svg:height="1.204cm" svg:x="20.674cm" svg:y="3.54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3.654cm" svg:height="2.412cm" svg:x="20.674cm" svg:y="5.567cm">
          <text:p text:style-name="P3"><text:span text:style-name="T2">Получить изображение от ESP32-C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1" draw:id="id1" draw:layer="layout" svg:width="3.654cm" svg:height="2.442cm" svg:x="20.707cm" svg:y="11.998cm">
          <text:p text:style-name="P5"><text:span text:style-name="T3">Точки получе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2" draw:id="id2" draw:layer="layout" svg:width="3.653cm" svg:height="2.411cm" svg:x="15.917cm" svg:y="14.7cm">
          <text:p text:style-name="P3"><text:span text:style-name="T2">Извлечь массивы X, Y, 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layout" svg:x1="22.514cm" svg:y1="4.748cm" svg:x2="22.514cm" svg:y2="5.556cm">
          <text:p text:style-name="P7"><text:span text:style-name="T4"/></text:p>
        </draw:line>
        <draw:line draw:style-name="gr5" draw:text-style-name="P8" draw:layer="layout" svg:x1="22.514cm" svg:y1="7.977cm" svg:x2="22.514cm" svg:y2="8.785cm">
          <text:p text:style-name="P7"><text:span text:style-name="T4"/></text:p>
        </draw:line>
        <draw:line draw:style-name="gr5" draw:text-style-name="P8" draw:layer="layout" svg:x1="22.53cm" svg:y1="11.208cm" svg:x2="22.53cm" svg:y2="12.016cm">
          <text:p text:style-name="P7"><text:span text:style-name="T4"/></text:p>
        </draw:line>
        <draw:custom-shape draw:style-name="gr6" draw:text-style-name="P4" draw:layer="layout" svg:width="3.654cm" svg:height="2.448cm" svg:x="20.674cm" svg:y="8.769cm">
          <text:p text:style-name="P3"><text:span text:style-name="T2">Получить список точек X, Y, 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measurelines" svg:x1="20.707cm" svg:y1="13.219cm" svg:x2="17.744cm" svg:y2="14.7cm" draw:start-shape="id1" draw:start-glue-point="5" draw:end-shape="id2" draw:end-glue-point="4" svg:d="M20707 13219h-2963v1481" svg:viewBox="0 0 2964 1482">
          <text:p text:style-name="P7"><text:span text:style-name="T4"/></text:p>
        </draw:connector>
        <draw:custom-shape draw:style-name="gr8" draw:text-style-name="P4" draw:layer="measurelines" svg:width="3.653cm" svg:height="2.409cm" svg:x="15.92cm" svg:y="17.927cm">
          <text:p text:style-name="P3"><text:span text:style-name="T2">Вычислить Tmin, Tmax, Tav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17.682cm" svg:y1="17.121cm" svg:x2="17.682cm" svg:y2="17.929cm">
          <text:p text:style-name="P7"><text:span text:style-name="T4"/></text:p>
        </draw:line>
        <draw:line draw:style-name="gr5" draw:text-style-name="P8" draw:layer="measurelines" svg:x1="17.682cm" svg:y1="20.352cm" svg:x2="17.682cm" svg:y2="21.16cm">
          <text:p text:style-name="P7"><text:span text:style-name="T4"/></text:p>
        </draw:line>
        <draw:custom-shape draw:style-name="gr9" draw:text-style-name="P6" xml:id="id3" draw:id="id3" draw:layer="measurelines" svg:width="3.653cm" svg:height="2.45cm" svg:x="15.85cm" svg:y="27.585cm">
          <text:p text:style-name="P5"><text:span text:style-name="T5">Все значения Na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4" draw:layer="measurelines" svg:width="3.653cm" svg:height="2.412cm" svg:x="15.92cm" svg:y="21.165cm">
          <text:p text:style-name="P3"><text:span text:style-name="T2">Создать сетку интерполя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measurelines" svg:width="3.653cm" svg:height="2.448cm" svg:x="15.92cm" svg:y="24.367cm">
          <text:p text:style-name="P3"><text:span text:style-name="T2">Выполнить интерполяцию температурного по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17.682cm" svg:y1="23.583cm" svg:x2="17.682cm" svg:y2="24.391cm">
          <text:p text:style-name="P7"><text:span text:style-name="T4"/></text:p>
        </draw:line>
        <draw:line draw:style-name="gr5" draw:text-style-name="P8" draw:layer="measurelines" svg:x1="17.682cm" svg:y1="26.814cm" svg:x2="17.682cm" svg:y2="27.622cm">
          <text:p text:style-name="P7"><text:span text:style-name="T4"/></text:p>
        </draw:line>
        <draw:connector draw:style-name="gr7" draw:text-style-name="P8" draw:layer="measurelines" svg:x1="15.85cm" svg:y1="28.81cm" svg:x2="13.302cm" svg:y2="30.273cm" draw:start-shape="id3" draw:start-glue-point="5" draw:end-shape="id4" draw:end-glue-point="4" svg:d="M15850 28810h-2548v1463" svg:viewBox="0 0 2549 1464">
          <text:p text:style-name="P7"><text:span text:style-name="T4"/></text:p>
        </draw:connector>
        <draw:frame draw:style-name="gr12" draw:text-style-name="P10" draw:layer="measurelines" svg:width="3.048cm" svg:height="1.567cm" svg:x="17.614cm" svg:y="11.609cm">
          <draw:text-box>
            <text:p text:style-name="P9"><text:span text:style-name="T4">Да</text:span></text:p>
          </draw:text-box>
        </draw:frame>
        <draw:frame draw:style-name="gr13" draw:text-style-name="P10" draw:layer="measurelines" svg:width="3.061cm" svg:height="1.528cm" svg:x="23.991cm" svg:y="11.391cm">
          <draw:text-box>
            <text:p text:style-name="P9"><text:span text:style-name="T4">Нет</text:span></text:p>
          </draw:text-box>
        </draw:frame>
        <draw:frame draw:style-name="gr14" draw:text-style-name="P10" draw:layer="measurelines" svg:width="3.091cm" svg:height="1.529cm" svg:x="12.814cm" svg:y="27.136cm">
          <draw:text-box>
            <text:p text:style-name="P9"><text:span text:style-name="T4">Да</text:span></text:p>
          </draw:text-box>
        </draw:frame>
        <draw:connector draw:style-name="gr7" draw:text-style-name="P8" draw:layer="measurelines" svg:x1="19.503cm" svg:y1="28.81cm" svg:x2="21.646cm" svg:y2="30.273cm" draw:start-shape="id3" draw:start-glue-point="7" draw:end-shape="id5" draw:end-glue-point="4" svg:d="M19503 28810h2143v1463" svg:viewBox="0 0 2144 1464">
          <text:p text:style-name="P7"><text:span text:style-name="T4"/></text:p>
        </draw:connector>
        <draw:frame draw:style-name="gr15" draw:text-style-name="P10" draw:layer="measurelines" svg:width="3.09cm" svg:height="1.543cm" svg:x="18.876cm" svg:y="27.379cm">
          <draw:text-box>
            <text:p text:style-name="P9"><text:span text:style-name="T4">Нет</text:span></text:p>
          </draw:text-box>
        </draw:frame>
        <draw:custom-shape draw:style-name="gr16" draw:text-style-name="P4" xml:id="id5" draw:id="id5" draw:layer="measurelines" svg:width="3.654cm" svg:height="2.423cm" svg:x="19.819cm" svg:y="30.273cm">
          <text:p text:style-name="P3"><text:span text:style-name="T2">Применить Gaussian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4" xml:id="id4" draw:id="id4" draw:layer="measurelines" svg:width="3.649cm" svg:height="2.423cm" svg:x="11.477cm" svg:y="30.273cm">
          <text:p text:style-name="P3"><text:span text:style-name="T2">Вернуть исход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21.642cm" svg:y1="32.711cm" svg:x2="21.642cm" svg:y2="33.519cm">
          <text:p text:style-name="P7"><text:span text:style-name="T4"/></text:p>
        </draw:line>
        <draw:custom-shape draw:style-name="gr18" draw:text-style-name="P4" draw:layer="measurelines" svg:width="3.654cm" svg:height="2.411cm" svg:x="19.819cm" svg:y="33.515cm">
          <text:p text:style-name="P3"><text:span text:style-name="T2">Построить градиент от темно-синего к темно-красном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21.642cm" svg:y1="35.942cm" svg:x2="21.642cm" svg:y2="36.75cm">
          <text:p text:style-name="P7"><text:span text:style-name="T4"/></text:p>
        </draw:line>
        <draw:custom-shape draw:style-name="gr2" draw:text-style-name="P4" draw:layer="measurelines" svg:width="3.654cm" svg:height="2.412cm" svg:x="19.819cm" svg:y="36.753cm">
          <text:p text:style-name="P3"><text:span text:style-name="T2">Сформировать RGB тепловую кар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21.642cm" svg:y1="39.173cm" svg:x2="21.642cm" svg:y2="39.981cm">
          <text:p text:style-name="P7"><text:span text:style-name="T4"/></text:p>
        </draw:line>
        <draw:custom-shape draw:style-name="gr19" draw:text-style-name="P4" draw:layer="measurelines" svg:width="3.654cm" svg:height="2.44cm" svg:x="19.819cm" svg:y="39.963cm">
          <text:p text:style-name="P3"><text:span text:style-name="T2">Наложить тепловую карту на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21.642cm" svg:y1="42.404cm" svg:x2="21.642cm" svg:y2="43.212cm">
          <text:p text:style-name="P7"><text:span text:style-name="T4"/></text:p>
        </draw:line>
        <draw:custom-shape draw:style-name="gr19" draw:text-style-name="P4" draw:layer="measurelines" svg:width="3.654cm" svg:height="2.44cm" svg:x="19.819cm" svg:y="43.195cm">
          <text:p text:style-name="P3"><text:span text:style-name="T2">Сохранить получен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21.642cm" svg:y1="45.635cm" svg:x2="21.642cm" svg:y2="46.443cm">
          <text:p text:style-name="P7"><text:span text:style-name="T4"/></text:p>
        </draw:line>
        <draw:custom-shape draw:style-name="gr2" draw:text-style-name="P4" draw:layer="measurelines" svg:width="3.654cm" svg:height="2.412cm" svg:x="19.819cm" svg:y="46.433cm">
          <text:p text:style-name="P3"><text:span text:style-name="T2">Сохранить значения в Б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8" draw:layer="measurelines" svg:x1="21.642cm" svg:y1="48.866cm" svg:x2="21.642cm" svg:y2="49.674cm">
          <text:p text:style-name="P7"><text:span text:style-name="T4"/></text:p>
        </draw:line>
        <draw:line draw:style-name="gr5" draw:text-style-name="P8" draw:layer="measurelines" svg:x1="21.642cm" svg:y1="52.097cm" svg:x2="21.642cm" svg:y2="53.713cm">
          <text:p text:style-name="P7"><text:span text:style-name="T4"/></text:p>
        </draw:line>
        <draw:line draw:style-name="gr20" draw:text-style-name="P8" draw:layer="measurelines" svg:x1="13.319cm" svg:y1="32.711cm" svg:x2="13.319cm" svg:y2="52.663cm">
          <text:p text:style-name="P7"><text:span text:style-name="T4"/></text:p>
        </draw:line>
        <draw:line draw:style-name="gr5" draw:text-style-name="P8" draw:layer="measurelines" svg:x1="13.317cm" svg:y1="52.658cm" svg:x2="21.639cm" svg:y2="52.658cm">
          <text:p text:style-name="P7"><text:span text:style-name="T4"/></text:p>
        </draw:line>
        <draw:custom-shape draw:style-name="gr1" draw:text-style-name="P2" draw:layer="measurelines" svg:width="3.654cm" svg:height="1.204cm" svg:x="19.819cm" svg:y="53.73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8" draw:layer="measurelines" svg:x1="24.361cm" svg:y1="13.219cm" svg:x2="27.453cm" svg:y2="14.705cm" draw:start-shape="id1" draw:start-glue-point="7" draw:end-shape="id6" draw:end-glue-point="4" svg:d="M24361 13219h3092v1486" svg:viewBox="0 0 3093 1487">
          <text:p text:style-name="P7"><text:span text:style-name="T4"/></text:p>
        </draw:connector>
        <draw:custom-shape draw:style-name="gr21" draw:text-style-name="P4" xml:id="id6" draw:id="id6" draw:layer="measurelines" svg:width="3.649cm" svg:height="2.411cm" svg:x="25.628cm" svg:y="14.705cm">
          <text:p text:style-name="P3"><text:span text:style-name="T2">Вернуть исход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8" draw:layer="measurelines" svg:x1="27.459cm" svg:y1="17.129cm" svg:x2="27.459cm" svg:y2="52.662cm">
          <text:p text:style-name="P7"><text:span text:style-name="T4"/></text:p>
        </draw:line>
        <draw:line draw:style-name="gr5" draw:text-style-name="P8" draw:layer="measurelines" svg:x1="27.46cm" svg:y1="52.658cm" svg:x2="21.642cm" svg:y2="52.658cm">
          <text:p text:style-name="P7"><text:span text:style-name="T4"/></text:p>
        </draw:line>
        <draw:custom-shape draw:style-name="gr22" draw:text-style-name="P11" draw:layer="layout" svg:width="3.654cm" svg:height="2.407cm" svg:x="19.819cm" svg:y="49.696cm">
          <text:p text:style-name="P9"><text:span text:style-name="T6">Передать изображение в интерфейс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8T11:35:29.392535400</meta:creation-date>
    <dc:date>2026-06-08T17:32:10.180623500</dc:date>
    <meta:editing-duration>PT30M34S</meta:editing-duration>
    <meta:editing-cycles>5</meta:editing-cycles>
    <meta:generator>LibreOffice/26.2.3.2$Windows_X86_64 LibreOffice_project/70e089b17412e4cb7773e41413306b17a2328c34</meta:generator>
    <meta:document-statistic meta:object-count="45"/>
  </office:meta>
</office:document-meta>
</file>